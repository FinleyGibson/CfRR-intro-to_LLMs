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jp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15%" fo:text-align="left" style:tab-stop-distance="1in" fo:margin-left="0.5in" fo:margin-right="0in" fo:text-indent="-0.35417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139in" style:font-size-asian="0.45139in" style:font-size-complex="0.45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draw:fill="none" draw:stroke="solid" svg:stroke-width="0.01042in" svg:stroke-color="#000000" svg:stroke-opacity="100%" draw:stroke-linejoin="round" svg:stroke-linecap="butt"/>
    </style:style>
    <style:style style:family="drawing-page" style:name="a12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draw:fill="none" draw:stroke="solid" svg:stroke-width="0.01042in" svg:stroke-color="#000000" svg:stroke-opacity="100%" draw:stroke-linejoin="round" svg:stroke-linecap="butt"/>
    </style:style>
    <style:style style:family="presentation" style:name="a7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139in" style:font-size-asian="0.45139in" style:font-size-complex="0.45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15%" fo:text-align="left" style:tab-stop-distance="1in" fo:margin-left="0.5in" fo:margin-right="0in" fo:text-indent="-0.3611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15%" fo:text-align="left" style:tab-stop-distance="1in" fo:margin-left="0.5in" fo:margin-right="0in" fo:text-indent="-0.3611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042in" svg:stroke-color="#000000" svg:stroke-opacity="100%" draw:stroke-linejoin="round" svg:stroke-linecap="butt"/>
    </style:style>
    <style:style style:family="drawing-page" style:name="a7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8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3c3b" style:text-line-through-type="none" style:text-line-through-style="none" style:text-line-through-width="auto" style:text-line-through-color="font-color" style:text-position="0% 100%" fo:font-family="Outfit"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3c3b" style:text-line-through-type="none" style:text-line-through-style="none" style:text-line-through-width="auto" style:text-line-through-color="font-color" style:text-position="0% 100%" fo:font-family="Outfit"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3c3b"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3">
      <style:text-properties fo:font-variant="normal" fo:text-transform="none" fo:color="#003c3b" style:text-line-through-type="none" style:text-line-through-style="none" style:text-line-through-width="auto" style:text-line-through-color="font-color" style:text-position="0% 100%" fo:font-family="Outfit"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54">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8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375in" style:font-size-asian="0.34375in" style:font-size-complex="0.34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375in" style:font-size-asian="0.34375in" style:font-size-complex="0.3437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Outfit"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0">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in" fo:margin-left="0.9361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left" style:tab-stop-distance="1in" fo:margin-left="0.9361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draw:fill="none" draw:stroke="solid" svg:stroke-width="0.01042in" svg:stroke-color="#000000" svg:stroke-opacity="100%" draw:stroke-linejoin="round" svg:stroke-linecap="butt"/>
    </style:style>
    <style:style style:family="drawing-page" style:name="a8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90%" fo:text-align="left" style:tab-stop-distance="1in" fo:margin-left="0.4361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111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90%" fo:text-align="left" style:tab-stop-distance="1in" fo:margin-left="0.4361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15%" fo:text-align="center"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8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parent-style-name="Graphics">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Outfit"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15%" fo:text-align="left" style:tab-stop-distance="1in" fo:margin-left="0.5in" fo:margin-right="0in" fo:text-indent="-0.3611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9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140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92">
      <style:graphic-properties draw:fill="none" draw:stroke="solid" svg:stroke-width="0.01042in" svg:stroke-color="#000000" svg:stroke-opacity="100%" draw:stroke-linejoin="round" svg:stroke-linecap="butt"/>
    </style:style>
    <style:style style:family="text" style:name="a90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04">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6" style:parent-style-name="Graphics">
      <style:graphic-properties draw:fill="none" draw:stroke="none"/>
    </style:style>
    <style:style style:family="text" style:name="a140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parent-style-name="Graphics">
      <style:graphic-properties draw:fill="none" draw:stroke="none"/>
    </style:style>
    <style:style style:family="paragraph" style:name="a140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draw:fill="none" draw:stroke="solid" svg:stroke-width="0.01042in" svg:stroke-color="#000000" svg:stroke-opacity="100%" draw:stroke-linejoin="round" svg:stroke-linecap="butt"/>
    </style:style>
    <style:style style:family="paragraph" style:name="a139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15%" fo:text-align="left" style:tab-stop-distance="1in" fo:margin-left="0.5in" fo:margin-right="0in" fo:text-indent="-0.3611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3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8" style:parent-style-name="Graphics">
      <style:graphic-properties draw:fill="none" fo:clip="rect(0in, 0in, 0in, 0in)" draw:stroke="none" draw:image-opacity="100%"/>
    </style:style>
    <style:style style:family="text" style:name="a11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114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139in" style:font-size-asian="0.45139in" style:font-size-complex="0.45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6">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8">
      <style:text-properties fo:font-variant="normal" fo:text-transform="none" fo:color="#c00000"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draw:fill="none" draw:stroke="solid" svg:stroke-width="0.01042in" svg:stroke-color="#000000" svg:stroke-opacity="100%" draw:stroke-linejoin="round" svg:stroke-linecap="butt"/>
    </style:style>
    <style:style style:family="drawing-page" style:name="a14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51">
      <style:graphic-properties draw:fill="none" draw:stroke="solid" svg:stroke-width="0.01042in" svg:stroke-color="#000000" svg:stroke-opacity="100%" draw:stroke-linejoin="round" svg:stroke-linecap="butt"/>
    </style:style>
    <style:style style:family="presentation" style:name="a6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53">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90%" fo:text-align="left" style:tab-stop-distance="1in" fo:margin-left="0.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parent-style-name="Graphics">
      <style:graphic-properties draw:fill="none" fo:clip="rect(0in, 0in, 0in, 0in)" draw:stroke="none" draw:image-opacity="100%"/>
    </style:style>
    <style:style style:family="text" style:name="a93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15%" fo:text-align="left" style:tab-stop-distance="1in" fo:margin-left="0.63889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3c3b" style:text-line-through-type="none" style:text-line-through-style="none" style:text-line-through-width="auto" style:text-line-through-color="font-color" style:text-position="0% 100%" fo:font-family="Palatino Linotype" style:font-family-asian="Palatino Linotype" style:font-family-complex="Palatino Linotype"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3125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563c1" style:text-line-through-type="none" style:text-line-through-style="none" style:text-line-through-width="auto" style:text-line-through-color="font-color" style:text-position="0% 100%" fo:font-family="Outfit" style:font-family-asian="Outfit" style:font-family-complex="Outfit"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9998in" fo:padding-bottom="0.09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presentation" style:name="a1446">
      <style:graphic-properties draw:fill="none" draw:stroke="solid" svg:stroke-width="0.01042in" svg:stroke-color="#000000" svg:stroke-opacity="100%" draw:stroke-linejoin="round" svg:stroke-linecap="butt"/>
    </style:style>
    <style:style style:family="presentation" style:name="a1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0">
      <style:paragraph-properties fo:line-height="115%" fo:text-align="left" style:tab-stop-distance="1in" fo:margin-left="0.63889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3c3b" style:text-line-through-type="none" style:text-line-through-style="none" style:text-line-through-width="auto" style:text-line-through-color="font-color" style:text-position="0% 100%" fo:font-family="Palatino Linotype" style:font-family-asian="Palatino Linotype" style:font-family-complex="Palatino Linotype"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15%" fo:text-align="left" style:tab-stop-distance="1in" fo:margin-left="0.93056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3125in" fo:margin-right="0in" fo:text-indent="-0.35069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15%" fo:text-align="left" style:tab-stop-distance="1in" fo:margin-left="0.93056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15%" fo:text-align="left" style:tab-stop-distance="1in" fo:margin-left="0.93056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15%" fo:text-align="left" style:tab-stop-distance="1in" fo:margin-left="0.93056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139in" style:font-size-asian="0.45139in" style:font-size-complex="0.45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34028in" style:font-size-asian="0.34028in" style:font-size-complex="0.34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90%" fo:text-align="left" style:tab-stop-distance="1in" fo:margin-left="0.46181in" fo:margin-right="0in" fo:text-indent="-0.3125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15%" fo:text-align="left" style:tab-stop-distance="1in" fo:margin-left="0.93056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left" style:tab-stop-distance="1in" fo:margin-left="0.14931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draw:fill="none" draw:stroke="solid" svg:stroke-width="0.01042in" svg:stroke-color="#000000" svg:stroke-opacity="100%" draw:stroke-linejoin="round" svg:stroke-linecap="butt"/>
    </style:style>
    <style:style style:family="presentation" style:name="a120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90%" fo:text-align="left" style:tab-stop-distance="1in" fo:margin-left="0.96181in" fo:margin-right="0in" fo:text-indent="-0.3125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3">
      <style:graphic-properties draw:fill="none" draw:stroke="solid" svg:stroke-width="0.01042in" svg:stroke-color="#000000" svg:stroke-opacity="100%" draw:stroke-linejoin="round" svg:stroke-linecap="butt"/>
    </style:style>
    <style:style style:family="drawing-page" style:name="a9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text:list-style style:name="a105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682">
      <text:list-level-style-bullet text:level="1" text:bullet-char="●">
        <style:list-level-properties text:space-before="0.59028in" text:min-label-width="0.34028in"/>
        <style:text-properties fo:color="#003c3b" fo:font-family="Arial" fo:font-size="0.18056in"/>
      </text:list-level-style-bullet>
      <text:list-level-style-bullet text:level="2" text:bullet-char="●">
        <style:list-level-properties text:space-before="1.09028in" text:min-label-width="0.34028in"/>
        <style:text-properties fo:color="#003c3b" fo:font-family="Arial" fo:font-size="0.18056in"/>
      </text:list-level-style-bullet>
      <text:list-level-style-bullet text:level="3" text:bullet-char="●">
        <style:list-level-properties text:space-before="1.59028in" text:min-label-width="0.34028in"/>
        <style:text-properties fo:color="#003c3b" fo:font-family="Arial" fo:font-size="0.18056in"/>
      </text:list-level-style-bullet>
      <text:list-level-style-bullet text:level="4" text:bullet-char="●">
        <style:list-level-properties text:space-before="2.09028in" text:min-label-width="0.34028in"/>
        <style:text-properties fo:color="#003c3b" fo:font-family="Arial" fo:font-size="0.18056in"/>
      </text:list-level-style-bullet>
      <text:list-level-style-bullet text:level="5" text:bullet-char="●">
        <style:list-level-properties text:space-before="2.59028in" text:min-label-width="0.34028in"/>
        <style:text-properties fo:color="#003c3b" fo:font-family="Arial" fo:font-size="0.18056in"/>
      </text:list-level-style-bullet>
      <text:list-level-style-bullet text:level="6" text:bullet-char="●">
        <style:list-level-properties text:space-before="3.09028in" text:min-label-width="0.34028in"/>
        <style:text-properties fo:color="#003c3b" fo:font-family="Arial" fo:font-size="0.18056in"/>
      </text:list-level-style-bullet>
      <text:list-level-style-bullet text:level="7" text:bullet-char="●">
        <style:list-level-properties text:space-before="3.59028in" text:min-label-width="0.34028in"/>
        <style:text-properties fo:color="#003c3b" fo:font-family="Arial" fo:font-size="0.18056in"/>
      </text:list-level-style-bullet>
      <text:list-level-style-bullet text:level="8" text:bullet-char="●">
        <style:list-level-properties text:space-before="4.09028in" text:min-label-width="0.34028in"/>
        <style:text-properties fo:color="#003c3b" fo:font-family="Arial" fo:font-size="0.18056in"/>
      </text:list-level-style-bullet>
      <text:list-level-style-bullet text:level="9" text:bullet-char="●">
        <style:list-level-properties text:space-before="4.59028in" text:min-label-width="0.34028in"/>
        <style:text-properties fo:color="#003c3b" fo:font-family="Arial" fo:font-size="0.18056in"/>
      </text:list-level-style-bullet>
    </text:list-style>
    <text:list-style style:name="a725">
      <text:list-level-style-bullet text:level="1" text:bullet-char="●">
        <style:list-level-properties text:space-before="0.14583in" text:min-label-width="0.35417in"/>
        <style:text-properties fo:color="#003c3b" fo:font-family="Arial" fo:font-size="0.20833in"/>
      </text:list-level-style-bullet>
      <text:list-level-style-bullet text:level="2" text:bullet-char="●">
        <style:list-level-properties text:space-before="0.64583in" text:min-label-width="0.35417in"/>
        <style:text-properties fo:color="#003c3b" fo:font-family="Arial" fo:font-size="0.20833in"/>
      </text:list-level-style-bullet>
      <text:list-level-style-bullet text:level="3" text:bullet-char="●">
        <style:list-level-properties text:space-before="1.14583in" text:min-label-width="0.35417in"/>
        <style:text-properties fo:color="#003c3b" fo:font-family="Arial" fo:font-size="0.20833in"/>
      </text:list-level-style-bullet>
      <text:list-level-style-bullet text:level="4" text:bullet-char="●">
        <style:list-level-properties text:space-before="1.64583in" text:min-label-width="0.35417in"/>
        <style:text-properties fo:color="#003c3b" fo:font-family="Arial" fo:font-size="0.20833in"/>
      </text:list-level-style-bullet>
      <text:list-level-style-bullet text:level="5" text:bullet-char="●">
        <style:list-level-properties text:space-before="2.14583in" text:min-label-width="0.35417in"/>
        <style:text-properties fo:color="#003c3b" fo:font-family="Arial" fo:font-size="0.20833in"/>
      </text:list-level-style-bullet>
      <text:list-level-style-bullet text:level="6" text:bullet-char="●">
        <style:list-level-properties text:space-before="2.64583in" text:min-label-width="0.35417in"/>
        <style:text-properties fo:color="#003c3b" fo:font-family="Arial" fo:font-size="0.20833in"/>
      </text:list-level-style-bullet>
      <text:list-level-style-bullet text:level="7" text:bullet-char="●">
        <style:list-level-properties text:space-before="3.14583in" text:min-label-width="0.35417in"/>
        <style:text-properties fo:color="#003c3b" fo:font-family="Arial" fo:font-size="0.20833in"/>
      </text:list-level-style-bullet>
      <text:list-level-style-bullet text:level="8" text:bullet-char="●">
        <style:list-level-properties text:space-before="3.64583in" text:min-label-width="0.35417in"/>
        <style:text-properties fo:color="#003c3b" fo:font-family="Arial" fo:font-size="0.20833in"/>
      </text:list-level-style-bullet>
      <text:list-level-style-bullet text:level="9" text:bullet-char="●">
        <style:list-level-properties text:space-before="4.14583in" text:min-label-width="0.35417in"/>
        <style:text-properties fo:color="#003c3b" fo:font-family="Arial" fo:font-size="0.20833in"/>
      </text:list-level-style-bullet>
    </text:list-style>
    <text:list-style style:name="a1202">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05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6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686">
      <text:list-level-style-bullet text:level="1" text:bullet-char="●">
        <style:list-level-properties text:space-before="0.59028in" text:min-label-width="0.34028in"/>
        <style:text-properties fo:color="#003c3b" fo:font-family="Arial" fo:font-size="0.18056in"/>
      </text:list-level-style-bullet>
      <text:list-level-style-bullet text:level="2" text:bullet-char="●">
        <style:list-level-properties text:space-before="1.09028in" text:min-label-width="0.34028in"/>
        <style:text-properties fo:color="#003c3b" fo:font-family="Arial" fo:font-size="0.18056in"/>
      </text:list-level-style-bullet>
      <text:list-level-style-bullet text:level="3" text:bullet-char="●">
        <style:list-level-properties text:space-before="1.59028in" text:min-label-width="0.34028in"/>
        <style:text-properties fo:color="#003c3b" fo:font-family="Arial" fo:font-size="0.18056in"/>
      </text:list-level-style-bullet>
      <text:list-level-style-bullet text:level="4" text:bullet-char="●">
        <style:list-level-properties text:space-before="2.09028in" text:min-label-width="0.34028in"/>
        <style:text-properties fo:color="#003c3b" fo:font-family="Arial" fo:font-size="0.18056in"/>
      </text:list-level-style-bullet>
      <text:list-level-style-bullet text:level="5" text:bullet-char="●">
        <style:list-level-properties text:space-before="2.59028in" text:min-label-width="0.34028in"/>
        <style:text-properties fo:color="#003c3b" fo:font-family="Arial" fo:font-size="0.18056in"/>
      </text:list-level-style-bullet>
      <text:list-level-style-bullet text:level="6" text:bullet-char="●">
        <style:list-level-properties text:space-before="3.09028in" text:min-label-width="0.34028in"/>
        <style:text-properties fo:color="#003c3b" fo:font-family="Arial" fo:font-size="0.18056in"/>
      </text:list-level-style-bullet>
      <text:list-level-style-bullet text:level="7" text:bullet-char="●">
        <style:list-level-properties text:space-before="3.59028in" text:min-label-width="0.34028in"/>
        <style:text-properties fo:color="#003c3b" fo:font-family="Arial" fo:font-size="0.18056in"/>
      </text:list-level-style-bullet>
      <text:list-level-style-bullet text:level="8" text:bullet-char="●">
        <style:list-level-properties text:space-before="4.09028in" text:min-label-width="0.34028in"/>
        <style:text-properties fo:color="#003c3b" fo:font-family="Arial" fo:font-size="0.18056in"/>
      </text:list-level-style-bullet>
      <text:list-level-style-bullet text:level="9" text:bullet-char="●">
        <style:list-level-properties text:space-before="4.59028in" text:min-label-width="0.34028in"/>
        <style:text-properties fo:color="#003c3b" fo:font-family="Arial" fo:font-size="0.18056in"/>
      </text:list-level-style-bullet>
    </text:list-style>
    <text:list-style style:name="a831">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05">
      <text:list-level-style-bullet text:level="1" text:bullet-char="o">
        <style:list-level-properties text:space-before="0.14931in" text:min-label-width="0.3125in"/>
        <style:text-properties fo:color="#003c3b" fo:font-family="Courier New" fo:font-size="0.20208in"/>
      </text:list-level-style-bullet>
      <text:list-level-style-bullet text:level="2" text:bullet-char="o">
        <style:list-level-properties text:space-before="0.64931in" text:min-label-width="0.3125in"/>
        <style:text-properties fo:color="#003c3b" fo:font-family="Courier New" fo:font-size="0.20208in"/>
      </text:list-level-style-bullet>
      <text:list-level-style-bullet text:level="3" text:bullet-char="o">
        <style:list-level-properties text:space-before="1.14931in" text:min-label-width="0.3125in"/>
        <style:text-properties fo:color="#003c3b" fo:font-family="Courier New" fo:font-size="0.20208in"/>
      </text:list-level-style-bullet>
      <text:list-level-style-bullet text:level="4" text:bullet-char="o">
        <style:list-level-properties text:space-before="1.64931in" text:min-label-width="0.3125in"/>
        <style:text-properties fo:color="#003c3b" fo:font-family="Courier New" fo:font-size="0.20208in"/>
      </text:list-level-style-bullet>
      <text:list-level-style-bullet text:level="5" text:bullet-char="o">
        <style:list-level-properties text:space-before="2.14931in" text:min-label-width="0.3125in"/>
        <style:text-properties fo:color="#003c3b" fo:font-family="Courier New" fo:font-size="0.20208in"/>
      </text:list-level-style-bullet>
      <text:list-level-style-bullet text:level="6" text:bullet-char="o">
        <style:list-level-properties text:space-before="2.64931in" text:min-label-width="0.3125in"/>
        <style:text-properties fo:color="#003c3b" fo:font-family="Courier New" fo:font-size="0.20208in"/>
      </text:list-level-style-bullet>
      <text:list-level-style-bullet text:level="7" text:bullet-char="o">
        <style:list-level-properties text:space-before="3.14931in" text:min-label-width="0.3125in"/>
        <style:text-properties fo:color="#003c3b" fo:font-family="Courier New" fo:font-size="0.20208in"/>
      </text:list-level-style-bullet>
      <text:list-level-style-bullet text:level="8" text:bullet-char="o">
        <style:list-level-properties text:space-before="3.64931in" text:min-label-width="0.3125in"/>
        <style:text-properties fo:color="#003c3b" fo:font-family="Courier New" fo:font-size="0.20208in"/>
      </text:list-level-style-bullet>
      <text:list-level-style-bullet text:level="9" text:bullet-char="o">
        <style:list-level-properties text:space-before="4.14931in" text:min-label-width="0.3125in"/>
        <style:text-properties fo:color="#003c3b" fo:font-family="Courier New" fo:font-size="0.20208in"/>
      </text:list-level-style-bullet>
    </text:list-style>
    <text:list-style style:name="a790">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729">
      <text:list-level-style-bullet text:level="1" text:bullet-char="●">
        <style:list-level-properties text:space-before="0.14583in" text:min-label-width="0.35417in"/>
        <style:text-properties fo:color="#003c3b" fo:font-family="Arial" fo:font-size="0.20833in"/>
      </text:list-level-style-bullet>
      <text:list-level-style-bullet text:level="2" text:bullet-char="●">
        <style:list-level-properties text:space-before="0.64583in" text:min-label-width="0.35417in"/>
        <style:text-properties fo:color="#003c3b" fo:font-family="Arial" fo:font-size="0.20833in"/>
      </text:list-level-style-bullet>
      <text:list-level-style-bullet text:level="3" text:bullet-char="●">
        <style:list-level-properties text:space-before="1.14583in" text:min-label-width="0.35417in"/>
        <style:text-properties fo:color="#003c3b" fo:font-family="Arial" fo:font-size="0.20833in"/>
      </text:list-level-style-bullet>
      <text:list-level-style-bullet text:level="4" text:bullet-char="●">
        <style:list-level-properties text:space-before="1.64583in" text:min-label-width="0.35417in"/>
        <style:text-properties fo:color="#003c3b" fo:font-family="Arial" fo:font-size="0.20833in"/>
      </text:list-level-style-bullet>
      <text:list-level-style-bullet text:level="5" text:bullet-char="●">
        <style:list-level-properties text:space-before="2.14583in" text:min-label-width="0.35417in"/>
        <style:text-properties fo:color="#003c3b" fo:font-family="Arial" fo:font-size="0.20833in"/>
      </text:list-level-style-bullet>
      <text:list-level-style-bullet text:level="6" text:bullet-char="●">
        <style:list-level-properties text:space-before="2.64583in" text:min-label-width="0.35417in"/>
        <style:text-properties fo:color="#003c3b" fo:font-family="Arial" fo:font-size="0.20833in"/>
      </text:list-level-style-bullet>
      <text:list-level-style-bullet text:level="7" text:bullet-char="●">
        <style:list-level-properties text:space-before="3.14583in" text:min-label-width="0.35417in"/>
        <style:text-properties fo:color="#003c3b" fo:font-family="Arial" fo:font-size="0.20833in"/>
      </text:list-level-style-bullet>
      <text:list-level-style-bullet text:level="8" text:bullet-char="●">
        <style:list-level-properties text:space-before="3.64583in" text:min-label-width="0.35417in"/>
        <style:text-properties fo:color="#003c3b" fo:font-family="Arial" fo:font-size="0.20833in"/>
      </text:list-level-style-bullet>
      <text:list-level-style-bullet text:level="9" text:bullet-char="●">
        <style:list-level-properties text:space-before="4.14583in" text:min-label-width="0.35417in"/>
        <style:text-properties fo:color="#003c3b" fo:font-family="Arial" fo:font-size="0.20833in"/>
      </text:list-level-style-bullet>
    </text:list-style>
    <text:list-style style:name="a120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1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94">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835">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7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41">
      <text:list-level-style-bullet text:level="1" text:bullet-char="-">
        <style:list-level-properties text:space-before="0in" text:min-label-width="0.3125in"/>
        <style:text-properties fo:color="#003c3b" fo:font-family="Calibri" fo:font-size="0.20208in"/>
      </text:list-level-style-bullet>
      <text:list-level-style-bullet text:level="2" text:bullet-char="-">
        <style:list-level-properties text:space-before="0.5in" text:min-label-width="0.3125in"/>
        <style:text-properties fo:color="#003c3b" fo:font-family="Calibri" fo:font-size="0.20208in"/>
      </text:list-level-style-bullet>
      <text:list-level-style-bullet text:level="3" text:bullet-char="-">
        <style:list-level-properties text:space-before="1in" text:min-label-width="0.3125in"/>
        <style:text-properties fo:color="#003c3b" fo:font-family="Calibri" fo:font-size="0.20208in"/>
      </text:list-level-style-bullet>
      <text:list-level-style-bullet text:level="4" text:bullet-char="-">
        <style:list-level-properties text:space-before="1.5in" text:min-label-width="0.3125in"/>
        <style:text-properties fo:color="#003c3b" fo:font-family="Calibri" fo:font-size="0.20208in"/>
      </text:list-level-style-bullet>
      <text:list-level-style-bullet text:level="5" text:bullet-char="-">
        <style:list-level-properties text:space-before="2in" text:min-label-width="0.3125in"/>
        <style:text-properties fo:color="#003c3b" fo:font-family="Calibri" fo:font-size="0.20208in"/>
      </text:list-level-style-bullet>
      <text:list-level-style-bullet text:level="6" text:bullet-char="-">
        <style:list-level-properties text:space-before="2.5in" text:min-label-width="0.3125in"/>
        <style:text-properties fo:color="#003c3b" fo:font-family="Calibri" fo:font-size="0.20208in"/>
      </text:list-level-style-bullet>
      <text:list-level-style-bullet text:level="7" text:bullet-char="-">
        <style:list-level-properties text:space-before="3in" text:min-label-width="0.3125in"/>
        <style:text-properties fo:color="#003c3b" fo:font-family="Calibri" fo:font-size="0.20208in"/>
      </text:list-level-style-bullet>
      <text:list-level-style-bullet text:level="8" text:bullet-char="-">
        <style:list-level-properties text:space-before="3.5in" text:min-label-width="0.3125in"/>
        <style:text-properties fo:color="#003c3b" fo:font-family="Calibri" fo:font-size="0.20208in"/>
      </text:list-level-style-bullet>
      <text:list-level-style-bullet text:level="9" text:bullet-char="-">
        <style:list-level-properties text:space-before="4in" text:min-label-width="0.3125in"/>
        <style:text-properties fo:color="#003c3b" fo:font-family="Calibri" fo:font-size="0.20208in"/>
      </text:list-level-style-bullet>
    </text:list-style>
    <text:list-style style:name="a131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839">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79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44">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31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38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48">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386">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101">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625">
      <text:list-level-style-bullet text:level="1" text:bullet-char="●">
        <style:list-level-properties text:space-before="0.13889in" text:min-label-width="0.36111in"/>
        <style:text-properties fo:color="#003c3b" fo:font-family="Outfit" fo:font-size="0.22222in"/>
      </text:list-level-style-bullet>
      <text:list-level-style-bullet text:level="2" text:bullet-char="●">
        <style:list-level-properties text:space-before="0.13889in" text:min-label-width="0.36111in"/>
        <style:text-properties fo:color="#003c3b" fo:font-family="Outfit" fo:font-size="0.22222in"/>
      </text:list-level-style-bullet>
      <text:list-level-style-bullet text:level="3" text:bullet-char="●">
        <style:list-level-properties text:space-before="0.13889in" text:min-label-width="0.36111in"/>
        <style:text-properties fo:color="#003c3b" fo:font-family="Outfit" fo:font-size="0.22222in"/>
      </text:list-level-style-bullet>
      <text:list-level-style-bullet text:level="4" text:bullet-char="●">
        <style:list-level-properties text:space-before="0.13889in" text:min-label-width="0.36111in"/>
        <style:text-properties fo:color="#003c3b" fo:font-family="Outfit" fo:font-size="0.22222in"/>
      </text:list-level-style-bullet>
      <text:list-level-style-bullet text:level="5" text:bullet-char="●">
        <style:list-level-properties text:space-before="0.13889in" text:min-label-width="0.36111in"/>
        <style:text-properties fo:color="#003c3b" fo:font-family="Outfit" fo:font-size="0.22222in"/>
      </text:list-level-style-bullet>
      <text:list-level-style-bullet text:level="6" text:bullet-char="●">
        <style:list-level-properties text:space-before="0.13889in" text:min-label-width="0.36111in"/>
        <style:text-properties fo:color="#003c3b" fo:font-family="Outfit" fo:font-size="0.22222in"/>
      </text:list-level-style-bullet>
      <text:list-level-style-bullet text:level="7" text:bullet-char="●">
        <style:list-level-properties text:space-before="0.13889in" text:min-label-width="0.36111in"/>
        <style:text-properties fo:color="#003c3b" fo:font-family="Outfit" fo:font-size="0.22222in"/>
      </text:list-level-style-bullet>
      <text:list-level-style-bullet text:level="8" text:bullet-char="●">
        <style:list-level-properties text:space-before="0.13889in" text:min-label-width="0.36111in"/>
        <style:text-properties fo:color="#003c3b" fo:font-family="Outfit" fo:font-size="0.22222in"/>
      </text:list-level-style-bullet>
      <text:list-level-style-bullet text:level="9" text:bullet-char="●">
        <style:list-level-properties text:space-before="0.13889in" text:min-label-width="0.36111in"/>
        <style:text-properties fo:color="#003c3b" fo:font-family="Outfit" fo:font-size="0.22222in"/>
      </text:list-level-style-bullet>
    </text:list-style>
    <text:list-style style:name="a106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04">
      <text:list-level-style-bullet text:level="1" text:bullet-char="-">
        <style:list-level-properties text:space-before="0.12361in" text:min-label-width="0.3125in"/>
        <style:text-properties fo:color="#003c3b" fo:font-family="Calibri" fo:font-size="0.17681in"/>
      </text:list-level-style-bullet>
      <text:list-level-style-bullet text:level="2" text:bullet-char="-">
        <style:list-level-properties text:space-before="0.62361in" text:min-label-width="0.3125in"/>
        <style:text-properties fo:color="#003c3b" fo:font-family="Calibri" fo:font-size="0.17681in"/>
      </text:list-level-style-bullet>
      <text:list-level-style-bullet text:level="3" text:bullet-char="-">
        <style:list-level-properties text:space-before="1.12361in" text:min-label-width="0.3125in"/>
        <style:text-properties fo:color="#003c3b" fo:font-family="Calibri" fo:font-size="0.17681in"/>
      </text:list-level-style-bullet>
      <text:list-level-style-bullet text:level="4" text:bullet-char="-">
        <style:list-level-properties text:space-before="1.62361in" text:min-label-width="0.3125in"/>
        <style:text-properties fo:color="#003c3b" fo:font-family="Calibri" fo:font-size="0.17681in"/>
      </text:list-level-style-bullet>
      <text:list-level-style-bullet text:level="5" text:bullet-char="-">
        <style:list-level-properties text:space-before="2.12361in" text:min-label-width="0.3125in"/>
        <style:text-properties fo:color="#003c3b" fo:font-family="Calibri" fo:font-size="0.17681in"/>
      </text:list-level-style-bullet>
      <text:list-level-style-bullet text:level="6" text:bullet-char="-">
        <style:list-level-properties text:space-before="2.62361in" text:min-label-width="0.3125in"/>
        <style:text-properties fo:color="#003c3b" fo:font-family="Calibri" fo:font-size="0.17681in"/>
      </text:list-level-style-bullet>
      <text:list-level-style-bullet text:level="7" text:bullet-char="-">
        <style:list-level-properties text:space-before="3.12361in" text:min-label-width="0.3125in"/>
        <style:text-properties fo:color="#003c3b" fo:font-family="Calibri" fo:font-size="0.17681in"/>
      </text:list-level-style-bullet>
      <text:list-level-style-bullet text:level="8" text:bullet-char="-">
        <style:list-level-properties text:space-before="3.62361in" text:min-label-width="0.3125in"/>
        <style:text-properties fo:color="#003c3b" fo:font-family="Calibri" fo:font-size="0.17681in"/>
      </text:list-level-style-bullet>
      <text:list-level-style-bullet text:level="9" text:bullet-char="-">
        <style:list-level-properties text:space-before="4.12361in" text:min-label-width="0.3125in"/>
        <style:text-properties fo:color="#003c3b" fo:font-family="Calibri" fo:font-size="0.17681in"/>
      </text:list-level-style-bullet>
    </text:list-style>
    <text:list-style style:name="a690">
      <text:list-level-style-bullet text:level="1" text:bullet-char="●">
        <style:list-level-properties text:space-before="0.59028in" text:min-label-width="0.34028in"/>
        <style:text-properties fo:color="#003c3b" fo:font-family="Arial" fo:font-size="0.18056in"/>
      </text:list-level-style-bullet>
      <text:list-level-style-bullet text:level="2" text:bullet-char="●">
        <style:list-level-properties text:space-before="1.09028in" text:min-label-width="0.34028in"/>
        <style:text-properties fo:color="#003c3b" fo:font-family="Arial" fo:font-size="0.18056in"/>
      </text:list-level-style-bullet>
      <text:list-level-style-bullet text:level="3" text:bullet-char="●">
        <style:list-level-properties text:space-before="1.59028in" text:min-label-width="0.34028in"/>
        <style:text-properties fo:color="#003c3b" fo:font-family="Arial" fo:font-size="0.18056in"/>
      </text:list-level-style-bullet>
      <text:list-level-style-bullet text:level="4" text:bullet-char="●">
        <style:list-level-properties text:space-before="2.09028in" text:min-label-width="0.34028in"/>
        <style:text-properties fo:color="#003c3b" fo:font-family="Arial" fo:font-size="0.18056in"/>
      </text:list-level-style-bullet>
      <text:list-level-style-bullet text:level="5" text:bullet-char="●">
        <style:list-level-properties text:space-before="2.59028in" text:min-label-width="0.34028in"/>
        <style:text-properties fo:color="#003c3b" fo:font-family="Arial" fo:font-size="0.18056in"/>
      </text:list-level-style-bullet>
      <text:list-level-style-bullet text:level="6" text:bullet-char="●">
        <style:list-level-properties text:space-before="3.09028in" text:min-label-width="0.34028in"/>
        <style:text-properties fo:color="#003c3b" fo:font-family="Arial" fo:font-size="0.18056in"/>
      </text:list-level-style-bullet>
      <text:list-level-style-bullet text:level="7" text:bullet-char="●">
        <style:list-level-properties text:space-before="3.59028in" text:min-label-width="0.34028in"/>
        <style:text-properties fo:color="#003c3b" fo:font-family="Arial" fo:font-size="0.18056in"/>
      </text:list-level-style-bullet>
      <text:list-level-style-bullet text:level="8" text:bullet-char="●">
        <style:list-level-properties text:space-before="4.09028in" text:min-label-width="0.34028in"/>
        <style:text-properties fo:color="#003c3b" fo:font-family="Arial" fo:font-size="0.18056in"/>
      </text:list-level-style-bullet>
      <text:list-level-style-bullet text:level="9" text:bullet-char="●">
        <style:list-level-properties text:space-before="4.59028in" text:min-label-width="0.34028in"/>
        <style:text-properties fo:color="#003c3b" fo:font-family="Arial" fo:font-size="0.18056in"/>
      </text:list-level-style-bullet>
    </text:list-style>
    <text:list-style style:name="a106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33">
      <text:list-level-style-bullet text:level="1" text:bullet-char="●">
        <style:list-level-properties text:space-before="0.14583in" text:min-label-width="0.35417in"/>
        <style:text-properties fo:color="#003c3b" fo:font-family="Arial" fo:font-size="0.20833in"/>
      </text:list-level-style-bullet>
      <text:list-level-style-bullet text:level="2" text:bullet-char="●">
        <style:list-level-properties text:space-before="0.64583in" text:min-label-width="0.35417in"/>
        <style:text-properties fo:color="#003c3b" fo:font-family="Arial" fo:font-size="0.20833in"/>
      </text:list-level-style-bullet>
      <text:list-level-style-bullet text:level="3" text:bullet-char="●">
        <style:list-level-properties text:space-before="1.14583in" text:min-label-width="0.35417in"/>
        <style:text-properties fo:color="#003c3b" fo:font-family="Arial" fo:font-size="0.20833in"/>
      </text:list-level-style-bullet>
      <text:list-level-style-bullet text:level="4" text:bullet-char="●">
        <style:list-level-properties text:space-before="1.64583in" text:min-label-width="0.35417in"/>
        <style:text-properties fo:color="#003c3b" fo:font-family="Arial" fo:font-size="0.20833in"/>
      </text:list-level-style-bullet>
      <text:list-level-style-bullet text:level="5" text:bullet-char="●">
        <style:list-level-properties text:space-before="2.14583in" text:min-label-width="0.35417in"/>
        <style:text-properties fo:color="#003c3b" fo:font-family="Arial" fo:font-size="0.20833in"/>
      </text:list-level-style-bullet>
      <text:list-level-style-bullet text:level="6" text:bullet-char="●">
        <style:list-level-properties text:space-before="2.64583in" text:min-label-width="0.35417in"/>
        <style:text-properties fo:color="#003c3b" fo:font-family="Arial" fo:font-size="0.20833in"/>
      </text:list-level-style-bullet>
      <text:list-level-style-bullet text:level="7" text:bullet-char="●">
        <style:list-level-properties text:space-before="3.14583in" text:min-label-width="0.35417in"/>
        <style:text-properties fo:color="#003c3b" fo:font-family="Arial" fo:font-size="0.20833in"/>
      </text:list-level-style-bullet>
      <text:list-level-style-bullet text:level="8" text:bullet-char="●">
        <style:list-level-properties text:space-before="3.64583in" text:min-label-width="0.35417in"/>
        <style:text-properties fo:color="#003c3b" fo:font-family="Arial" fo:font-size="0.20833in"/>
      </text:list-level-style-bullet>
      <text:list-level-style-bullet text:level="9" text:bullet-char="●">
        <style:list-level-properties text:space-before="4.14583in" text:min-label-width="0.35417in"/>
        <style:text-properties fo:color="#003c3b" fo:font-family="Arial" fo:font-size="0.20833in"/>
      </text:list-level-style-bullet>
    </text:list-style>
    <text:list-style style:name="a1108">
      <text:list-level-style-bullet text:level="1" text:bullet-char="-">
        <style:list-level-properties text:space-before="0.12361in" text:min-label-width="0.3125in"/>
        <style:text-properties fo:color="#003c3b" fo:font-family="Calibri" fo:font-size="0.17681in"/>
      </text:list-level-style-bullet>
      <text:list-level-style-bullet text:level="2" text:bullet-char="-">
        <style:list-level-properties text:space-before="0.62361in" text:min-label-width="0.3125in"/>
        <style:text-properties fo:color="#003c3b" fo:font-family="Calibri" fo:font-size="0.17681in"/>
      </text:list-level-style-bullet>
      <text:list-level-style-bullet text:level="3" text:bullet-char="-">
        <style:list-level-properties text:space-before="1.12361in" text:min-label-width="0.3125in"/>
        <style:text-properties fo:color="#003c3b" fo:font-family="Calibri" fo:font-size="0.17681in"/>
      </text:list-level-style-bullet>
      <text:list-level-style-bullet text:level="4" text:bullet-char="-">
        <style:list-level-properties text:space-before="1.62361in" text:min-label-width="0.3125in"/>
        <style:text-properties fo:color="#003c3b" fo:font-family="Calibri" fo:font-size="0.17681in"/>
      </text:list-level-style-bullet>
      <text:list-level-style-bullet text:level="5" text:bullet-char="-">
        <style:list-level-properties text:space-before="2.12361in" text:min-label-width="0.3125in"/>
        <style:text-properties fo:color="#003c3b" fo:font-family="Calibri" fo:font-size="0.17681in"/>
      </text:list-level-style-bullet>
      <text:list-level-style-bullet text:level="6" text:bullet-char="-">
        <style:list-level-properties text:space-before="2.62361in" text:min-label-width="0.3125in"/>
        <style:text-properties fo:color="#003c3b" fo:font-family="Calibri" fo:font-size="0.17681in"/>
      </text:list-level-style-bullet>
      <text:list-level-style-bullet text:level="7" text:bullet-char="-">
        <style:list-level-properties text:space-before="3.12361in" text:min-label-width="0.3125in"/>
        <style:text-properties fo:color="#003c3b" fo:font-family="Calibri" fo:font-size="0.17681in"/>
      </text:list-level-style-bullet>
      <text:list-level-style-bullet text:level="8" text:bullet-char="-">
        <style:list-level-properties text:space-before="3.62361in" text:min-label-width="0.3125in"/>
        <style:text-properties fo:color="#003c3b" fo:font-family="Calibri" fo:font-size="0.17681in"/>
      </text:list-level-style-bullet>
      <text:list-level-style-bullet text:level="9" text:bullet-char="-">
        <style:list-level-properties text:space-before="4.12361in" text:min-label-width="0.3125in"/>
        <style:text-properties fo:color="#003c3b" fo:font-family="Calibri" fo:font-size="0.17681in"/>
      </text:list-level-style-bullet>
    </text:list-style>
    <text:list-style style:name="a694">
      <text:list-level-style-bullet text:level="1" text:bullet-char="●">
        <style:list-level-properties text:space-before="0.59028in" text:min-label-width="0.34028in"/>
        <style:text-properties fo:color="#003c3b" fo:font-family="Arial" fo:font-size="0.18056in"/>
      </text:list-level-style-bullet>
      <text:list-level-style-bullet text:level="2" text:bullet-char="●">
        <style:list-level-properties text:space-before="1.09028in" text:min-label-width="0.34028in"/>
        <style:text-properties fo:color="#003c3b" fo:font-family="Arial" fo:font-size="0.18056in"/>
      </text:list-level-style-bullet>
      <text:list-level-style-bullet text:level="3" text:bullet-char="●">
        <style:list-level-properties text:space-before="1.59028in" text:min-label-width="0.34028in"/>
        <style:text-properties fo:color="#003c3b" fo:font-family="Arial" fo:font-size="0.18056in"/>
      </text:list-level-style-bullet>
      <text:list-level-style-bullet text:level="4" text:bullet-char="●">
        <style:list-level-properties text:space-before="2.09028in" text:min-label-width="0.34028in"/>
        <style:text-properties fo:color="#003c3b" fo:font-family="Arial" fo:font-size="0.18056in"/>
      </text:list-level-style-bullet>
      <text:list-level-style-bullet text:level="5" text:bullet-char="●">
        <style:list-level-properties text:space-before="2.59028in" text:min-label-width="0.34028in"/>
        <style:text-properties fo:color="#003c3b" fo:font-family="Arial" fo:font-size="0.18056in"/>
      </text:list-level-style-bullet>
      <text:list-level-style-bullet text:level="6" text:bullet-char="●">
        <style:list-level-properties text:space-before="3.09028in" text:min-label-width="0.34028in"/>
        <style:text-properties fo:color="#003c3b" fo:font-family="Arial" fo:font-size="0.18056in"/>
      </text:list-level-style-bullet>
      <text:list-level-style-bullet text:level="7" text:bullet-char="●">
        <style:list-level-properties text:space-before="3.59028in" text:min-label-width="0.34028in"/>
        <style:text-properties fo:color="#003c3b" fo:font-family="Arial" fo:font-size="0.18056in"/>
      </text:list-level-style-bullet>
      <text:list-level-style-bullet text:level="8" text:bullet-char="●">
        <style:list-level-properties text:space-before="4.09028in" text:min-label-width="0.34028in"/>
        <style:text-properties fo:color="#003c3b" fo:font-family="Arial" fo:font-size="0.18056in"/>
      </text:list-level-style-bullet>
      <text:list-level-style-bullet text:level="9" text:bullet-char="●">
        <style:list-level-properties text:space-before="4.59028in" text:min-label-width="0.34028in"/>
        <style:text-properties fo:color="#003c3b" fo:font-family="Arial" fo:font-size="0.18056in"/>
      </text:list-level-style-bullet>
    </text:list-style>
    <text:list-style style:name="a1172">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069">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78">
      <text:list-level-style-bullet text:level="1" text:bullet-char="o">
        <style:list-level-properties text:space-before="0.14931in" text:min-label-width="0.3125in"/>
        <style:text-properties fo:color="#003c3b" fo:font-family="Courier New" fo:font-size="0.20208in"/>
      </text:list-level-style-bullet>
      <text:list-level-style-bullet text:level="2" text:bullet-char="o">
        <style:list-level-properties text:space-before="0.64931in" text:min-label-width="0.3125in"/>
        <style:text-properties fo:color="#003c3b" fo:font-family="Courier New" fo:font-size="0.20208in"/>
      </text:list-level-style-bullet>
      <text:list-level-style-bullet text:level="3" text:bullet-char="o">
        <style:list-level-properties text:space-before="1.14931in" text:min-label-width="0.3125in"/>
        <style:text-properties fo:color="#003c3b" fo:font-family="Courier New" fo:font-size="0.20208in"/>
      </text:list-level-style-bullet>
      <text:list-level-style-bullet text:level="4" text:bullet-char="o">
        <style:list-level-properties text:space-before="1.64931in" text:min-label-width="0.3125in"/>
        <style:text-properties fo:color="#003c3b" fo:font-family="Courier New" fo:font-size="0.20208in"/>
      </text:list-level-style-bullet>
      <text:list-level-style-bullet text:level="5" text:bullet-char="o">
        <style:list-level-properties text:space-before="2.14931in" text:min-label-width="0.3125in"/>
        <style:text-properties fo:color="#003c3b" fo:font-family="Courier New" fo:font-size="0.20208in"/>
      </text:list-level-style-bullet>
      <text:list-level-style-bullet text:level="6" text:bullet-char="o">
        <style:list-level-properties text:space-before="2.64931in" text:min-label-width="0.3125in"/>
        <style:text-properties fo:color="#003c3b" fo:font-family="Courier New" fo:font-size="0.20208in"/>
      </text:list-level-style-bullet>
      <text:list-level-style-bullet text:level="7" text:bullet-char="o">
        <style:list-level-properties text:space-before="3.14931in" text:min-label-width="0.3125in"/>
        <style:text-properties fo:color="#003c3b" fo:font-family="Courier New" fo:font-size="0.20208in"/>
      </text:list-level-style-bullet>
      <text:list-level-style-bullet text:level="8" text:bullet-char="o">
        <style:list-level-properties text:space-before="3.64931in" text:min-label-width="0.3125in"/>
        <style:text-properties fo:color="#003c3b" fo:font-family="Courier New" fo:font-size="0.20208in"/>
      </text:list-level-style-bullet>
      <text:list-level-style-bullet text:level="9" text:bullet-char="o">
        <style:list-level-properties text:space-before="4.14931in" text:min-label-width="0.3125in"/>
        <style:text-properties fo:color="#003c3b" fo:font-family="Courier New" fo:font-size="0.20208in"/>
      </text:list-level-style-bullet>
    </text:list-style>
    <text:list-style style:name="a845">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323">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8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84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52">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327">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390">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55">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394">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58">
      <text:list-level-style-bullet text:level="1" text:bullet-char="-">
        <style:list-level-properties text:space-before="0in" text:min-label-width="0.35069in"/>
        <style:text-properties fo:color="#003c3b" fo:font-family="Calibri" fo:font-size="0.20208in"/>
      </text:list-level-style-bullet>
      <text:list-level-style-bullet text:level="2" text:bullet-char="-">
        <style:list-level-properties text:space-before="0.46181in" text:min-label-width="0.35069in"/>
        <style:text-properties fo:color="#003c3b" fo:font-family="Calibri" fo:font-size="0.20208in"/>
      </text:list-level-style-bullet>
      <text:list-level-style-bullet text:level="3" text:bullet-char="-">
        <style:list-level-properties text:space-before="0.96181in" text:min-label-width="0.35069in"/>
        <style:text-properties fo:color="#003c3b" fo:font-family="Calibri" fo:font-size="0.20208in"/>
      </text:list-level-style-bullet>
      <text:list-level-style-bullet text:level="4" text:bullet-char="-">
        <style:list-level-properties text:space-before="1.46181in" text:min-label-width="0.35069in"/>
        <style:text-properties fo:color="#003c3b" fo:font-family="Calibri" fo:font-size="0.20208in"/>
      </text:list-level-style-bullet>
      <text:list-level-style-bullet text:level="5" text:bullet-char="-">
        <style:list-level-properties text:space-before="1.96181in" text:min-label-width="0.35069in"/>
        <style:text-properties fo:color="#003c3b" fo:font-family="Calibri" fo:font-size="0.20208in"/>
      </text:list-level-style-bullet>
      <text:list-level-style-bullet text:level="6" text:bullet-char="-">
        <style:list-level-properties text:space-before="2.46181in" text:min-label-width="0.35069in"/>
        <style:text-properties fo:color="#003c3b" fo:font-family="Calibri" fo:font-size="0.20208in"/>
      </text:list-level-style-bullet>
      <text:list-level-style-bullet text:level="7" text:bullet-char="-">
        <style:list-level-properties text:space-before="2.96181in" text:min-label-width="0.35069in"/>
        <style:text-properties fo:color="#003c3b" fo:font-family="Calibri" fo:font-size="0.20208in"/>
      </text:list-level-style-bullet>
      <text:list-level-style-bullet text:level="8" text:bullet-char="-">
        <style:list-level-properties text:space-before="3.46181in" text:min-label-width="0.35069in"/>
        <style:text-properties fo:color="#003c3b" fo:font-family="Calibri" fo:font-size="0.20208in"/>
      </text:list-level-style-bullet>
      <text:list-level-style-bullet text:level="9" text:bullet-char="-">
        <style:list-level-properties text:space-before="3.96181in" text:min-label-width="0.35069in"/>
        <style:text-properties fo:color="#003c3b" fo:font-family="Calibri" fo:font-size="0.20208in"/>
      </text:list-level-style-bullet>
    </text:list-style>
    <text:list-style style:name="a1003">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9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007">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112">
      <text:list-level-style-bullet text:level="1" text:bullet-char="-">
        <style:list-level-properties text:space-before="0.12361in" text:min-label-width="0.3125in"/>
        <style:text-properties fo:color="#003c3b" fo:font-family="Calibri" fo:font-size="0.20208in"/>
      </text:list-level-style-bullet>
      <text:list-level-style-bullet text:level="2" text:bullet-char="-">
        <style:list-level-properties text:space-before="0.62361in" text:min-label-width="0.3125in"/>
        <style:text-properties fo:color="#003c3b" fo:font-family="Calibri" fo:font-size="0.20208in"/>
      </text:list-level-style-bullet>
      <text:list-level-style-bullet text:level="3" text:bullet-char="-">
        <style:list-level-properties text:space-before="1.12361in" text:min-label-width="0.3125in"/>
        <style:text-properties fo:color="#003c3b" fo:font-family="Calibri" fo:font-size="0.20208in"/>
      </text:list-level-style-bullet>
      <text:list-level-style-bullet text:level="4" text:bullet-char="-">
        <style:list-level-properties text:space-before="1.62361in" text:min-label-width="0.3125in"/>
        <style:text-properties fo:color="#003c3b" fo:font-family="Calibri" fo:font-size="0.20208in"/>
      </text:list-level-style-bullet>
      <text:list-level-style-bullet text:level="5" text:bullet-char="-">
        <style:list-level-properties text:space-before="2.12361in" text:min-label-width="0.3125in"/>
        <style:text-properties fo:color="#003c3b" fo:font-family="Calibri" fo:font-size="0.20208in"/>
      </text:list-level-style-bullet>
      <text:list-level-style-bullet text:level="6" text:bullet-char="-">
        <style:list-level-properties text:space-before="2.62361in" text:min-label-width="0.3125in"/>
        <style:text-properties fo:color="#003c3b" fo:font-family="Calibri" fo:font-size="0.20208in"/>
      </text:list-level-style-bullet>
      <text:list-level-style-bullet text:level="7" text:bullet-char="-">
        <style:list-level-properties text:space-before="3.12361in" text:min-label-width="0.3125in"/>
        <style:text-properties fo:color="#003c3b" fo:font-family="Calibri" fo:font-size="0.20208in"/>
      </text:list-level-style-bullet>
      <text:list-level-style-bullet text:level="8" text:bullet-char="-">
        <style:list-level-properties text:space-before="3.62361in" text:min-label-width="0.3125in"/>
        <style:text-properties fo:color="#003c3b" fo:font-family="Calibri" fo:font-size="0.20208in"/>
      </text:list-level-style-bullet>
      <text:list-level-style-bullet text:level="9" text:bullet-char="-">
        <style:list-level-properties text:space-before="4.12361in" text:min-label-width="0.3125in"/>
        <style:text-properties fo:color="#003c3b" fo:font-family="Calibri" fo:font-size="0.20208in"/>
      </text:list-level-style-bullet>
    </text:list-style>
    <text:list-style style:name="a636">
      <text:list-level-style-bullet text:level="1" text:bullet-char="●">
        <style:list-level-properties text:space-before="0.13889in" text:min-label-width="0.36111in"/>
        <style:text-properties fo:color="#003c3b" fo:font-family="Outfit" fo:font-size="0.22222in"/>
      </text:list-level-style-bullet>
      <text:list-level-style-bullet text:level="2" text:bullet-char="●">
        <style:list-level-properties text:space-before="0.13889in" text:min-label-width="0.36111in"/>
        <style:text-properties fo:color="#003c3b" fo:font-family="Outfit" fo:font-size="0.22222in"/>
      </text:list-level-style-bullet>
      <text:list-level-style-bullet text:level="3" text:bullet-char="●">
        <style:list-level-properties text:space-before="0.13889in" text:min-label-width="0.36111in"/>
        <style:text-properties fo:color="#003c3b" fo:font-family="Outfit" fo:font-size="0.22222in"/>
      </text:list-level-style-bullet>
      <text:list-level-style-bullet text:level="4" text:bullet-char="●">
        <style:list-level-properties text:space-before="0.13889in" text:min-label-width="0.36111in"/>
        <style:text-properties fo:color="#003c3b" fo:font-family="Outfit" fo:font-size="0.22222in"/>
      </text:list-level-style-bullet>
      <text:list-level-style-bullet text:level="5" text:bullet-char="●">
        <style:list-level-properties text:space-before="0.13889in" text:min-label-width="0.36111in"/>
        <style:text-properties fo:color="#003c3b" fo:font-family="Outfit" fo:font-size="0.22222in"/>
      </text:list-level-style-bullet>
      <text:list-level-style-bullet text:level="6" text:bullet-char="●">
        <style:list-level-properties text:space-before="0.13889in" text:min-label-width="0.36111in"/>
        <style:text-properties fo:color="#003c3b" fo:font-family="Outfit" fo:font-size="0.22222in"/>
      </text:list-level-style-bullet>
      <text:list-level-style-bullet text:level="7" text:bullet-char="●">
        <style:list-level-properties text:space-before="0.13889in" text:min-label-width="0.36111in"/>
        <style:text-properties fo:color="#003c3b" fo:font-family="Outfit" fo:font-size="0.22222in"/>
      </text:list-level-style-bullet>
      <text:list-level-style-bullet text:level="8" text:bullet-char="●">
        <style:list-level-properties text:space-before="0.13889in" text:min-label-width="0.36111in"/>
        <style:text-properties fo:color="#003c3b" fo:font-family="Outfit" fo:font-size="0.22222in"/>
      </text:list-level-style-bullet>
      <text:list-level-style-bullet text:level="9" text:bullet-char="●">
        <style:list-level-properties text:space-before="0.13889in" text:min-label-width="0.36111in"/>
        <style:text-properties fo:color="#003c3b" fo:font-family="Outfit" fo:font-size="0.22222in"/>
      </text:list-level-style-bullet>
    </text:list-style>
    <text:list-style style:name="a1073">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5">
      <text:list-level-style-bullet text:level="1" text:bullet-char="-">
        <style:list-level-properties text:space-before="0.12361in" text:min-label-width="0.3125in"/>
        <style:text-properties fo:color="#003c3b" fo:font-family="Calibri" fo:font-size="0.20208in"/>
      </text:list-level-style-bullet>
      <text:list-level-style-bullet text:level="2" text:bullet-char="-">
        <style:list-level-properties text:space-before="0.62361in" text:min-label-width="0.3125in"/>
        <style:text-properties fo:color="#003c3b" fo:font-family="Calibri" fo:font-size="0.20208in"/>
      </text:list-level-style-bullet>
      <text:list-level-style-bullet text:level="3" text:bullet-char="-">
        <style:list-level-properties text:space-before="1.12361in" text:min-label-width="0.3125in"/>
        <style:text-properties fo:color="#003c3b" fo:font-family="Calibri" fo:font-size="0.20208in"/>
      </text:list-level-style-bullet>
      <text:list-level-style-bullet text:level="4" text:bullet-char="-">
        <style:list-level-properties text:space-before="1.62361in" text:min-label-width="0.3125in"/>
        <style:text-properties fo:color="#003c3b" fo:font-family="Calibri" fo:font-size="0.20208in"/>
      </text:list-level-style-bullet>
      <text:list-level-style-bullet text:level="5" text:bullet-char="-">
        <style:list-level-properties text:space-before="2.12361in" text:min-label-width="0.3125in"/>
        <style:text-properties fo:color="#003c3b" fo:font-family="Calibri" fo:font-size="0.20208in"/>
      </text:list-level-style-bullet>
      <text:list-level-style-bullet text:level="6" text:bullet-char="-">
        <style:list-level-properties text:space-before="2.62361in" text:min-label-width="0.3125in"/>
        <style:text-properties fo:color="#003c3b" fo:font-family="Calibri" fo:font-size="0.20208in"/>
      </text:list-level-style-bullet>
      <text:list-level-style-bullet text:level="7" text:bullet-char="-">
        <style:list-level-properties text:space-before="3.12361in" text:min-label-width="0.3125in"/>
        <style:text-properties fo:color="#003c3b" fo:font-family="Calibri" fo:font-size="0.20208in"/>
      </text:list-level-style-bullet>
      <text:list-level-style-bullet text:level="8" text:bullet-char="-">
        <style:list-level-properties text:space-before="3.62361in" text:min-label-width="0.3125in"/>
        <style:text-properties fo:color="#003c3b" fo:font-family="Calibri" fo:font-size="0.20208in"/>
      </text:list-level-style-bullet>
      <text:list-level-style-bullet text:level="9" text:bullet-char="-">
        <style:list-level-properties text:space-before="4.12361in" text:min-label-width="0.3125in"/>
        <style:text-properties fo:color="#003c3b" fo:font-family="Calibri" fo:font-size="0.20208in"/>
      </text:list-level-style-bullet>
    </text:list-style>
    <text:list-style style:name="a1076">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19">
      <text:list-level-style-bullet text:level="1" text:bullet-char="•">
        <style:list-level-properties text:space-before="0.14931in" text:min-label-width="0.35069in"/>
        <style:text-properties fo:color="#003c3b" fo:font-family="Arial" fo:font-size="0.20208in"/>
      </text:list-level-style-bullet>
      <text:list-level-style-bullet text:level="2" text:bullet-char="•">
        <style:list-level-properties text:space-before="0.64931in" text:min-label-width="0.35069in"/>
        <style:text-properties fo:color="#003c3b" fo:font-family="Arial" fo:font-size="0.20208in"/>
      </text:list-level-style-bullet>
      <text:list-level-style-bullet text:level="3" text:bullet-char="•">
        <style:list-level-properties text:space-before="1.14931in" text:min-label-width="0.35069in"/>
        <style:text-properties fo:color="#003c3b" fo:font-family="Arial" fo:font-size="0.20208in"/>
      </text:list-level-style-bullet>
      <text:list-level-style-bullet text:level="4" text:bullet-char="•">
        <style:list-level-properties text:space-before="1.64931in" text:min-label-width="0.35069in"/>
        <style:text-properties fo:color="#003c3b" fo:font-family="Arial" fo:font-size="0.20208in"/>
      </text:list-level-style-bullet>
      <text:list-level-style-bullet text:level="5" text:bullet-char="•">
        <style:list-level-properties text:space-before="2.14931in" text:min-label-width="0.35069in"/>
        <style:text-properties fo:color="#003c3b" fo:font-family="Arial" fo:font-size="0.20208in"/>
      </text:list-level-style-bullet>
      <text:list-level-style-bullet text:level="6" text:bullet-char="•">
        <style:list-level-properties text:space-before="2.64931in" text:min-label-width="0.35069in"/>
        <style:text-properties fo:color="#003c3b" fo:font-family="Arial" fo:font-size="0.20208in"/>
      </text:list-level-style-bullet>
      <text:list-level-style-bullet text:level="7" text:bullet-char="•">
        <style:list-level-properties text:space-before="3.14931in" text:min-label-width="0.35069in"/>
        <style:text-properties fo:color="#003c3b" fo:font-family="Arial" fo:font-size="0.20208in"/>
      </text:list-level-style-bullet>
      <text:list-level-style-bullet text:level="8" text:bullet-char="•">
        <style:list-level-properties text:space-before="3.64931in" text:min-label-width="0.35069in"/>
        <style:text-properties fo:color="#003c3b" fo:font-family="Arial" fo:font-size="0.20208in"/>
      </text:list-level-style-bullet>
      <text:list-level-style-bullet text:level="9" text:bullet-char="•">
        <style:list-level-properties text:space-before="4.14931in" text:min-label-width="0.35069in"/>
        <style:text-properties fo:color="#003c3b" fo:font-family="Arial" fo:font-size="0.20208in"/>
      </text:list-level-style-bullet>
    </text:list-style>
    <text:list-style style:name="a107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82">
      <text:list-level-style-bullet text:level="1" text:bullet-char="o">
        <style:list-level-properties text:space-before="0.14931in" text:min-label-width="0.3125in"/>
        <style:text-properties fo:color="#003c3b" fo:font-family="Courier New" fo:font-size="0.17681in"/>
      </text:list-level-style-bullet>
      <text:list-level-style-bullet text:level="2" text:bullet-char="o">
        <style:list-level-properties text:space-before="0.64931in" text:min-label-width="0.3125in"/>
        <style:text-properties fo:color="#003c3b" fo:font-family="Courier New" fo:font-size="0.17681in"/>
      </text:list-level-style-bullet>
      <text:list-level-style-bullet text:level="3" text:bullet-char="o">
        <style:list-level-properties text:space-before="1.14931in" text:min-label-width="0.3125in"/>
        <style:text-properties fo:color="#003c3b" fo:font-family="Courier New" fo:font-size="0.17681in"/>
      </text:list-level-style-bullet>
      <text:list-level-style-bullet text:level="4" text:bullet-char="o">
        <style:list-level-properties text:space-before="1.64931in" text:min-label-width="0.3125in"/>
        <style:text-properties fo:color="#003c3b" fo:font-family="Courier New" fo:font-size="0.17681in"/>
      </text:list-level-style-bullet>
      <text:list-level-style-bullet text:level="5" text:bullet-char="o">
        <style:list-level-properties text:space-before="2.14931in" text:min-label-width="0.3125in"/>
        <style:text-properties fo:color="#003c3b" fo:font-family="Courier New" fo:font-size="0.17681in"/>
      </text:list-level-style-bullet>
      <text:list-level-style-bullet text:level="6" text:bullet-char="o">
        <style:list-level-properties text:space-before="2.64931in" text:min-label-width="0.3125in"/>
        <style:text-properties fo:color="#003c3b" fo:font-family="Courier New" fo:font-size="0.17681in"/>
      </text:list-level-style-bullet>
      <text:list-level-style-bullet text:level="7" text:bullet-char="o">
        <style:list-level-properties text:space-before="3.14931in" text:min-label-width="0.3125in"/>
        <style:text-properties fo:color="#003c3b" fo:font-family="Courier New" fo:font-size="0.17681in"/>
      </text:list-level-style-bullet>
      <text:list-level-style-bullet text:level="8" text:bullet-char="o">
        <style:list-level-properties text:space-before="3.64931in" text:min-label-width="0.3125in"/>
        <style:text-properties fo:color="#003c3b" fo:font-family="Courier New" fo:font-size="0.17681in"/>
      </text:list-level-style-bullet>
      <text:list-level-style-bullet text:level="9" text:bullet-char="o">
        <style:list-level-properties text:space-before="4.14931in" text:min-label-width="0.3125in"/>
        <style:text-properties fo:color="#003c3b" fo:font-family="Courier New" fo:font-size="0.17681in"/>
      </text:list-level-style-bullet>
    </text:list-style>
    <text:list-style style:name="a1186">
      <text:list-level-style-bullet text:level="1" text:bullet-char="-">
        <style:list-level-properties text:space-before="0.14931in" text:min-label-width="0.3125in"/>
        <style:text-properties fo:color="#003c3b" fo:font-family="Calibri" fo:font-size="0.17681in"/>
      </text:list-level-style-bullet>
      <text:list-level-style-bullet text:level="2" text:bullet-char="-">
        <style:list-level-properties text:space-before="0.64931in" text:min-label-width="0.3125in"/>
        <style:text-properties fo:color="#003c3b" fo:font-family="Calibri" fo:font-size="0.17681in"/>
      </text:list-level-style-bullet>
      <text:list-level-style-bullet text:level="3" text:bullet-char="-">
        <style:list-level-properties text:space-before="1.14931in" text:min-label-width="0.3125in"/>
        <style:text-properties fo:color="#003c3b" fo:font-family="Calibri" fo:font-size="0.17681in"/>
      </text:list-level-style-bullet>
      <text:list-level-style-bullet text:level="4" text:bullet-char="-">
        <style:list-level-properties text:space-before="1.64931in" text:min-label-width="0.3125in"/>
        <style:text-properties fo:color="#003c3b" fo:font-family="Calibri" fo:font-size="0.17681in"/>
      </text:list-level-style-bullet>
      <text:list-level-style-bullet text:level="5" text:bullet-char="-">
        <style:list-level-properties text:space-before="2.14931in" text:min-label-width="0.3125in"/>
        <style:text-properties fo:color="#003c3b" fo:font-family="Calibri" fo:font-size="0.17681in"/>
      </text:list-level-style-bullet>
      <text:list-level-style-bullet text:level="6" text:bullet-char="-">
        <style:list-level-properties text:space-before="2.64931in" text:min-label-width="0.3125in"/>
        <style:text-properties fo:color="#003c3b" fo:font-family="Calibri" fo:font-size="0.17681in"/>
      </text:list-level-style-bullet>
      <text:list-level-style-bullet text:level="7" text:bullet-char="-">
        <style:list-level-properties text:space-before="3.14931in" text:min-label-width="0.3125in"/>
        <style:text-properties fo:color="#003c3b" fo:font-family="Calibri" fo:font-size="0.17681in"/>
      </text:list-level-style-bullet>
      <text:list-level-style-bullet text:level="8" text:bullet-char="-">
        <style:list-level-properties text:space-before="3.64931in" text:min-label-width="0.3125in"/>
        <style:text-properties fo:color="#003c3b" fo:font-family="Calibri" fo:font-size="0.17681in"/>
      </text:list-level-style-bullet>
      <text:list-level-style-bullet text:level="9" text:bullet-char="-">
        <style:list-level-properties text:space-before="4.14931in" text:min-label-width="0.3125in"/>
        <style:text-properties fo:color="#003c3b" fo:font-family="Calibri" fo:font-size="0.17681in"/>
      </text:list-level-style-bullet>
    </text:list-style>
    <text:list-style style:name="a1331">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2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29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61">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35">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339">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011">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015">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122">
      <text:list-level-style-bullet text:level="1" text:bullet-char="•">
        <style:list-level-properties text:space-before="0.14931in" text:min-label-width="0.35069in"/>
        <style:text-properties fo:color="#003c3b" fo:font-family="Arial" fo:font-size="0.20208in"/>
      </text:list-level-style-bullet>
      <text:list-level-style-bullet text:level="2" text:bullet-char="•">
        <style:list-level-properties text:space-before="0.64931in" text:min-label-width="0.35069in"/>
        <style:text-properties fo:color="#003c3b" fo:font-family="Arial" fo:font-size="0.20208in"/>
      </text:list-level-style-bullet>
      <text:list-level-style-bullet text:level="3" text:bullet-char="•">
        <style:list-level-properties text:space-before="1.14931in" text:min-label-width="0.35069in"/>
        <style:text-properties fo:color="#003c3b" fo:font-family="Arial" fo:font-size="0.20208in"/>
      </text:list-level-style-bullet>
      <text:list-level-style-bullet text:level="4" text:bullet-char="•">
        <style:list-level-properties text:space-before="1.64931in" text:min-label-width="0.35069in"/>
        <style:text-properties fo:color="#003c3b" fo:font-family="Arial" fo:font-size="0.20208in"/>
      </text:list-level-style-bullet>
      <text:list-level-style-bullet text:level="5" text:bullet-char="•">
        <style:list-level-properties text:space-before="2.14931in" text:min-label-width="0.35069in"/>
        <style:text-properties fo:color="#003c3b" fo:font-family="Arial" fo:font-size="0.20208in"/>
      </text:list-level-style-bullet>
      <text:list-level-style-bullet text:level="6" text:bullet-char="•">
        <style:list-level-properties text:space-before="2.64931in" text:min-label-width="0.35069in"/>
        <style:text-properties fo:color="#003c3b" fo:font-family="Arial" fo:font-size="0.20208in"/>
      </text:list-level-style-bullet>
      <text:list-level-style-bullet text:level="7" text:bullet-char="•">
        <style:list-level-properties text:space-before="3.14931in" text:min-label-width="0.35069in"/>
        <style:text-properties fo:color="#003c3b" fo:font-family="Arial" fo:font-size="0.20208in"/>
      </text:list-level-style-bullet>
      <text:list-level-style-bullet text:level="8" text:bullet-char="•">
        <style:list-level-properties text:space-before="3.64931in" text:min-label-width="0.35069in"/>
        <style:text-properties fo:color="#003c3b" fo:font-family="Arial" fo:font-size="0.20208in"/>
      </text:list-level-style-bullet>
      <text:list-level-style-bullet text:level="9" text:bullet-char="•">
        <style:list-level-properties text:space-before="4.14931in" text:min-label-width="0.35069in"/>
        <style:text-properties fo:color="#003c3b" fo:font-family="Arial" fo:font-size="0.20208in"/>
      </text:list-level-style-bullet>
    </text:list-style>
    <text:list-style style:name="a1083">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126">
      <text:list-level-style-bullet text:level="1" text:bullet-char="-">
        <style:list-level-properties text:space-before="0.14931in" text:min-label-width="0.3125in"/>
        <style:text-properties fo:color="#003c3b" fo:font-family="Calibri,Sans-Serif" fo:font-size="0.20208in"/>
      </text:list-level-style-bullet>
      <text:list-level-style-bullet text:level="2" text:bullet-char="-">
        <style:list-level-properties text:space-before="0.64931in" text:min-label-width="0.3125in"/>
        <style:text-properties fo:color="#003c3b" fo:font-family="Calibri,Sans-Serif" fo:font-size="0.20208in"/>
      </text:list-level-style-bullet>
      <text:list-level-style-bullet text:level="3" text:bullet-char="-">
        <style:list-level-properties text:space-before="1.14931in" text:min-label-width="0.3125in"/>
        <style:text-properties fo:color="#003c3b" fo:font-family="Calibri,Sans-Serif" fo:font-size="0.20208in"/>
      </text:list-level-style-bullet>
      <text:list-level-style-bullet text:level="4" text:bullet-char="-">
        <style:list-level-properties text:space-before="1.64931in" text:min-label-width="0.3125in"/>
        <style:text-properties fo:color="#003c3b" fo:font-family="Calibri,Sans-Serif" fo:font-size="0.20208in"/>
      </text:list-level-style-bullet>
      <text:list-level-style-bullet text:level="5" text:bullet-char="-">
        <style:list-level-properties text:space-before="2.14931in" text:min-label-width="0.3125in"/>
        <style:text-properties fo:color="#003c3b" fo:font-family="Calibri,Sans-Serif" fo:font-size="0.20208in"/>
      </text:list-level-style-bullet>
      <text:list-level-style-bullet text:level="6" text:bullet-char="-">
        <style:list-level-properties text:space-before="2.64931in" text:min-label-width="0.3125in"/>
        <style:text-properties fo:color="#003c3b" fo:font-family="Calibri,Sans-Serif" fo:font-size="0.20208in"/>
      </text:list-level-style-bullet>
      <text:list-level-style-bullet text:level="7" text:bullet-char="-">
        <style:list-level-properties text:space-before="3.14931in" text:min-label-width="0.3125in"/>
        <style:text-properties fo:color="#003c3b" fo:font-family="Calibri,Sans-Serif" fo:font-size="0.20208in"/>
      </text:list-level-style-bullet>
      <text:list-level-style-bullet text:level="8" text:bullet-char="-">
        <style:list-level-properties text:space-before="3.64931in" text:min-label-width="0.3125in"/>
        <style:text-properties fo:color="#003c3b" fo:font-family="Calibri,Sans-Serif" fo:font-size="0.20208in"/>
      </text:list-level-style-bullet>
      <text:list-level-style-bullet text:level="9" text:bullet-char="-">
        <style:list-level-properties text:space-before="4.14931in" text:min-label-width="0.3125in"/>
        <style:text-properties fo:color="#003c3b" fo:font-family="Calibri,Sans-Serif" fo:font-size="0.20208in"/>
      </text:list-level-style-bullet>
    </text:list-style>
    <text:list-style style:name="a123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91">
      <text:list-level-style-bullet text:level="1" text:bullet-char="o">
        <style:list-level-properties text:space-before="0.14931in" text:min-label-width="0.3125in"/>
        <style:text-properties fo:color="#003c3b" fo:font-family="Courier New" fo:font-size="0.17681in"/>
      </text:list-level-style-bullet>
      <text:list-level-style-bullet text:level="2" text:bullet-char="o">
        <style:list-level-properties text:space-before="0.64931in" text:min-label-width="0.3125in"/>
        <style:text-properties fo:color="#003c3b" fo:font-family="Courier New" fo:font-size="0.17681in"/>
      </text:list-level-style-bullet>
      <text:list-level-style-bullet text:level="3" text:bullet-char="o">
        <style:list-level-properties text:space-before="1.14931in" text:min-label-width="0.3125in"/>
        <style:text-properties fo:color="#003c3b" fo:font-family="Courier New" fo:font-size="0.17681in"/>
      </text:list-level-style-bullet>
      <text:list-level-style-bullet text:level="4" text:bullet-char="o">
        <style:list-level-properties text:space-before="1.64931in" text:min-label-width="0.3125in"/>
        <style:text-properties fo:color="#003c3b" fo:font-family="Courier New" fo:font-size="0.17681in"/>
      </text:list-level-style-bullet>
      <text:list-level-style-bullet text:level="5" text:bullet-char="o">
        <style:list-level-properties text:space-before="2.14931in" text:min-label-width="0.3125in"/>
        <style:text-properties fo:color="#003c3b" fo:font-family="Courier New" fo:font-size="0.17681in"/>
      </text:list-level-style-bullet>
      <text:list-level-style-bullet text:level="6" text:bullet-char="o">
        <style:list-level-properties text:space-before="2.64931in" text:min-label-width="0.3125in"/>
        <style:text-properties fo:color="#003c3b" fo:font-family="Courier New" fo:font-size="0.17681in"/>
      </text:list-level-style-bullet>
      <text:list-level-style-bullet text:level="7" text:bullet-char="o">
        <style:list-level-properties text:space-before="3.14931in" text:min-label-width="0.3125in"/>
        <style:text-properties fo:color="#003c3b" fo:font-family="Courier New" fo:font-size="0.17681in"/>
      </text:list-level-style-bullet>
      <text:list-level-style-bullet text:level="8" text:bullet-char="o">
        <style:list-level-properties text:space-before="3.64931in" text:min-label-width="0.3125in"/>
        <style:text-properties fo:color="#003c3b" fo:font-family="Courier New" fo:font-size="0.17681in"/>
      </text:list-level-style-bullet>
      <text:list-level-style-bullet text:level="9" text:bullet-char="o">
        <style:list-level-properties text:space-before="4.14931in" text:min-label-width="0.3125in"/>
        <style:text-properties fo:color="#003c3b" fo:font-family="Courier New" fo:font-size="0.17681in"/>
      </text:list-level-style-bullet>
    </text:list-style>
    <text:list-style style:name="a1236">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196">
      <text:list-level-style-bullet text:level="1" text:bullet-char="o">
        <style:list-level-properties text:space-before="0.14931in" text:min-label-width="0.3125in"/>
        <style:text-properties fo:color="#003c3b" fo:font-family="Courier New" fo:font-size="0.17681in"/>
      </text:list-level-style-bullet>
      <text:list-level-style-bullet text:level="2" text:bullet-char="o">
        <style:list-level-properties text:space-before="0.64931in" text:min-label-width="0.3125in"/>
        <style:text-properties fo:color="#003c3b" fo:font-family="Courier New" fo:font-size="0.17681in"/>
      </text:list-level-style-bullet>
      <text:list-level-style-bullet text:level="3" text:bullet-char="o">
        <style:list-level-properties text:space-before="1.14931in" text:min-label-width="0.3125in"/>
        <style:text-properties fo:color="#003c3b" fo:font-family="Courier New" fo:font-size="0.17681in"/>
      </text:list-level-style-bullet>
      <text:list-level-style-bullet text:level="4" text:bullet-char="o">
        <style:list-level-properties text:space-before="1.64931in" text:min-label-width="0.3125in"/>
        <style:text-properties fo:color="#003c3b" fo:font-family="Courier New" fo:font-size="0.17681in"/>
      </text:list-level-style-bullet>
      <text:list-level-style-bullet text:level="5" text:bullet-char="o">
        <style:list-level-properties text:space-before="2.14931in" text:min-label-width="0.3125in"/>
        <style:text-properties fo:color="#003c3b" fo:font-family="Courier New" fo:font-size="0.17681in"/>
      </text:list-level-style-bullet>
      <text:list-level-style-bullet text:level="6" text:bullet-char="o">
        <style:list-level-properties text:space-before="2.64931in" text:min-label-width="0.3125in"/>
        <style:text-properties fo:color="#003c3b" fo:font-family="Courier New" fo:font-size="0.17681in"/>
      </text:list-level-style-bullet>
      <text:list-level-style-bullet text:level="7" text:bullet-char="o">
        <style:list-level-properties text:space-before="3.14931in" text:min-label-width="0.3125in"/>
        <style:text-properties fo:color="#003c3b" fo:font-family="Courier New" fo:font-size="0.17681in"/>
      </text:list-level-style-bullet>
      <text:list-level-style-bullet text:level="8" text:bullet-char="o">
        <style:list-level-properties text:space-before="3.64931in" text:min-label-width="0.3125in"/>
        <style:text-properties fo:color="#003c3b" fo:font-family="Courier New" fo:font-size="0.17681in"/>
      </text:list-level-style-bullet>
      <text:list-level-style-bullet text:level="9" text:bullet-char="o">
        <style:list-level-properties text:space-before="4.14931in" text:min-label-width="0.3125in"/>
        <style:text-properties fo:color="#003c3b" fo:font-family="Courier New" fo:font-size="0.17681in"/>
      </text:list-level-style-bullet>
    </text:list-style>
    <text:list-style style:name="a1199">
      <text:list-level-style-bullet text:level="1" text:bullet-char="o">
        <style:list-level-properties text:space-before="0.14931in" text:min-label-width="0.3125in"/>
        <style:text-properties fo:color="#003c3b" fo:font-family="Courier New" fo:font-size="0.17681in"/>
      </text:list-level-style-bullet>
      <text:list-level-style-bullet text:level="2" text:bullet-char="o">
        <style:list-level-properties text:space-before="0.64931in" text:min-label-width="0.3125in"/>
        <style:text-properties fo:color="#003c3b" fo:font-family="Courier New" fo:font-size="0.17681in"/>
      </text:list-level-style-bullet>
      <text:list-level-style-bullet text:level="3" text:bullet-char="o">
        <style:list-level-properties text:space-before="1.14931in" text:min-label-width="0.3125in"/>
        <style:text-properties fo:color="#003c3b" fo:font-family="Courier New" fo:font-size="0.17681in"/>
      </text:list-level-style-bullet>
      <text:list-level-style-bullet text:level="4" text:bullet-char="o">
        <style:list-level-properties text:space-before="1.64931in" text:min-label-width="0.3125in"/>
        <style:text-properties fo:color="#003c3b" fo:font-family="Courier New" fo:font-size="0.17681in"/>
      </text:list-level-style-bullet>
      <text:list-level-style-bullet text:level="5" text:bullet-char="o">
        <style:list-level-properties text:space-before="2.14931in" text:min-label-width="0.3125in"/>
        <style:text-properties fo:color="#003c3b" fo:font-family="Courier New" fo:font-size="0.17681in"/>
      </text:list-level-style-bullet>
      <text:list-level-style-bullet text:level="6" text:bullet-char="o">
        <style:list-level-properties text:space-before="2.64931in" text:min-label-width="0.3125in"/>
        <style:text-properties fo:color="#003c3b" fo:font-family="Courier New" fo:font-size="0.17681in"/>
      </text:list-level-style-bullet>
      <text:list-level-style-bullet text:level="7" text:bullet-char="o">
        <style:list-level-properties text:space-before="3.14931in" text:min-label-width="0.3125in"/>
        <style:text-properties fo:color="#003c3b" fo:font-family="Courier New" fo:font-size="0.17681in"/>
      </text:list-level-style-bullet>
      <text:list-level-style-bullet text:level="8" text:bullet-char="o">
        <style:list-level-properties text:space-before="3.64931in" text:min-label-width="0.3125in"/>
        <style:text-properties fo:color="#003c3b" fo:font-family="Courier New" fo:font-size="0.17681in"/>
      </text:list-level-style-bullet>
      <text:list-level-style-bullet text:level="9" text:bullet-char="o">
        <style:list-level-properties text:space-before="4.14931in" text:min-label-width="0.3125in"/>
        <style:text-properties fo:color="#003c3b" fo:font-family="Courier New" fo:font-size="0.17681in"/>
      </text:list-level-style-bullet>
    </text:list-style>
    <text:list-style style:name="a1343">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0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47">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020">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023">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1026">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30">
      <text:list-level-style-bullet text:level="1" text:bullet-char="-">
        <style:list-level-properties text:space-before="0.14931in" text:min-label-width="0.3125in"/>
        <style:text-properties fo:color="#003c3b" fo:font-family="Calibri,Sans-Serif" fo:font-size="0.20208in"/>
      </text:list-level-style-bullet>
      <text:list-level-style-bullet text:level="2" text:bullet-char="-">
        <style:list-level-properties text:space-before="0.64931in" text:min-label-width="0.3125in"/>
        <style:text-properties fo:color="#003c3b" fo:font-family="Calibri,Sans-Serif" fo:font-size="0.20208in"/>
      </text:list-level-style-bullet>
      <text:list-level-style-bullet text:level="3" text:bullet-char="-">
        <style:list-level-properties text:space-before="1.14931in" text:min-label-width="0.3125in"/>
        <style:text-properties fo:color="#003c3b" fo:font-family="Calibri,Sans-Serif" fo:font-size="0.20208in"/>
      </text:list-level-style-bullet>
      <text:list-level-style-bullet text:level="4" text:bullet-char="-">
        <style:list-level-properties text:space-before="1.64931in" text:min-label-width="0.3125in"/>
        <style:text-properties fo:color="#003c3b" fo:font-family="Calibri,Sans-Serif" fo:font-size="0.20208in"/>
      </text:list-level-style-bullet>
      <text:list-level-style-bullet text:level="5" text:bullet-char="-">
        <style:list-level-properties text:space-before="2.14931in" text:min-label-width="0.3125in"/>
        <style:text-properties fo:color="#003c3b" fo:font-family="Calibri,Sans-Serif" fo:font-size="0.20208in"/>
      </text:list-level-style-bullet>
      <text:list-level-style-bullet text:level="6" text:bullet-char="-">
        <style:list-level-properties text:space-before="2.64931in" text:min-label-width="0.3125in"/>
        <style:text-properties fo:color="#003c3b" fo:font-family="Calibri,Sans-Serif" fo:font-size="0.20208in"/>
      </text:list-level-style-bullet>
      <text:list-level-style-bullet text:level="7" text:bullet-char="-">
        <style:list-level-properties text:space-before="3.14931in" text:min-label-width="0.3125in"/>
        <style:text-properties fo:color="#003c3b" fo:font-family="Calibri,Sans-Serif" fo:font-size="0.20208in"/>
      </text:list-level-style-bullet>
      <text:list-level-style-bullet text:level="8" text:bullet-char="-">
        <style:list-level-properties text:space-before="3.64931in" text:min-label-width="0.3125in"/>
        <style:text-properties fo:color="#003c3b" fo:font-family="Calibri,Sans-Serif" fo:font-size="0.20208in"/>
      </text:list-level-style-bullet>
      <text:list-level-style-bullet text:level="9" text:bullet-char="-">
        <style:list-level-properties text:space-before="4.14931in" text:min-label-width="0.3125in"/>
        <style:text-properties fo:color="#003c3b" fo:font-family="Calibri,Sans-Serif" fo:font-size="0.20208in"/>
      </text:list-level-style-bullet>
    </text:list-style>
    <text:list-style style:name="a102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60">
      <text:list-level-style-bullet text:level="1" text:bullet-char="●">
        <style:list-level-properties text:space-before="0.13889in" text:min-label-width="0.36111in"/>
        <style:text-properties fo:color="#003c3b" fo:font-family="Outfit" fo:font-size="0.22222in"/>
      </text:list-level-style-bullet>
      <text:list-level-style-bullet text:level="2" text:bullet-char="●">
        <style:list-level-properties text:space-before="0.13889in" text:min-label-width="0.36111in"/>
        <style:text-properties fo:color="#003c3b" fo:font-family="Outfit" fo:font-size="0.22222in"/>
      </text:list-level-style-bullet>
      <text:list-level-style-bullet text:level="3" text:bullet-char="●">
        <style:list-level-properties text:space-before="0.13889in" text:min-label-width="0.36111in"/>
        <style:text-properties fo:color="#003c3b" fo:font-family="Outfit" fo:font-size="0.22222in"/>
      </text:list-level-style-bullet>
      <text:list-level-style-bullet text:level="4" text:bullet-char="●">
        <style:list-level-properties text:space-before="0.13889in" text:min-label-width="0.36111in"/>
        <style:text-properties fo:color="#003c3b" fo:font-family="Outfit" fo:font-size="0.22222in"/>
      </text:list-level-style-bullet>
      <text:list-level-style-bullet text:level="5" text:bullet-char="●">
        <style:list-level-properties text:space-before="0.13889in" text:min-label-width="0.36111in"/>
        <style:text-properties fo:color="#003c3b" fo:font-family="Outfit" fo:font-size="0.22222in"/>
      </text:list-level-style-bullet>
      <text:list-level-style-bullet text:level="6" text:bullet-char="●">
        <style:list-level-properties text:space-before="0.13889in" text:min-label-width="0.36111in"/>
        <style:text-properties fo:color="#003c3b" fo:font-family="Outfit" fo:font-size="0.22222in"/>
      </text:list-level-style-bullet>
      <text:list-level-style-bullet text:level="7" text:bullet-char="●">
        <style:list-level-properties text:space-before="0.13889in" text:min-label-width="0.36111in"/>
        <style:text-properties fo:color="#003c3b" fo:font-family="Outfit" fo:font-size="0.22222in"/>
      </text:list-level-style-bullet>
      <text:list-level-style-bullet text:level="8" text:bullet-char="●">
        <style:list-level-properties text:space-before="0.13889in" text:min-label-width="0.36111in"/>
        <style:text-properties fo:color="#003c3b" fo:font-family="Outfit" fo:font-size="0.22222in"/>
      </text:list-level-style-bullet>
      <text:list-level-style-bullet text:level="9" text:bullet-char="●">
        <style:list-level-properties text:space-before="0.13889in" text:min-label-width="0.36111in"/>
        <style:text-properties fo:color="#003c3b" fo:font-family="Outfit" fo:font-size="0.22222in"/>
      </text:list-level-style-bullet>
    </text:list-style>
    <text:list-style style:name="a802">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09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240">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806">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09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3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244">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809">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13">
      <text:list-level-style-bullet text:level="1" text:bullet-char="-">
        <style:list-level-properties text:space-before="0.14931in" text:min-label-width="0.35069in"/>
        <style:text-properties fo:color="#003c3b" fo:font-family="Calibri" fo:font-size="0.20208in"/>
      </text:list-level-style-bullet>
      <text:list-level-style-bullet text:level="2" text:bullet-char="-">
        <style:list-level-properties text:space-before="0.64931in" text:min-label-width="0.35069in"/>
        <style:text-properties fo:color="#003c3b" fo:font-family="Calibri" fo:font-size="0.20208in"/>
      </text:list-level-style-bullet>
      <text:list-level-style-bullet text:level="3" text:bullet-char="-">
        <style:list-level-properties text:space-before="1.14931in" text:min-label-width="0.35069in"/>
        <style:text-properties fo:color="#003c3b" fo:font-family="Calibri" fo:font-size="0.20208in"/>
      </text:list-level-style-bullet>
      <text:list-level-style-bullet text:level="4" text:bullet-char="-">
        <style:list-level-properties text:space-before="1.64931in" text:min-label-width="0.35069in"/>
        <style:text-properties fo:color="#003c3b" fo:font-family="Calibri" fo:font-size="0.20208in"/>
      </text:list-level-style-bullet>
      <text:list-level-style-bullet text:level="5" text:bullet-char="-">
        <style:list-level-properties text:space-before="2.14931in" text:min-label-width="0.35069in"/>
        <style:text-properties fo:color="#003c3b" fo:font-family="Calibri" fo:font-size="0.20208in"/>
      </text:list-level-style-bullet>
      <text:list-level-style-bullet text:level="6" text:bullet-char="-">
        <style:list-level-properties text:space-before="2.64931in" text:min-label-width="0.35069in"/>
        <style:text-properties fo:color="#003c3b" fo:font-family="Calibri" fo:font-size="0.20208in"/>
      </text:list-level-style-bullet>
      <text:list-level-style-bullet text:level="7" text:bullet-char="-">
        <style:list-level-properties text:space-before="3.14931in" text:min-label-width="0.35069in"/>
        <style:text-properties fo:color="#003c3b" fo:font-family="Calibri" fo:font-size="0.20208in"/>
      </text:list-level-style-bullet>
      <text:list-level-style-bullet text:level="8" text:bullet-char="-">
        <style:list-level-properties text:space-before="3.64931in" text:min-label-width="0.35069in"/>
        <style:text-properties fo:color="#003c3b" fo:font-family="Calibri" fo:font-size="0.20208in"/>
      </text:list-level-style-bullet>
      <text:list-level-style-bullet text:level="9" text:bullet-char="-">
        <style:list-level-properties text:space-before="4.14931in" text:min-label-width="0.35069in"/>
        <style:text-properties fo:color="#003c3b" fo:font-family="Calibri" fo:font-size="0.20208in"/>
      </text:list-level-style-bullet>
    </text:list-style>
    <text:list-style style:name="a1351">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24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17">
      <text:list-level-style-bullet text:level="1" text:bullet-char="-">
        <style:list-level-properties text:space-before="0.14931in" text:min-label-width="0.35069in"/>
        <style:text-properties fo:color="#003c3b" fo:font-family="Calibri" fo:font-size="0.20208in"/>
      </text:list-level-style-bullet>
      <text:list-level-style-bullet text:level="2" text:bullet-char="-">
        <style:list-level-properties text:space-before="0.64931in" text:min-label-width="0.35069in"/>
        <style:text-properties fo:color="#003c3b" fo:font-family="Calibri" fo:font-size="0.20208in"/>
      </text:list-level-style-bullet>
      <text:list-level-style-bullet text:level="3" text:bullet-char="-">
        <style:list-level-properties text:space-before="1.14931in" text:min-label-width="0.35069in"/>
        <style:text-properties fo:color="#003c3b" fo:font-family="Calibri" fo:font-size="0.20208in"/>
      </text:list-level-style-bullet>
      <text:list-level-style-bullet text:level="4" text:bullet-char="-">
        <style:list-level-properties text:space-before="1.64931in" text:min-label-width="0.35069in"/>
        <style:text-properties fo:color="#003c3b" fo:font-family="Calibri" fo:font-size="0.20208in"/>
      </text:list-level-style-bullet>
      <text:list-level-style-bullet text:level="5" text:bullet-char="-">
        <style:list-level-properties text:space-before="2.14931in" text:min-label-width="0.35069in"/>
        <style:text-properties fo:color="#003c3b" fo:font-family="Calibri" fo:font-size="0.20208in"/>
      </text:list-level-style-bullet>
      <text:list-level-style-bullet text:level="6" text:bullet-char="-">
        <style:list-level-properties text:space-before="2.64931in" text:min-label-width="0.35069in"/>
        <style:text-properties fo:color="#003c3b" fo:font-family="Calibri" fo:font-size="0.20208in"/>
      </text:list-level-style-bullet>
      <text:list-level-style-bullet text:level="7" text:bullet-char="-">
        <style:list-level-properties text:space-before="3.14931in" text:min-label-width="0.35069in"/>
        <style:text-properties fo:color="#003c3b" fo:font-family="Calibri" fo:font-size="0.20208in"/>
      </text:list-level-style-bullet>
      <text:list-level-style-bullet text:level="8" text:bullet-char="-">
        <style:list-level-properties text:space-before="3.64931in" text:min-label-width="0.35069in"/>
        <style:text-properties fo:color="#003c3b" fo:font-family="Calibri" fo:font-size="0.20208in"/>
      </text:list-level-style-bullet>
      <text:list-level-style-bullet text:level="9" text:bullet-char="-">
        <style:list-level-properties text:space-before="4.14931in" text:min-label-width="0.35069in"/>
        <style:text-properties fo:color="#003c3b" fo:font-family="Calibri" fo:font-size="0.20208in"/>
      </text:list-level-style-bullet>
    </text:list-style>
    <text:list-style style:name="a1355">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83">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5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87">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03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03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664">
      <text:list-level-style-bullet text:level="1" text:bullet-char="●">
        <style:list-level-properties text:space-before="0.28472in" text:min-label-width="0.35417in"/>
        <style:text-properties fo:color="#003c3b" fo:font-family="Arial" fo:font-size="0.20833in"/>
      </text:list-level-style-bullet>
      <text:list-level-style-bullet text:level="2" text:bullet-char="●">
        <style:list-level-properties text:space-before="0.78472in" text:min-label-width="0.35417in"/>
        <style:text-properties fo:color="#003c3b" fo:font-family="Arial" fo:font-size="0.20833in"/>
      </text:list-level-style-bullet>
      <text:list-level-style-bullet text:level="3" text:bullet-char="●">
        <style:list-level-properties text:space-before="1.28472in" text:min-label-width="0.35417in"/>
        <style:text-properties fo:color="#003c3b" fo:font-family="Arial" fo:font-size="0.20833in"/>
      </text:list-level-style-bullet>
      <text:list-level-style-bullet text:level="4" text:bullet-char="●">
        <style:list-level-properties text:space-before="1.78472in" text:min-label-width="0.35417in"/>
        <style:text-properties fo:color="#003c3b" fo:font-family="Arial" fo:font-size="0.20833in"/>
      </text:list-level-style-bullet>
      <text:list-level-style-bullet text:level="5" text:bullet-char="●">
        <style:list-level-properties text:space-before="2.28472in" text:min-label-width="0.35417in"/>
        <style:text-properties fo:color="#003c3b" fo:font-family="Arial" fo:font-size="0.20833in"/>
      </text:list-level-style-bullet>
      <text:list-level-style-bullet text:level="6" text:bullet-char="●">
        <style:list-level-properties text:space-before="2.78472in" text:min-label-width="0.35417in"/>
        <style:text-properties fo:color="#003c3b" fo:font-family="Arial" fo:font-size="0.20833in"/>
      </text:list-level-style-bullet>
      <text:list-level-style-bullet text:level="7" text:bullet-char="●">
        <style:list-level-properties text:space-before="3.28472in" text:min-label-width="0.35417in"/>
        <style:text-properties fo:color="#003c3b" fo:font-family="Arial" fo:font-size="0.20833in"/>
      </text:list-level-style-bullet>
      <text:list-level-style-bullet text:level="8" text:bullet-char="●">
        <style:list-level-properties text:space-before="3.78472in" text:min-label-width="0.35417in"/>
        <style:text-properties fo:color="#003c3b" fo:font-family="Arial" fo:font-size="0.20833in"/>
      </text:list-level-style-bullet>
      <text:list-level-style-bullet text:level="9" text:bullet-char="●">
        <style:list-level-properties text:space-before="4.28472in" text:min-label-width="0.35417in"/>
        <style:text-properties fo:color="#003c3b" fo:font-family="Arial" fo:font-size="0.20833in"/>
      </text:list-level-style-bullet>
    </text:list-style>
    <text:list-style style:name="a114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bullet text:level="1" text:bullet-char="●">
        <style:list-level-properties text:space-before="0.13889in" text:min-label-width="0.36111in"/>
        <style:text-properties fo:color="#003c3b" fo:font-family="Outfit" fo:font-size="0.22222in"/>
      </text:list-level-style-bullet>
      <text:list-level-style-bullet text:level="2" text:bullet-char="●">
        <style:list-level-properties text:space-before="0.13889in" text:min-label-width="0.36111in"/>
        <style:text-properties fo:color="#003c3b" fo:font-family="Outfit" fo:font-size="0.22222in"/>
      </text:list-level-style-bullet>
      <text:list-level-style-bullet text:level="3" text:bullet-char="●">
        <style:list-level-properties text:space-before="0.13889in" text:min-label-width="0.36111in"/>
        <style:text-properties fo:color="#003c3b" fo:font-family="Outfit" fo:font-size="0.22222in"/>
      </text:list-level-style-bullet>
      <text:list-level-style-bullet text:level="4" text:bullet-char="●">
        <style:list-level-properties text:space-before="0.13889in" text:min-label-width="0.36111in"/>
        <style:text-properties fo:color="#003c3b" fo:font-family="Outfit" fo:font-size="0.22222in"/>
      </text:list-level-style-bullet>
      <text:list-level-style-bullet text:level="5" text:bullet-char="●">
        <style:list-level-properties text:space-before="0.13889in" text:min-label-width="0.36111in"/>
        <style:text-properties fo:color="#003c3b" fo:font-family="Outfit" fo:font-size="0.22222in"/>
      </text:list-level-style-bullet>
      <text:list-level-style-bullet text:level="6" text:bullet-char="●">
        <style:list-level-properties text:space-before="0.13889in" text:min-label-width="0.36111in"/>
        <style:text-properties fo:color="#003c3b" fo:font-family="Outfit" fo:font-size="0.22222in"/>
      </text:list-level-style-bullet>
      <text:list-level-style-bullet text:level="7" text:bullet-char="●">
        <style:list-level-properties text:space-before="0.13889in" text:min-label-width="0.36111in"/>
        <style:text-properties fo:color="#003c3b" fo:font-family="Outfit" fo:font-size="0.22222in"/>
      </text:list-level-style-bullet>
      <text:list-level-style-bullet text:level="8" text:bullet-char="●">
        <style:list-level-properties text:space-before="0.13889in" text:min-label-width="0.36111in"/>
        <style:text-properties fo:color="#003c3b" fo:font-family="Outfit" fo:font-size="0.22222in"/>
      </text:list-level-style-bullet>
      <text:list-level-style-bullet text:level="9" text:bullet-char="●">
        <style:list-level-properties text:space-before="0.13889in" text:min-label-width="0.36111in"/>
        <style:text-properties fo:color="#003c3b" fo:font-family="Outfit" fo:font-size="0.22222in"/>
      </text:list-level-style-bullet>
    </text:list-style>
    <text:list-style style:name="a813">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146">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816">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5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24">
      <text:list-level-style-bullet text:level="1" text:bullet-char="-">
        <style:list-level-properties text:space-before="0.14931in" text:min-label-width="0.35069in"/>
        <style:text-properties fo:color="#003c3b" fo:font-family="Calibri" fo:font-size="0.20208in"/>
      </text:list-level-style-bullet>
      <text:list-level-style-bullet text:level="2" text:bullet-char="-">
        <style:list-level-properties text:space-before="0.64931in" text:min-label-width="0.35069in"/>
        <style:text-properties fo:color="#003c3b" fo:font-family="Calibri" fo:font-size="0.20208in"/>
      </text:list-level-style-bullet>
      <text:list-level-style-bullet text:level="3" text:bullet-char="-">
        <style:list-level-properties text:space-before="1.14931in" text:min-label-width="0.35069in"/>
        <style:text-properties fo:color="#003c3b" fo:font-family="Calibri" fo:font-size="0.20208in"/>
      </text:list-level-style-bullet>
      <text:list-level-style-bullet text:level="4" text:bullet-char="-">
        <style:list-level-properties text:space-before="1.64931in" text:min-label-width="0.35069in"/>
        <style:text-properties fo:color="#003c3b" fo:font-family="Calibri" fo:font-size="0.20208in"/>
      </text:list-level-style-bullet>
      <text:list-level-style-bullet text:level="5" text:bullet-char="-">
        <style:list-level-properties text:space-before="2.14931in" text:min-label-width="0.35069in"/>
        <style:text-properties fo:color="#003c3b" fo:font-family="Calibri" fo:font-size="0.20208in"/>
      </text:list-level-style-bullet>
      <text:list-level-style-bullet text:level="6" text:bullet-char="-">
        <style:list-level-properties text:space-before="2.64931in" text:min-label-width="0.35069in"/>
        <style:text-properties fo:color="#003c3b" fo:font-family="Calibri" fo:font-size="0.20208in"/>
      </text:list-level-style-bullet>
      <text:list-level-style-bullet text:level="7" text:bullet-char="-">
        <style:list-level-properties text:space-before="3.14931in" text:min-label-width="0.35069in"/>
        <style:text-properties fo:color="#003c3b" fo:font-family="Calibri" fo:font-size="0.20208in"/>
      </text:list-level-style-bullet>
      <text:list-level-style-bullet text:level="8" text:bullet-char="-">
        <style:list-level-properties text:space-before="3.64931in" text:min-label-width="0.35069in"/>
        <style:text-properties fo:color="#003c3b" fo:font-family="Calibri" fo:font-size="0.20208in"/>
      </text:list-level-style-bullet>
      <text:list-level-style-bullet text:level="9" text:bullet-char="-">
        <style:list-level-properties text:space-before="4.14931in" text:min-label-width="0.35069in"/>
        <style:text-properties fo:color="#003c3b" fo:font-family="Calibri" fo:font-size="0.20208in"/>
      </text:list-level-style-bullet>
    </text:list-style>
    <text:list-style style:name="a140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27">
      <text:list-level-style-bullet text:level="1" text:bullet-char="-">
        <style:list-level-properties text:space-before="0.14931in" text:min-label-width="0.35069in"/>
        <style:text-properties fo:color="#003c3b" fo:font-family="Calibri" fo:font-size="0.20208in"/>
      </text:list-level-style-bullet>
      <text:list-level-style-bullet text:level="2" text:bullet-char="-">
        <style:list-level-properties text:space-before="0.64931in" text:min-label-width="0.35069in"/>
        <style:text-properties fo:color="#003c3b" fo:font-family="Calibri" fo:font-size="0.20208in"/>
      </text:list-level-style-bullet>
      <text:list-level-style-bullet text:level="3" text:bullet-char="-">
        <style:list-level-properties text:space-before="1.14931in" text:min-label-width="0.35069in"/>
        <style:text-properties fo:color="#003c3b" fo:font-family="Calibri" fo:font-size="0.20208in"/>
      </text:list-level-style-bullet>
      <text:list-level-style-bullet text:level="4" text:bullet-char="-">
        <style:list-level-properties text:space-before="1.64931in" text:min-label-width="0.35069in"/>
        <style:text-properties fo:color="#003c3b" fo:font-family="Calibri" fo:font-size="0.20208in"/>
      </text:list-level-style-bullet>
      <text:list-level-style-bullet text:level="5" text:bullet-char="-">
        <style:list-level-properties text:space-before="2.14931in" text:min-label-width="0.35069in"/>
        <style:text-properties fo:color="#003c3b" fo:font-family="Calibri" fo:font-size="0.20208in"/>
      </text:list-level-style-bullet>
      <text:list-level-style-bullet text:level="6" text:bullet-char="-">
        <style:list-level-properties text:space-before="2.64931in" text:min-label-width="0.35069in"/>
        <style:text-properties fo:color="#003c3b" fo:font-family="Calibri" fo:font-size="0.20208in"/>
      </text:list-level-style-bullet>
      <text:list-level-style-bullet text:level="7" text:bullet-char="-">
        <style:list-level-properties text:space-before="3.14931in" text:min-label-width="0.35069in"/>
        <style:text-properties fo:color="#003c3b" fo:font-family="Calibri" fo:font-size="0.20208in"/>
      </text:list-level-style-bullet>
      <text:list-level-style-bullet text:level="8" text:bullet-char="-">
        <style:list-level-properties text:space-before="3.64931in" text:min-label-width="0.35069in"/>
        <style:text-properties fo:color="#003c3b" fo:font-family="Calibri" fo:font-size="0.20208in"/>
      </text:list-level-style-bullet>
      <text:list-level-style-bullet text:level="9" text:bullet-char="-">
        <style:list-level-properties text:space-before="4.14931in" text:min-label-width="0.35069in"/>
        <style:text-properties fo:color="#003c3b" fo:font-family="Calibri" fo:font-size="0.20208in"/>
      </text:list-level-style-bullet>
    </text:list-style>
    <text:list-style style:name="a140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9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40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6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96">
      <text:list-level-style-bullet text:level="1" text:bullet-char="-">
        <style:list-level-properties text:space-before="0.14931in" text:min-label-width="0.3125in"/>
        <style:text-properties fo:color="#003c3b" fo:font-family="Calibri" fo:font-size="0.20208in"/>
      </text:list-level-style-bullet>
      <text:list-level-style-bullet text:level="2" text:bullet-char="-">
        <style:list-level-properties text:space-before="0.64931in" text:min-label-width="0.3125in"/>
        <style:text-properties fo:color="#003c3b" fo:font-family="Calibri" fo:font-size="0.20208in"/>
      </text:list-level-style-bullet>
      <text:list-level-style-bullet text:level="3" text:bullet-char="-">
        <style:list-level-properties text:space-before="1.14931in" text:min-label-width="0.3125in"/>
        <style:text-properties fo:color="#003c3b" fo:font-family="Calibri" fo:font-size="0.20208in"/>
      </text:list-level-style-bullet>
      <text:list-level-style-bullet text:level="4" text:bullet-char="-">
        <style:list-level-properties text:space-before="1.64931in" text:min-label-width="0.3125in"/>
        <style:text-properties fo:color="#003c3b" fo:font-family="Calibri" fo:font-size="0.20208in"/>
      </text:list-level-style-bullet>
      <text:list-level-style-bullet text:level="5" text:bullet-char="-">
        <style:list-level-properties text:space-before="2.14931in" text:min-label-width="0.3125in"/>
        <style:text-properties fo:color="#003c3b" fo:font-family="Calibri" fo:font-size="0.20208in"/>
      </text:list-level-style-bullet>
      <text:list-level-style-bullet text:level="6" text:bullet-char="-">
        <style:list-level-properties text:space-before="2.64931in" text:min-label-width="0.3125in"/>
        <style:text-properties fo:color="#003c3b" fo:font-family="Calibri" fo:font-size="0.20208in"/>
      </text:list-level-style-bullet>
      <text:list-level-style-bullet text:level="7" text:bullet-char="-">
        <style:list-level-properties text:space-before="3.14931in" text:min-label-width="0.3125in"/>
        <style:text-properties fo:color="#003c3b" fo:font-family="Calibri" fo:font-size="0.20208in"/>
      </text:list-level-style-bullet>
      <text:list-level-style-bullet text:level="8" text:bullet-char="-">
        <style:list-level-properties text:space-before="3.64931in" text:min-label-width="0.3125in"/>
        <style:text-properties fo:color="#003c3b" fo:font-family="Calibri" fo:font-size="0.20208in"/>
      </text:list-level-style-bullet>
      <text:list-level-style-bullet text:level="9" text:bullet-char="-">
        <style:list-level-properties text:space-before="4.14931in" text:min-label-width="0.3125in"/>
        <style:text-properties fo:color="#003c3b" fo:font-family="Calibri" fo:font-size="0.20208in"/>
      </text:list-level-style-bullet>
    </text:list-style>
    <text:list-style style:name="a99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bullet text:level="1" text:bullet-char="●">
        <style:list-level-properties text:space-before="0.28472in" text:min-label-width="0.35417in"/>
        <style:text-properties fo:color="#003c3b" fo:font-family="Arial" fo:font-size="0.20833in"/>
      </text:list-level-style-bullet>
      <text:list-level-style-bullet text:level="2" text:bullet-char="●">
        <style:list-level-properties text:space-before="0.78472in" text:min-label-width="0.35417in"/>
        <style:text-properties fo:color="#003c3b" fo:font-family="Arial" fo:font-size="0.20833in"/>
      </text:list-level-style-bullet>
      <text:list-level-style-bullet text:level="3" text:bullet-char="●">
        <style:list-level-properties text:space-before="1.28472in" text:min-label-width="0.35417in"/>
        <style:text-properties fo:color="#003c3b" fo:font-family="Arial" fo:font-size="0.20833in"/>
      </text:list-level-style-bullet>
      <text:list-level-style-bullet text:level="4" text:bullet-char="●">
        <style:list-level-properties text:space-before="1.78472in" text:min-label-width="0.35417in"/>
        <style:text-properties fo:color="#003c3b" fo:font-family="Arial" fo:font-size="0.20833in"/>
      </text:list-level-style-bullet>
      <text:list-level-style-bullet text:level="5" text:bullet-char="●">
        <style:list-level-properties text:space-before="2.28472in" text:min-label-width="0.35417in"/>
        <style:text-properties fo:color="#003c3b" fo:font-family="Arial" fo:font-size="0.20833in"/>
      </text:list-level-style-bullet>
      <text:list-level-style-bullet text:level="6" text:bullet-char="●">
        <style:list-level-properties text:space-before="2.78472in" text:min-label-width="0.35417in"/>
        <style:text-properties fo:color="#003c3b" fo:font-family="Arial" fo:font-size="0.20833in"/>
      </text:list-level-style-bullet>
      <text:list-level-style-bullet text:level="7" text:bullet-char="●">
        <style:list-level-properties text:space-before="3.28472in" text:min-label-width="0.35417in"/>
        <style:text-properties fo:color="#003c3b" fo:font-family="Arial" fo:font-size="0.20833in"/>
      </text:list-level-style-bullet>
      <text:list-level-style-bullet text:level="8" text:bullet-char="●">
        <style:list-level-properties text:space-before="3.78472in" text:min-label-width="0.35417in"/>
        <style:text-properties fo:color="#003c3b" fo:font-family="Arial" fo:font-size="0.20833in"/>
      </text:list-level-style-bullet>
      <text:list-level-style-bullet text:level="9" text:bullet-char="●">
        <style:list-level-properties text:space-before="4.28472in" text:min-label-width="0.35417in"/>
        <style:text-properties fo:color="#003c3b" fo:font-family="Arial" fo:font-size="0.20833in"/>
      </text:list-level-style-bullet>
    </text:list-style>
    <text:list-style style:name="a1045">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8">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17">
      <text:list-level-style-bullet text:level="1" text:bullet-char="●">
        <style:list-level-properties text:space-before="0.14583in" text:min-label-width="0.35417in"/>
        <style:text-properties fo:color="#003c3b" fo:font-family="Arial" fo:font-size="0.20833in"/>
      </text:list-level-style-bullet>
      <text:list-level-style-bullet text:level="2" text:bullet-char="●">
        <style:list-level-properties text:space-before="0.64583in" text:min-label-width="0.35417in"/>
        <style:text-properties fo:color="#003c3b" fo:font-family="Arial" fo:font-size="0.20833in"/>
      </text:list-level-style-bullet>
      <text:list-level-style-bullet text:level="3" text:bullet-char="●">
        <style:list-level-properties text:space-before="1.14583in" text:min-label-width="0.35417in"/>
        <style:text-properties fo:color="#003c3b" fo:font-family="Arial" fo:font-size="0.20833in"/>
      </text:list-level-style-bullet>
      <text:list-level-style-bullet text:level="4" text:bullet-char="●">
        <style:list-level-properties text:space-before="1.64583in" text:min-label-width="0.35417in"/>
        <style:text-properties fo:color="#003c3b" fo:font-family="Arial" fo:font-size="0.20833in"/>
      </text:list-level-style-bullet>
      <text:list-level-style-bullet text:level="5" text:bullet-char="●">
        <style:list-level-properties text:space-before="2.14583in" text:min-label-width="0.35417in"/>
        <style:text-properties fo:color="#003c3b" fo:font-family="Arial" fo:font-size="0.20833in"/>
      </text:list-level-style-bullet>
      <text:list-level-style-bullet text:level="6" text:bullet-char="●">
        <style:list-level-properties text:space-before="2.64583in" text:min-label-width="0.35417in"/>
        <style:text-properties fo:color="#003c3b" fo:font-family="Arial" fo:font-size="0.20833in"/>
      </text:list-level-style-bullet>
      <text:list-level-style-bullet text:level="7" text:bullet-char="●">
        <style:list-level-properties text:space-before="3.14583in" text:min-label-width="0.35417in"/>
        <style:text-properties fo:color="#003c3b" fo:font-family="Arial" fo:font-size="0.20833in"/>
      </text:list-level-style-bullet>
      <text:list-level-style-bullet text:level="8" text:bullet-char="●">
        <style:list-level-properties text:space-before="3.64583in" text:min-label-width="0.35417in"/>
        <style:text-properties fo:color="#003c3b" fo:font-family="Arial" fo:font-size="0.20833in"/>
      </text:list-level-style-bullet>
      <text:list-level-style-bullet text:level="9" text:bullet-char="●">
        <style:list-level-properties text:space-before="4.14583in" text:min-label-width="0.35417in"/>
        <style:text-properties fo:color="#003c3b" fo:font-family="Arial" fo:font-size="0.20833in"/>
      </text:list-level-style-bullet>
    </text:list-style>
    <text:list-style style:name="a820">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154">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678">
      <text:list-level-style-bullet text:level="1" text:bullet-char="●">
        <style:list-level-properties text:space-before="0.59028in" text:min-label-width="0.34028in"/>
        <style:text-properties fo:color="#003c3b" fo:font-family="Arial" fo:font-size="0.18056in"/>
      </text:list-level-style-bullet>
      <text:list-level-style-bullet text:level="2" text:bullet-char="●">
        <style:list-level-properties text:space-before="1.09028in" text:min-label-width="0.34028in"/>
        <style:text-properties fo:color="#003c3b" fo:font-family="Arial" fo:font-size="0.18056in"/>
      </text:list-level-style-bullet>
      <text:list-level-style-bullet text:level="3" text:bullet-char="●">
        <style:list-level-properties text:space-before="1.59028in" text:min-label-width="0.34028in"/>
        <style:text-properties fo:color="#003c3b" fo:font-family="Arial" fo:font-size="0.18056in"/>
      </text:list-level-style-bullet>
      <text:list-level-style-bullet text:level="4" text:bullet-char="●">
        <style:list-level-properties text:space-before="2.09028in" text:min-label-width="0.34028in"/>
        <style:text-properties fo:color="#003c3b" fo:font-family="Arial" fo:font-size="0.18056in"/>
      </text:list-level-style-bullet>
      <text:list-level-style-bullet text:level="5" text:bullet-char="●">
        <style:list-level-properties text:space-before="2.59028in" text:min-label-width="0.34028in"/>
        <style:text-properties fo:color="#003c3b" fo:font-family="Arial" fo:font-size="0.18056in"/>
      </text:list-level-style-bullet>
      <text:list-level-style-bullet text:level="6" text:bullet-char="●">
        <style:list-level-properties text:space-before="3.09028in" text:min-label-width="0.34028in"/>
        <style:text-properties fo:color="#003c3b" fo:font-family="Arial" fo:font-size="0.18056in"/>
      </text:list-level-style-bullet>
      <text:list-level-style-bullet text:level="7" text:bullet-char="●">
        <style:list-level-properties text:space-before="3.59028in" text:min-label-width="0.34028in"/>
        <style:text-properties fo:color="#003c3b" fo:font-family="Arial" fo:font-size="0.18056in"/>
      </text:list-level-style-bullet>
      <text:list-level-style-bullet text:level="8" text:bullet-char="●">
        <style:list-level-properties text:space-before="4.09028in" text:min-label-width="0.34028in"/>
        <style:text-properties fo:color="#003c3b" fo:font-family="Arial" fo:font-size="0.18056in"/>
      </text:list-level-style-bullet>
      <text:list-level-style-bullet text:level="9" text:bullet-char="●">
        <style:list-level-properties text:space-before="4.59028in" text:min-label-width="0.34028in"/>
        <style:text-properties fo:color="#003c3b" fo:font-family="Arial" fo:font-size="0.18056in"/>
      </text:list-level-style-bullet>
    </text:list-style>
    <text:list-style style:name="a824">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30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15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126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30">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828">
      <text:list-level-style-number text:level="1" style:num-format="" style:num-list-format-name="">
        <style:list-level-properties text:space-before="0.14931in" text:min-label-width="0.35069in"/>
      </text:list-level-style-number>
      <text:list-level-style-number text:level="2" style:num-format="" style:num-list-format-name="">
        <style:list-level-properties text:space-before="0.64931in" text:min-label-width="0.35069in"/>
      </text:list-level-style-number>
      <text:list-level-style-number text:level="3" style:num-format="" style:num-list-format-name="">
        <style:list-level-properties text:space-before="1.14931in" text:min-label-width="0.35069in"/>
      </text:list-level-style-number>
      <text:list-level-style-number text:level="4" style:num-format="" style:num-list-format-name="">
        <style:list-level-properties text:space-before="1.64931in" text:min-label-width="0.35069in"/>
      </text:list-level-style-number>
      <text:list-level-style-number text:level="5" style:num-format="" style:num-list-format-name="">
        <style:list-level-properties text:space-before="2.14931in" text:min-label-width="0.35069in"/>
      </text:list-level-style-number>
      <text:list-level-style-number text:level="6" style:num-format="" style:num-list-format-name="">
        <style:list-level-properties text:space-before="2.64931in" text:min-label-width="0.35069in"/>
      </text:list-level-style-number>
      <text:list-level-style-number text:level="7" style:num-format="" style:num-list-format-name="">
        <style:list-level-properties text:space-before="3.14931in" text:min-label-width="0.35069in"/>
      </text:list-level-style-number>
      <text:list-level-style-number text:level="8" style:num-format="" style:num-list-format-name="">
        <style:list-level-properties text:space-before="3.64931in" text:min-label-width="0.35069in"/>
      </text:list-level-style-number>
      <text:list-level-style-number text:level="9" style:num-format="" style:num-list-format-name="">
        <style:list-level-properties text:space-before="4.14931in" text:min-label-width="0.35069in"/>
      </text:list-level-style-number>
    </text:list-style>
    <text:list-style style:name="a933">
      <text:list-level-style-bullet text:level="1" text:bullet-char="-">
        <style:list-level-properties text:space-before="0.14931in" text:min-label-width="0.35069in"/>
        <style:text-properties fo:color="#003c3b" fo:font-family="Calibri" fo:font-size="0.20208in"/>
      </text:list-level-style-bullet>
      <text:list-level-style-bullet text:level="2" text:bullet-char="-">
        <style:list-level-properties text:space-before="0.64931in" text:min-label-width="0.35069in"/>
        <style:text-properties fo:color="#003c3b" fo:font-family="Calibri" fo:font-size="0.20208in"/>
      </text:list-level-style-bullet>
      <text:list-level-style-bullet text:level="3" text:bullet-char="-">
        <style:list-level-properties text:space-before="1.14931in" text:min-label-width="0.35069in"/>
        <style:text-properties fo:color="#003c3b" fo:font-family="Calibri" fo:font-size="0.20208in"/>
      </text:list-level-style-bullet>
      <text:list-level-style-bullet text:level="4" text:bullet-char="-">
        <style:list-level-properties text:space-before="1.64931in" text:min-label-width="0.35069in"/>
        <style:text-properties fo:color="#003c3b" fo:font-family="Calibri" fo:font-size="0.20208in"/>
      </text:list-level-style-bullet>
      <text:list-level-style-bullet text:level="5" text:bullet-char="-">
        <style:list-level-properties text:space-before="2.14931in" text:min-label-width="0.35069in"/>
        <style:text-properties fo:color="#003c3b" fo:font-family="Calibri" fo:font-size="0.20208in"/>
      </text:list-level-style-bullet>
      <text:list-level-style-bullet text:level="6" text:bullet-char="-">
        <style:list-level-properties text:space-before="2.64931in" text:min-label-width="0.35069in"/>
        <style:text-properties fo:color="#003c3b" fo:font-family="Calibri" fo:font-size="0.20208in"/>
      </text:list-level-style-bullet>
      <text:list-level-style-bullet text:level="7" text:bullet-char="-">
        <style:list-level-properties text:space-before="3.14931in" text:min-label-width="0.35069in"/>
        <style:text-properties fo:color="#003c3b" fo:font-family="Calibri" fo:font-size="0.20208in"/>
      </text:list-level-style-bullet>
      <text:list-level-style-bullet text:level="8" text:bullet-char="-">
        <style:list-level-properties text:space-before="3.64931in" text:min-label-width="0.35069in"/>
        <style:text-properties fo:color="#003c3b" fo:font-family="Calibri" fo:font-size="0.20208in"/>
      </text:list-level-style-bullet>
      <text:list-level-style-bullet text:level="9" text:bullet-char="-">
        <style:list-level-properties text:space-before="4.14931in" text:min-label-width="0.35069in"/>
        <style:text-properties fo:color="#003c3b" fo:font-family="Calibri" fo:font-size="0.20208in"/>
      </text:list-level-style-bullet>
    </text:list-style>
    <text:list-style style:name="a1411">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937">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414">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379">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1052">
      <text:list-level-style-number text:level="1" style:num-format="" style:num-list-format-name="">
        <style:list-level-properties text:space-before="0.14931in"/>
      </text:list-level-style-number>
      <text:list-level-style-number text:level="2" style:num-format="" style:num-list-format-name="">
        <style:list-level-properties text:space-before="0.64931in"/>
      </text:list-level-style-number>
      <text:list-level-style-number text:level="3" style:num-format="" style:num-list-format-name="">
        <style:list-level-properties text:space-before="1.14931in"/>
      </text:list-level-style-number>
      <text:list-level-style-number text:level="4" style:num-format="" style:num-list-format-name="">
        <style:list-level-properties text:space-before="1.64931in"/>
      </text:list-level-style-number>
      <text:list-level-style-number text:level="5" style:num-format="" style:num-list-format-name="">
        <style:list-level-properties text:space-before="2.14931in"/>
      </text:list-level-style-number>
      <text:list-level-style-number text:level="6" style:num-format="" style:num-list-format-name="">
        <style:list-level-properties text:space-before="2.64931in"/>
      </text:list-level-style-number>
      <text:list-level-style-number text:level="7" style:num-format="" style:num-list-format-name="">
        <style:list-level-properties text:space-before="3.14931in"/>
      </text:list-level-style-number>
      <text:list-level-style-number text:level="8" style:num-format="" style:num-list-format-name="">
        <style:list-level-properties text:space-before="3.64931in"/>
      </text:list-level-style-number>
      <text:list-level-style-number text:level="9" style:num-format="" style:num-list-format-name="">
        <style:list-level-properties text:space-before="4.14931in"/>
      </text:list-level-style-number>
    </text:list-style>
    <text:list-style style:name="a721">
      <text:list-level-style-bullet text:level="1" text:bullet-char="●">
        <style:list-level-properties text:space-before="0.14583in" text:min-label-width="0.35417in"/>
        <style:text-properties fo:color="#003c3b" fo:font-family="Arial" fo:font-size="0.20833in"/>
      </text:list-level-style-bullet>
      <text:list-level-style-bullet text:level="2" text:bullet-char="●">
        <style:list-level-properties text:space-before="0.64583in" text:min-label-width="0.35417in"/>
        <style:text-properties fo:color="#003c3b" fo:font-family="Arial" fo:font-size="0.20833in"/>
      </text:list-level-style-bullet>
      <text:list-level-style-bullet text:level="3" text:bullet-char="●">
        <style:list-level-properties text:space-before="1.14583in" text:min-label-width="0.35417in"/>
        <style:text-properties fo:color="#003c3b" fo:font-family="Arial" fo:font-size="0.20833in"/>
      </text:list-level-style-bullet>
      <text:list-level-style-bullet text:level="4" text:bullet-char="●">
        <style:list-level-properties text:space-before="1.64583in" text:min-label-width="0.35417in"/>
        <style:text-properties fo:color="#003c3b" fo:font-family="Arial" fo:font-size="0.20833in"/>
      </text:list-level-style-bullet>
      <text:list-level-style-bullet text:level="5" text:bullet-char="●">
        <style:list-level-properties text:space-before="2.14583in" text:min-label-width="0.35417in"/>
        <style:text-properties fo:color="#003c3b" fo:font-family="Arial" fo:font-size="0.20833in"/>
      </text:list-level-style-bullet>
      <text:list-level-style-bullet text:level="6" text:bullet-char="●">
        <style:list-level-properties text:space-before="2.64583in" text:min-label-width="0.35417in"/>
        <style:text-properties fo:color="#003c3b" fo:font-family="Arial" fo:font-size="0.20833in"/>
      </text:list-level-style-bullet>
      <text:list-level-style-bullet text:level="7" text:bullet-char="●">
        <style:list-level-properties text:space-before="3.14583in" text:min-label-width="0.35417in"/>
        <style:text-properties fo:color="#003c3b" fo:font-family="Arial" fo:font-size="0.20833in"/>
      </text:list-level-style-bullet>
      <text:list-level-style-bullet text:level="8" text:bullet-char="●">
        <style:list-level-properties text:space-before="3.64583in" text:min-label-width="0.35417in"/>
        <style:text-properties fo:color="#003c3b" fo:font-family="Arial" fo:font-size="0.20833in"/>
      </text:list-level-style-bullet>
      <text:list-level-style-bullet text:level="9" text:bullet-char="●">
        <style:list-level-properties text:space-before="4.14583in" text:min-label-width="0.35417in"/>
        <style:text-properties fo:color="#003c3b" fo:font-family="Arial" fo:font-size="0.20833in"/>
      </text:list-level-style-bullet>
    </text:list-style>
  </office:automatic-styles>
  <office:body>
    <office:presentation>
      <draw:page draw:name="Slide1" draw:style-name="a602" draw:master-page-name="Master1-Layout1-cust-Cover-Slide_grey_opt1" presentation:presentation-page-layout-name="Master1-PPL1" draw:id="Slide-256">
        <draw:frame draw:id="id165" presentation:style-name="a606" draw:name="Google Shape;208;g339c4082edf_0_31" svg:x="0.42558in" svg:y="1.67052in" svg:width="4.85958in" svg:height="1.875in" presentation:class="title" presentation:placeholder="false">
          <draw:text-box>
            <text:p text:style-name="a605" text:class-names="" text:cond-style-name=""><text:span text:style-name="a603" text:class-names="">Introduction to Large Language Models</text:span><text:span text:style-name="a604" text:class-names=""/></text:p>
          </draw:text-box>
          <svg:title/>
          <svg:desc/>
        </draw:frame>
        <draw:frame draw:id="id166" presentation:style-name="a612" draw:name="Google Shape;209;g339c4082edf_0_31" svg:x="0.4807in" svg:y="4.06603in" svg:width="4.2687in" svg:height="0.46555in" presentation:class="subtitle" presentation:placeholder="false">
          <draw:text-box>
            <text:p text:style-name="a609" text:class-names="" text:cond-style-name=""><text:span text:style-name="a607" text:class-names="">May 2026</text:span><text:span text:style-name="a608" text:class-names=""/></text:p>
            <text:p text:style-name="a611" text:class-names="" text:cond-style-name=""><text:span text:style-name="a610" text:class-names=""/></text:p>
          </draw:text-box>
          <svg:title/>
          <svg:desc/>
        </draw:frame>
        <draw:frame draw:id="id167" draw:style-name="a617" draw:name="Google Shape;210;g339c4082edf_0_31" svg:x="0.46134in" svg:y="2.8125in" svg:width="3.28084in" svg:height="0.87533in">
          <draw:text-box>
            <text:p text:style-name="a616" text:class-names="" text:cond-style-name=""><text:span text:style-name="a613" text:class-names="">Coding for Reproducible Research</text:span><text:span text:style-name="a614" text:class-names="">​</text:span><text:span text:style-name="a615" text:class-names=""/></text:p>
          </draw:text-box>
          <svg:title/>
          <svg:desc/>
        </draw:frame>
        <draw:frame draw:id="id168" draw:style-name="a637" draw:name="Google Shape;211;g339c4082edf_0_31" svg:x="7.25392in" svg:y="0.41328in" svg:width="3.00558in" svg:height="1.99081in">
          <draw:text-box>
            <text:p text:style-name="a621" text:class-names="" text:cond-style-name=""><text:span text:style-name="a618" text:class-names="">Course Leader:</text:span><text:span text:style-name="a619" text:class-names=""><text:s text:c="1"/>​</text:span><text:span text:style-name="a620" text:class-names=""/></text:p>
            <text:list text:style-name="a625">
              <text:list-item>
                <text:p text:style-name="a624" text:class-names="" text:cond-style-name=""><text:span text:style-name="a622" text:class-names="">Finley Gibson</text:span><text:span text:style-name="a623" text:class-names=""/></text:p>
              </text:list-item>
            </text:list>
            <text:p text:style-name="a628" text:class-names="" text:cond-style-name=""><text:span text:style-name="a626" text:class-names="">​</text:span><text:span text:style-name="a627" text:class-names=""/></text:p>
            <text:p text:style-name="a632" text:class-names="" text:cond-style-name=""><text:span text:style-name="a629" text:class-names="">Course Helpers:</text:span><text:span text:style-name="a630" text:class-names=""><text:s text:c="1"/>​</text:span><text:span text:style-name="a631" text:class-names=""/></text:p>
            <text:list text:style-name="a636">
              <text:list-item>
                <text:p text:style-name="a635" text:class-names="" text:cond-style-name=""><text:span text:style-name="a633" text:class-names="">Conor Crilly</text:span><text:span text:style-name="a634" text:class-names=""/></text:p>
              </text:list-item>
            </text:list>
          </draw:text-box>
          <svg:title/>
          <svg:desc/>
        </draw:frame>
        <draw:frame draw:id="id169" draw:style-name="a638" draw:name="Google Shape;212;g339c4082edf_0_31" svg:x="7.98911in" svg:y="2.85156in" svg:width="1.53267in" svg:height="1.53267in" style:rel-width="scale" style:rel-height="scale">
          <draw:image xlink:href="media/image1.png" xlink:type="simple" xlink:show="embed" xlink:actuate="onLoad"/>
          <svg:title/>
          <svg:desc>A qr code with black squares

AI-generated content may be incorrect.</svg:desc>
        </draw:frame>
        <draw:frame draw:id="id170" draw:style-name="a642" draw:name="Google Shape;213;g339c4082edf_0_31" svg:x="0.33333in" svg:y="0.33333in" svg:width="3.28084in" svg:height="3.28084in">
          <draw:text-box>
            <text:p text:style-name="a641" text:class-names="" text:cond-style-name=""><text:span text:style-name="a639" text:class-names=""><text:s text:c="1"/></text:span><text:span text:style-name="a640" text:class-names=""/></text:p>
          </draw:text-box>
          <svg:title/>
          <svg:desc/>
        </draw:frame>
        <draw:frame draw:id="id171" draw:style-name="a646" draw:name="Google Shape;214;g339c4082edf_0_31" svg:x="0.4807in" svg:y="4.66995in" svg:width="6.06693in" svg:height="0.4544in">
          <draw:text-box>
            <text:p text:style-name="a645" text:class-names="" text:cond-style-name=""><text:span text:style-name="a643" text:class-names="">Collaborative doc: https://tinyurl.com/fd3cd22b​</text:span><text:span text:style-name="a644" text:class-names=""/></text:p>
          </draw:text-box>
          <svg:title/>
          <svg:desc/>
        </draw:frame>
        <draw:frame draw:id="id172" draw:style-name="a650" draw:name="Google Shape;215;g339c4082edf_0_31" svg:x="7.98647in" svg:y="4.34036in" svg:width="1.53084in" svg:height="0.43753in">
          <draw:text-box>
            <text:p text:style-name="a649" text:class-names="" text:cond-style-name=""><text:span text:style-name="a647" text:class-names="">Course sign-in</text:span><text:span text:style-name="a648" text:class-names=""/></text:p>
          </draw:text-box>
          <svg:title/>
          <svg:desc/>
        </draw:frame>
        <presentation:notes draw:style-name="a653">
          <draw:page-thumbnail draw:page-number="1" svg:x="6.86979in" svg:y="0.92708in" svg:width="8.24826in" svg:height="4.63889in" presentation:class="page" draw:id="id173" presentation:style-name="a651" draw:name="Google Shape;205;g339c4082edf_0_31:notes">
            <svg:title/>
            <svg:desc/>
          </draw:page-thumbnail>
          <draw:frame draw:id="id174" presentation:style-name="a652" draw:name="Google Shape;206;g339c4082edf_0_31:notes" svg:x="2.1986in" svg:y="5.87481in" svg:width="17.58891in" svg:height="5.56562in" presentation:class="notes" presentation:placeholder="true">
            <draw:text-box/>
            <svg:title/>
            <svg:desc/>
          </draw:frame>
        </presentation:notes>
      </draw:page>
      <draw:page draw:name="Slide2" draw:style-name="a654" draw:master-page-name="Master1-Layout2-cust-Charts-and-Tables" presentation:presentation-page-layout-name="Master1-PPL2" draw:id="Slide-257">
        <draw:frame draw:id="id175" presentation:style-name="a658" draw:name="Google Shape;221;g339c4082edf_0_0" svg:x="0.42664in" svg:y="0.51451in" svg:width="6.80971in" svg:height="0.50525in" presentation:class="title" presentation:placeholder="false">
          <draw:text-box>
            <text:p text:style-name="a657" text:class-names="" text:cond-style-name=""><text:span text:style-name="a655" text:class-names="">Code of Conduct​</text:span><text:span text:style-name="a656" text:class-names=""/></text:p>
          </draw:text-box>
          <svg:title/>
          <svg:desc/>
        </draw:frame>
        <draw:frame draw:id="id176" presentation:style-name="a698" draw:name="Google Shape;222;g339c4082edf_0_0" svg:x="0.46429in" svg:y="1.29869in" svg:width="9.00623in" svg:height="3.91339in" presentation:class="outline" presentation:placeholder="false">
          <draw:text-box>
            <text:list text:style-name="a664">
              <text:list-item>
                <text:p text:style-name="a663" text:class-names="" text:cond-style-name=""><text:span text:style-name="a659" text:class-names="">Our ethos is to provide a welcoming and supportive environment for all people, regardless of background or identity. By registering to attend this workshop, participants are agreeing to abide by the Researcher Development<text:s text:c="1"/></text:span><text:span text:style-name="a660" text:class-names=""><text:a xlink:href="https://www.exeter.ac.uk/media/universityofexeter/doctoralcollege/researcherdevelopment/images/Code_of_conduct.pdf" text:style-name="" text:visited-style-name="">Code of Conduct</text:a></text:span><text:span text:style-name="a661" text:class-names="">.​</text:span><text:span text:style-name="a662" text:class-names=""/></text:p>
              </text:list-item>
            </text:list>
            <text:list text:style-name="a667">
              <text:list-item>
                <text:p text:style-name="a666" text:class-names="" text:cond-style-name=""><text:span text:style-name="a665" text:class-names=""/></text:p>
              </text:list-item>
            </text:list>
            <text:list text:style-name="a671">
              <text:list-item>
                <text:p text:style-name="a670" text:class-names="" text:cond-style-name=""><text:span text:style-name="a668" text:class-names="">Our goal is to support you to develop your programming skill sets to enable you to do cutting edge research. We want to create a positive and professional learning environment and therefore encourage the following kinds of behaviours:​</text:span><text:span text:style-name="a669" text:class-names=""/></text:p>
              </text:list-item>
            </text:list>
            <text:list text:style-name="a674">
              <text:list-item>
                <text:p text:style-name="a673" text:class-names="" text:cond-style-name=""><text:span text:style-name="a672" text:class-names=""/></text:p>
              </text:list-item>
            </text:list>
            <text:list text:style-name="a678">
              <text:list-item>
                <text:p text:style-name="a677" text:class-names="" text:cond-style-name=""><text:span text:style-name="a675" text:class-names="">Show courtesy and respect towards all who attend a workshop or engage in community events.​</text:span><text:span text:style-name="a676" text:class-names=""/></text:p>
              </text:list-item>
            </text:list>
            <text:list text:style-name="a682">
              <text:list-item>
                <text:p text:style-name="a681" text:class-names="" text:cond-style-name=""><text:span text:style-name="a679" text:class-names="">Be respectful of different viewpoints and experiences.​</text:span><text:span text:style-name="a680" text:class-names=""/></text:p>
              </text:list-item>
            </text:list>
            <text:list text:style-name="a686">
              <text:list-item>
                <text:p text:style-name="a685" text:class-names="" text:cond-style-name=""><text:span text:style-name="a683" text:class-names="">Gracefully accept constructive criticism.​</text:span><text:span text:style-name="a684" text:class-names=""/></text:p>
              </text:list-item>
            </text:list>
            <text:list text:style-name="a690">
              <text:list-item>
                <text:p text:style-name="a689" text:class-names="" text:cond-style-name=""><text:span text:style-name="a687" text:class-names="">Be patient if there are technical glitches. While we know something about how to use computers, we are not immune to internet or hardware issues.​</text:span><text:span text:style-name="a688" text:class-names=""/></text:p>
              </text:list-item>
            </text:list>
            <text:list text:style-name="a694">
              <text:list-item>
                <text:p text:style-name="a693" text:class-names="" text:cond-style-name=""><text:span text:style-name="a691" text:class-names="">Respect our policy on not recording workshops to protect the nature of the sessions and ensure we are GDPR compliant.</text:span><text:span text:style-name="a692" text:class-names=""/></text:p>
              </text:list-item>
            </text:list>
            <text:list text:style-name="a697">
              <text:list-item>
                <text:p text:style-name="a696" text:class-names="" text:cond-style-name=""><text:span text:style-name="a695" text:class-names=""/></text:p>
              </text:list-item>
            </text:list>
          </draw:text-box>
          <svg:title/>
          <svg:desc/>
        </draw:frame>
        <presentation:notes draw:style-name="a701">
          <draw:page-thumbnail draw:page-number="2" svg:x="3.66508in" svg:y="0.9276in" svg:width="14.65814in" svg:height="4.63812in" presentation:class="page" draw:id="id177" presentation:style-name="a699" draw:name="Google Shape;218;g339c4082edf_0_0:notes">
            <svg:title/>
            <svg:desc/>
          </draw:page-thumbnail>
          <draw:frame draw:id="id178" presentation:style-name="a700" draw:name="Google Shape;219;g339c4082edf_0_0:notes" svg:x="2.1986in" svg:y="5.87481in" svg:width="17.58891in" svg:height="5.56562in" presentation:class="notes" presentation:placeholder="true">
            <draw:text-box/>
            <svg:title/>
            <svg:desc/>
          </draw:frame>
        </presentation:notes>
      </draw:page>
      <draw:page draw:name="Slide3" draw:style-name="a702" draw:master-page-name="Master1-Layout2-cust-Charts-and-Tables" presentation:presentation-page-layout-name="Master1-PPL2" draw:id="Slide-258">
        <draw:frame draw:id="id179" presentation:style-name="a706" draw:name="Google Shape;227;g339c4082edf_0_6" svg:x="0.42664in" svg:y="0.51451in" svg:width="6.80971in" svg:height="0.50525in" presentation:class="title" presentation:placeholder="false">
          <draw:text-box>
            <text:p text:style-name="a705" text:class-names="" text:cond-style-name=""><text:span text:style-name="a703" text:class-names="">Programme Funding​</text:span><text:span text:style-name="a704" text:class-names=""/></text:p>
          </draw:text-box>
          <svg:title/>
          <svg:desc/>
        </draw:frame>
        <draw:frame draw:id="id180" presentation:style-name="a741" draw:name="Google Shape;228;g339c4082edf_0_6" svg:x="0.46429in" svg:y="1.65108in" svg:width="9.00623in" svg:height="3.56102in" presentation:class="outline" presentation:placeholder="false">
          <draw:text-box>
            <text:list text:style-name="a710">
              <text:list-item>
                <text:p text:style-name="a709" text:class-names="" text:cond-style-name=""><text:span text:style-name="a707" text:class-names="">The CfRR training programme is supported by:​</text:span><text:span text:style-name="a708" text:class-names=""/></text:p>
              </text:list-item>
            </text:list>
            <text:list text:style-name="a713">
              <text:list-item>
                <text:p text:style-name="a712" text:class-names="" text:cond-style-name=""><text:span text:style-name="a711" text:class-names=""/></text:p>
              </text:list-item>
            </text:list>
            <text:list text:style-name="a717">
              <text:list-item>
                <text:p text:style-name="a716" text:class-names="" text:cond-style-name=""><text:span text:style-name="a714" text:class-names="">Research Software Analytics Group​</text:span><text:span text:style-name="a715" text:class-names=""/></text:p>
              </text:list-item>
            </text:list>
            <text:list text:style-name="a721">
              <text:list-item>
                <text:p text:style-name="a720" text:class-names="" text:cond-style-name=""><text:span text:style-name="a718" text:class-names="">Institute for Data Science and Artificial Intelligence (IDSAI)​</text:span><text:span text:style-name="a719" text:class-names=""/></text:p>
              </text:list-item>
            </text:list>
            <text:list text:style-name="a725">
              <text:list-item>
                <text:p text:style-name="a724" text:class-names="" text:cond-style-name=""><text:span text:style-name="a722" text:class-names="">University of Exeter Reproducibility Leadership Team​</text:span><text:span text:style-name="a723" text:class-names=""/></text:p>
              </text:list-item>
            </text:list>
            <text:list text:style-name="a729">
              <text:list-item>
                <text:p text:style-name="a728" text:class-names="" text:cond-style-name=""><text:span text:style-name="a726" text:class-names="">EPSRC Research Software Engineering Fellowship​</text:span><text:span text:style-name="a727" text:class-names=""/></text:p>
              </text:list-item>
            </text:list>
            <text:list text:style-name="a733">
              <text:list-item>
                <text:p text:style-name="a732" text:class-names="" text:cond-style-name=""><text:span text:style-name="a730" text:class-names="">Community of academics who volunteer their time to support delivery ​</text:span><text:span text:style-name="a731" text:class-names=""/></text:p>
              </text:list-item>
            </text:list>
            <text:list text:style-name="a736">
              <text:list-item>
                <text:p text:style-name="a735" text:class-names="" text:cond-style-name=""><text:span text:style-name="a734" text:class-names=""/></text:p>
              </text:list-item>
            </text:list>
            <text:list text:style-name="a740">
              <text:list-item>
                <text:p text:style-name="a739" text:class-names="" text:cond-style-name=""><text:span text:style-name="a737" text:class-names="">To make the case for continued investment, please help us demonstrate the impact of these sessions by attending all courses you register for and providing feedback at the end of the course.</text:span><text:span text:style-name="a738" text:class-names=""/></text:p>
              </text:list-item>
            </text:list>
          </draw:text-box>
          <svg:title/>
          <svg:desc/>
        </draw:frame>
        <presentation:notes draw:style-name="a744">
          <draw:page-thumbnail draw:page-number="3" svg:x="3.66508in" svg:y="0.9276in" svg:width="14.65814in" svg:height="4.63812in" presentation:class="page" draw:id="id181" presentation:style-name="a742" draw:name="Google Shape;224;g339c4082edf_0_6:notes">
            <svg:title/>
            <svg:desc/>
          </draw:page-thumbnail>
          <draw:frame draw:id="id182" presentation:style-name="a743" draw:name="Google Shape;225;g339c4082edf_0_6:notes" svg:x="2.1986in" svg:y="5.87481in" svg:width="17.58891in" svg:height="5.56562in" presentation:class="notes" presentation:placeholder="true">
            <draw:text-box/>
            <svg:title/>
            <svg:desc/>
          </draw:frame>
        </presentation:notes>
      </draw:page>
      <draw:page draw:name="Slide37" draw:style-name="a745" draw:master-page-name="Master1-Layout3-cust-Cover-Slide_green_opt1" presentation:presentation-page-layout-name="Master1-PPL3" draw:id="Slide-292">
        <draw:frame draw:id="id183" presentation:style-name="a752" draw:name="Google Shape;233;p1" svg:x="0.43351in" svg:y="3.05433in" svg:width="5.45276in" svg:height="1.37697in" presentation:class="title" presentation:placeholder="false">
          <draw:text-box>
            <text:p text:style-name="a748" text:class-names="" text:cond-style-name=""><text:span text:style-name="a746" text:class-names="">Intro to Large Language Models (LLMs)</text:span><text:span text:style-name="a747" text:class-names=""/></text:p>
            <text:p text:style-name="a751" text:class-names="" text:cond-style-name=""><text:span text:style-name="a749" text:class-names=""><text:line-break/></text:span><text:span text:style-name="a750" text:class-names=""/></text:p>
          </draw:text-box>
          <svg:title/>
          <svg:desc/>
        </draw:frame>
        <draw:frame draw:id="id184" draw:style-name="a772" draw:name="Google Shape;211;g339c4082edf_0_31" svg:x="7.37892in" svg:y="0.25703in" svg:width="3.00558in" svg:height="2.03072in">
          <draw:text-box>
            <text:p text:style-name="a756" text:class-names="" text:cond-style-name=""><text:span text:style-name="a753" text:class-names="">Course Leader:</text:span><text:span text:style-name="a754" text:class-names=""><text:s text:c="1"/>​</text:span><text:span text:style-name="a755" text:class-names=""/></text:p>
            <text:list text:style-name="a760">
              <text:list-item>
                <text:p text:style-name="a759" text:class-names="" text:cond-style-name=""><text:span text:style-name="a757" text:class-names="">Finley Gibson</text:span><text:span text:style-name="a758" text:class-names=""/></text:p>
              </text:list-item>
            </text:list>
            <text:p text:style-name="a763" text:class-names="" text:cond-style-name=""><text:span text:style-name="a761" text:class-names="">​</text:span><text:span text:style-name="a762" text:class-names=""/></text:p>
            <text:p text:style-name="a767" text:class-names="" text:cond-style-name=""><text:span text:style-name="a764" text:class-names="">Course Helpers:</text:span><text:span text:style-name="a765" text:class-names=""><text:s text:c="1"/>​</text:span><text:span text:style-name="a766" text:class-names=""/></text:p>
            <text:list text:style-name="a771">
              <text:list-item>
                <text:p text:style-name="a770" text:class-names="" text:cond-style-name=""><text:span text:style-name="a768" text:class-names="">Conor Crilly</text:span><text:span text:style-name="a769" text:class-names=""/></text:p>
              </text:list-item>
            </text:list>
          </draw:text-box>
          <svg:title/>
          <svg:desc/>
        </draw:frame>
        <draw:frame draw:id="id185" draw:style-name="a778" draw:name="Google Shape;209;g339c4082edf_0_31" svg:x="0.4807in" svg:y="4.06603in" svg:width="4.2687in" svg:height="0.46555in">
          <draw:text-box>
            <text:p text:style-name="a775" text:class-names="" text:cond-style-name=""><text:span text:style-name="a773" text:class-names="">May 2026</text:span><text:span text:style-name="a774" text:class-names=""/></text:p>
            <text:p text:style-name="a777" text:class-names="" text:cond-style-name=""><text:span text:style-name="a776" text:class-names=""/></text:p>
          </draw:text-box>
          <svg:title/>
          <svg:desc/>
        </draw:frame>
        <presentation:notes draw:style-name="a781">
          <draw:frame draw:id="id186" presentation:style-name="a779" draw:name="Google Shape;230;p1:notes" svg:x="2.1986in" svg:y="5.87481in" svg:width="17.58888in" svg:height="5.56562in" presentation:class="notes" presentation:placeholder="true">
            <draw:text-box/>
            <svg:title/>
            <svg:desc/>
          </draw:frame>
          <draw:page-thumbnail draw:page-number="4" svg:x="6.86979in" svg:y="0.92708in" svg:width="8.24826in" svg:height="4.63889in" presentation:class="page" draw:id="id187" presentation:style-name="a780" draw:name="Google Shape;231;p1:notes">
            <svg:title/>
            <svg:desc/>
          </draw:page-thumbnail>
        </presentation:notes>
      </draw:page>
      <draw:page draw:name="Slide34" draw:style-name="a782" draw:master-page-name="Master1-Layout2-cust-Charts-and-Tables" presentation:presentation-page-layout-name="Master1-PPL2" draw:id="Slide-289">
        <draw:frame draw:id="id188" presentation:style-name="a786" draw:name="Title 1" svg:x="0.42664in" svg:y="0.51451in" svg:width="6.80962in" svg:height="0.50517in" presentation:class="title" presentation:placeholder="false">
          <draw:text-box>
            <text:p text:style-name="a785" text:class-names="" text:cond-style-name=""><text:span text:style-name="a783" text:class-names="">Session structure</text:span><text:span text:style-name="a784" text:class-names=""/></text:p>
          </draw:text-box>
          <svg:title/>
          <svg:desc/>
        </draw:frame>
        <draw:frame draw:id="id189" presentation:style-name="a849" draw:name="Text Placeholder 2" svg:x="1.85491in" svg:y="1.15806in" svg:width="9.00612in" svg:height="3.91342in" presentation:class="outline" presentation:placeholder="false">
          <draw:text-box>
            <text:list text:style-name="a790">
              <text:list-item>
                <text:p text:style-name="a789" text:class-names="" text:cond-style-name=""><text:span text:style-name="a787" text:class-names="">Welcome and hello: 10 mins</text:span><text:span text:style-name="a788" text:class-names=""/></text:p>
              </text:list-item>
            </text:list>
            <text:list text:style-name="a794">
              <text:list-item>
                <text:p text:style-name="a793" text:class-names="" text:cond-style-name=""><text:span text:style-name="a791" text:class-names="">Intro slides: 45 mins </text:span><text:span text:style-name="a792" text:class-names=""/></text:p>
              </text:list-item>
            </text:list>
            <text:list text:style-name="a798">
              <text:list-item>
                <text:p text:style-name="a797" text:class-names="" text:cond-style-name=""><text:span text:style-name="a795" text:class-names=""> - What is an LLM?</text:span><text:span text:style-name="a796" text:class-names=""/></text:p>
              </text:list-item>
            </text:list>
            <text:list text:style-name="a802">
              <text:list-item>
                <text:p text:style-name="a801" text:class-names="" text:cond-style-name=""><text:span text:style-name="a799" text:class-names=""> - How did we get here?</text:span><text:span text:style-name="a800" text:class-names=""/></text:p>
              </text:list-item>
            </text:list>
            <text:list text:style-name="a806">
              <text:list-item>
                <text:p text:style-name="a805" text:class-names="" text:cond-style-name=""><text:span text:style-name="a803" text:class-names=""> -  Current LLMs</text:span><text:span text:style-name="a804" text:class-names=""/></text:p>
              </text:list-item>
            </text:list>
            <text:list text:style-name="a809">
              <text:list-item>
                <text:p text:style-name="a808" text:class-names="" text:cond-style-name=""><text:span text:style-name="a807" text:class-names="">Break: 10 mins</text:span></text:p>
              </text:list-item>
            </text:list>
            <text:list text:style-name="a813">
              <text:list-item>
                <text:p text:style-name="a812" text:class-names="" text:cond-style-name=""><text:span text:style-name="a810" text:class-names="">Interactive session: 65 mins</text:span><text:span text:style-name="a811" text:class-names=""/></text:p>
              </text:list-item>
            </text:list>
            <text:list text:style-name="a816">
              <text:list-item>
                <text:p text:style-name="a815" text:class-names="" text:cond-style-name=""><text:span text:style-name="a814" text:class-names=""> - 01_tokenization_explorer.ipynb: (15 min)</text:span></text:p>
              </text:list-item>
            </text:list>
            <text:list text:style-name="a820">
              <text:list-item>
                <text:p text:style-name="a819" text:class-names="" text:cond-style-name=""><text:span text:style-name="a817" text:class-names=""> - 02_embeddings_visualization.ipynb: (25 min)</text:span><text:span text:style-name="a818" text:class-names=""/></text:p>
              </text:list-item>
            </text:list>
            <text:list text:style-name="a824">
              <text:list-item>
                <text:p text:style-name="a823" text:class-names="" text:cond-style-name=""><text:span text:style-name="a821" text:class-names=""> - 03_prompt_engineering_playground.ipynb: (25 min)</text:span><text:span text:style-name="a822" text:class-names=""/></text:p>
              </text:list-item>
            </text:list>
            <text:list text:style-name="a828">
              <text:list-item>
                <text:p text:style-name="a827" text:class-names="" text:cond-style-name=""><text:span text:style-name="a825" text:class-names="">Break: 10 mins</text:span><text:span text:style-name="a826" text:class-names=""/></text:p>
              </text:list-item>
            </text:list>
            <text:list text:style-name="a831">
              <text:list-item>
                <text:p text:style-name="a830" text:class-names="" text:cond-style-name=""><text:span text:style-name="a829" text:class-names="">Second slides: 20mins</text:span></text:p>
              </text:list-item>
            </text:list>
            <text:list text:style-name="a835">
              <text:list-item>
                <text:p text:style-name="a834" text:class-names="" text:cond-style-name=""><text:span text:style-name="a832" text:class-names="">Fine tuning demo: 15 minutes</text:span><text:span text:style-name="a833" text:class-names=""/></text:p>
              </text:list-item>
            </text:list>
            <text:list text:style-name="a839">
              <text:list-item>
                <text:p text:style-name="a838" text:class-names="" text:cond-style-name=""><text:span text:style-name="a836" text:class-names="">Q&amp;A: 10 mins</text:span><text:span text:style-name="a837" text:class-names=""/></text:p>
              </text:list-item>
            </text:list>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text:p>
              </text:list-item>
            </text:list>
            <text:list text:style-name="a848">
              <text:list-item>
                <text:p text:style-name="a847" text:class-names="" text:cond-style-name=""><text:span text:style-name="a846" text:class-names=""/></text:p>
              </text:list-item>
            </text:list>
          </draw:text-box>
          <svg:title/>
          <svg:desc/>
        </draw:frame>
        <draw:frame draw:id="id190" draw:style-name="a855" draw:name="TextBox 4" svg:x="0.16385in" svg:y="1.1459in" svg:width="1.92736in" svg:height="0.60586in">
          <draw:text-box>
            <text:p text:style-name="a854" text:class-names="" text:cond-style-name=""><text:span text:style-name="a850" text:class-names=""><text:line-break/></text:span><text:span text:style-name="a851" text:class-names="">(You are here) </text:span><text:span text:style-name="a852" text:class-names="">→</text:span><text:span text:style-name="a853" text:class-names=""> </text:span></text:p>
          </draw:text-box>
          <svg:title/>
          <svg:desc/>
        </draw:frame>
      </draw:page>
      <draw:page draw:name="Slide4" draw:style-name="a856" draw:master-page-name="Master1-Layout3-cust-Cover-Slide_green_opt1" presentation:presentation-page-layout-name="Master1-PPL3" draw:id="Slide-259">
        <draw:frame draw:id="id191" presentation:style-name="a864" draw:name="Google Shape;233;p1" svg:x="0.43351in" svg:y="3.05433in" svg:width="5.45276in" svg:height="1.37697in" presentation:class="title" presentation:placeholder="false">
          <draw:text-box>
            <text:p text:style-name="a859" text:class-names="" text:cond-style-name=""><text:span text:style-name="a857" text:class-names="">Intro to Large Language Models (LLMs)</text:span><text:span text:style-name="a858" text:class-names=""/></text:p>
            <text:p text:style-name="a863" text:class-names="" text:cond-style-name=""><text:span text:style-name="a860" text:class-names=""><text:line-break/></text:span><text:span text:style-name="a861" text:class-names="">Part 1 - What is an LLM?</text:span><text:span text:style-name="a862" text:class-names=""/></text:p>
          </draw:text-box>
          <svg:title/>
          <svg:desc/>
        </draw:frame>
        <draw:frame draw:id="id192" draw:style-name="a870" draw:name="Google Shape;209;g339c4082edf_0_31" svg:x="0.4807in" svg:y="4.06603in" svg:width="4.2687in" svg:height="0.46555in">
          <draw:text-box>
            <text:p text:style-name="a867" text:class-names="" text:cond-style-name=""><text:span text:style-name="a865" text:class-names="">May 2026</text:span><text:span text:style-name="a866" text:class-names=""/></text:p>
            <text:p text:style-name="a869" text:class-names="" text:cond-style-name=""><text:span text:style-name="a868" text:class-names=""/></text:p>
          </draw:text-box>
          <svg:title/>
          <svg:desc/>
        </draw:frame>
        <presentation:notes draw:style-name="a873">
          <draw:frame draw:id="id193" presentation:style-name="a871" draw:name="Google Shape;230;p1:notes" svg:x="2.1986in" svg:y="5.87481in" svg:width="17.58888in" svg:height="5.56562in" presentation:class="notes" presentation:placeholder="true">
            <draw:text-box/>
            <svg:title/>
            <svg:desc/>
          </draw:frame>
          <draw:page-thumbnail draw:page-number="6" svg:x="6.86979in" svg:y="0.92708in" svg:width="8.24826in" svg:height="4.63889in" presentation:class="page" draw:id="id194" presentation:style-name="a872" draw:name="Google Shape;231;p1:notes">
            <svg:title/>
            <svg:desc/>
          </draw:page-thumbnail>
        </presentation:notes>
      </draw:page>
      <draw:page draw:name="Slide6" draw:style-name="a874" draw:master-page-name="Master1-Layout2-cust-Charts-and-Tables" presentation:presentation-page-layout-name="Master1-PPL2" draw:id="Slide-261">
        <draw:frame draw:id="id195" draw:layer="Invisible" presentation:style-name="a878" draw:name="Google Shape;244;g3395cce3112_0_206" svg:x="0.42664in" svg:y="0.51451in" svg:width="6.80971in" svg:height="0.50525in" presentation:class="title" presentation:placeholder="false">
          <draw:text-box>
            <text:p text:style-name="a877" text:class-names="" text:cond-style-name=""><text:span text:style-name="a875" text:class-names="">Mentimeter slide</text:span><text:span text:style-name="a876" text:class-names=""/></text:p>
          </draw:text-box>
          <svg:title/>
          <svg:desc/>
        </draw:frame>
        <draw:frame draw:id="id196" draw:style-name="a882" draw:name="Google Shape;245;g3395cce3112_0_206" svg:x="-0.23375in" svg:y="1.13984in" svg:width="9.31824in" svg:height="0.8668in">
          <draw:text-box>
            <text:p text:style-name="a881" text:class-names="" text:cond-style-name=""><text:span text:style-name="a879" text:class-names="">Discuss with your neighbour!</text:span><text:span text:style-name="a880" text:class-names=""/></text:p>
          </draw:text-box>
          <svg:title/>
          <svg:desc/>
        </draw:frame>
        <draw:frame draw:id="id197" draw:style-name="a886" draw:name="Google Shape;238;p2" svg:x="0.42664in" svg:y="0.51451in" svg:width="6.98931in" svg:height="0.50517in">
          <draw:text-box>
            <text:p text:style-name="a885" text:class-names="" text:cond-style-name=""><text:span text:style-name="a883" text:class-names="">What is an LLM &amp; what does one do?</text:span><text:span text:style-name="a884" text:class-names=""/></text:p>
          </draw:text-box>
          <svg:title/>
          <svg:desc/>
        </draw:frame>
        <draw:frame draw:id="id198" draw:style-name="a887" draw:name="Picture 4" svg:x="3.48438in" svg:y="2.41406in" svg:width="2.14063in" svg:height="2.14063in" style:rel-width="scale" style:rel-height="scale">
          <draw:image xlink:href="media/image2.png" xlink:type="simple" xlink:show="embed" xlink:actuate="onLoad"/>
          <svg:title/>
          <svg:desc>A qr code with a paper crane

AI-generated content may be incorrect.</svg:desc>
        </draw:frame>
        <draw:frame draw:id="id199" draw:style-name="a891" draw:name="Google Shape;215;g339c4082edf_0_31" svg:x="2.83023in" svg:y="4.5513in" svg:width="3.84334in" svg:height="0.43753in">
          <draw:text-box>
            <text:p text:style-name="a890" text:class-names="" text:cond-style-name=""><text:span text:style-name="a888" text:class-names="">Share answers and suggestions here.</text:span><text:span text:style-name="a889" text:class-names=""/></text:p>
          </draw:text-box>
          <svg:title/>
          <svg:desc/>
        </draw:frame>
        <presentation:notes draw:style-name="a894">
          <draw:page-thumbnail draw:page-number="7" svg:x="6.86979in" svg:y="0.92708in" svg:width="8.24826in" svg:height="4.63889in" presentation:class="page" draw:id="id200" presentation:style-name="a892" draw:name="Google Shape;241;g3395cce3112_0_206:notes">
            <svg:title/>
            <svg:desc/>
          </draw:page-thumbnail>
          <draw:frame draw:id="id201" presentation:style-name="a893" draw:name="Google Shape;242;g3395cce3112_0_206:notes" svg:x="2.1986in" svg:y="5.87481in" svg:width="17.58891in" svg:height="5.56562in" presentation:class="notes" presentation:placeholder="true">
            <draw:text-box/>
            <svg:title/>
            <svg:desc/>
          </draw:frame>
        </presentation:notes>
      </draw:page>
      <draw:page draw:name="Slide7" draw:style-name="a895" draw:master-page-name="Master1-Layout2-cust-Charts-and-Tables" presentation:presentation-page-layout-name="Master1-PPL2" draw:id="Slide-262">
        <draw:frame draw:style-name="a896" draw:name="Object 3" svg:x="0.14063in" svg:y="0.01563in" svg:width="9.82812in" svg:height="5.53906in" style:rel-width="scale" style:rel-height="scale">
          <draw:image xlink:href="media/image3.png" xlink:type="simple" xlink:show="embed" xlink:actuate="onLoad"/>
          <svg:title/>
          <svg:desc/>
        </draw:frame>
        <draw:frame draw:id="id202" draw:style-name="a897" draw:name="Picture 5" svg:x="8.71875in" svg:y="0.4375in" svg:width="1.28125in" svg:height="1.28125in" style:rel-width="scale" style:rel-height="scale">
          <draw:image xlink:href="media/image2.png" xlink:type="simple" xlink:show="embed" xlink:actuate="onLoad"/>
          <svg:title/>
          <svg:desc>A qr code with a paper crane

AI-generated content may be incorrect.</svg:desc>
        </draw:frame>
        <presentation:notes draw:style-name="a900">
          <draw:page-thumbnail draw:page-number="8" svg:x="6.86979in" svg:y="0.92708in" svg:width="8.24826in" svg:height="4.63889in" presentation:class="page" draw:id="id203" presentation:style-name="a898" draw:name="Google Shape;248;g3d7fcb2065d_0_0:notes">
            <svg:title/>
            <svg:desc/>
          </draw:page-thumbnail>
          <draw:frame draw:id="id204" presentation:style-name="a899" draw:name="Google Shape;249;g3d7fcb2065d_0_0:notes" svg:x="2.1986in" svg:y="5.87481in" svg:width="17.58891in" svg:height="5.56562in" presentation:class="notes" presentation:placeholder="true">
            <draw:text-box/>
            <svg:title/>
            <svg:desc/>
          </draw:frame>
        </presentation:notes>
      </draw:page>
      <draw:page draw:name="Slide32" draw:style-name="a901" draw:master-page-name="Master1-Layout2-cust-Charts-and-Tables" presentation:presentation-page-layout-name="Master1-PPL2" draw:id="Slide-287">
        <draw:frame draw:id="id205" presentation:style-name="a905" draw:name="Title 1" svg:x="0.45789in" svg:y="0.51451in" svg:width="7.15337in" svg:height="0.50517in" presentation:class="title" presentation:placeholder="false">
          <draw:text-box>
            <text:p text:style-name="a904" text:class-names="" text:cond-style-name=""><text:span text:style-name="a902" text:class-names="">What is an LLM &amp; what does one do?<text:s text:c="1"/></text:span><text:span text:style-name="a903" text:class-names=""/></text:p>
          </draw:text-box>
          <svg:title/>
          <svg:desc/>
        </draw:frame>
        <draw:frame draw:id="id206" presentation:style-name="a962" draw:name="Text Placeholder 2" svg:x="0.46429in" svg:y="1.29869in" svg:width="9.00612in" svg:height="3.91342in" presentation:class="outline" presentation:placeholder="false">
          <draw:text-box>
            <text:list text:style-name="a909">
              <text:list-item>
                <text:p text:style-name="a908" text:class-names="" text:cond-style-name=""><text:span text:style-name="a906" text:class-names="">How does an LLM do all this? </text:span><text:span text:style-name="a907" text:class-names=""/></text:p>
              </text:list-item>
            </text:list>
            <text:list text:style-name="a913">
              <text:list-item>
                <text:p text:style-name="a912" text:class-names="" text:cond-style-name=""><text:span text:style-name="a910" text:class-names="">What is it really doing? </text:span><text:span text:style-name="a911" text:class-names=""/></text:p>
              </text:list-item>
            </text:list>
            <text:list text:style-name="a917">
              <text:list-item>
                <text:p text:style-name="a916" text:class-names="" text:cond-style-name=""><text:span text:style-name="a914" text:class-names="">Understand the<text:s text:c="1"/></text:span><text:span text:style-name="a915" text:class-names="">mechanism by which it does all these things. </text:span></text:p>
              </text:list-item>
            </text:list>
            <text:list text:style-name="a924">
              <text:list-item>
                <text:p text:style-name="a923" text:class-names="" text:cond-style-name=""><text:span text:style-name="a918" text:class-names="">Unpick the components that give this<text:s text:c="1"/></text:span><text:span text:style-name="a919" text:class-names="">appearance</text:span><text:span text:style-name="a920" text:class-names=""><text:s text:c="1"/>of<text:s text:c="1"/></text:span><text:span text:style-name="a921" text:class-names="">intelligence</text:span><text:span text:style-name="a922" text:class-names="">.</text:span></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Answer: An LLM predicts the next token in a sequence</text:span></text:p>
              </text:list-item>
            </text:list>
            <text:list text:style-name="a933">
              <text:list-item>
                <text:p text:style-name="a932" text:class-names="" text:cond-style-name=""><text:span text:style-name="a931" text:class-names=""/></text:p>
              </text:list-item>
            </text:list>
            <text:list text:style-name="a937">
              <text:list-item>
                <text:p text:style-name="a936" text:class-names="" text:cond-style-name=""><text:span text:style-name="a934" text:class-names="">Desired outcomes:</text:span><text:span text:style-name="a935" text:class-names=""/></text:p>
              </text:list-item>
            </text:list>
            <text:list text:style-name="a941">
              <text:list-item>
                <text:p text:style-name="a940" text:class-names="" text:cond-style-name=""><text:span text:style-name="a938" text:class-names="">Better understanding of what an LLM can do. </text:span><text:span text:style-name="a939" text:class-names=""/></text:p>
              </text:list-item>
            </text:list>
            <text:list text:style-name="a944">
              <text:list-item>
                <text:p text:style-name="a943" text:class-names="" text:cond-style-name=""><text:span text:style-name="a942" text:class-names="">What it can't do. </text:span></text:p>
              </text:list-item>
            </text:list>
            <text:list text:style-name="a948">
              <text:list-item>
                <text:p text:style-name="a947" text:class-names="" text:cond-style-name=""><text:span text:style-name="a945" text:class-names="">How we can get the most out of LLMs. </text:span><text:span text:style-name="a946" text:class-names=""/></text:p>
              </text:list-item>
            </text:list>
            <text:list text:style-name="a952">
              <text:list-item>
                <text:p text:style-name="a951" text:class-names="" text:cond-style-name=""><text:span text:style-name="a949" text:class-names="">Understand the answer above. </text:span><text:span text:style-name="a950" text:class-names=""/></text:p>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text:p>
              </text:list-item>
            </text:list>
            <text:list text:style-name="a961">
              <text:list-item>
                <text:p text:style-name="a960" text:class-names="" text:cond-style-name=""><text:span text:style-name="a959" text:class-names=""/></text:p>
              </text:list-item>
            </text:list>
          </draw:text-box>
          <svg:title/>
          <svg:desc/>
        </draw:frame>
      </draw:page>
      <draw:page draw:name="Slide35" draw:style-name="a963" draw:master-page-name="Master1-Layout3-cust-Cover-Slide_green_opt1" presentation:presentation-page-layout-name="Master1-PPL3" draw:id="Slide-290">
        <draw:frame draw:id="id207" presentation:style-name="a971" draw:name="Google Shape;233;p1" svg:x="0.43351in" svg:y="3.05433in" svg:width="5.45276in" svg:height="1.37697in" presentation:class="title" presentation:placeholder="false">
          <draw:text-box>
            <text:p text:style-name="a966" text:class-names="" text:cond-style-name=""><text:span text:style-name="a964" text:class-names="">Intro to Large Language Models (LLMs)</text:span><text:span text:style-name="a965" text:class-names=""/></text:p>
            <text:p text:style-name="a970" text:class-names="" text:cond-style-name=""><text:span text:style-name="a967" text:class-names=""><text:line-break/></text:span><text:span text:style-name="a968" text:class-names="">Part 2 – How did we get here?</text:span><text:span text:style-name="a969" text:class-names=""/></text:p>
          </draw:text-box>
          <svg:title/>
          <svg:desc/>
        </draw:frame>
        <presentation:notes draw:style-name="a974">
          <draw:frame draw:id="id208" presentation:style-name="a972" draw:name="Google Shape;230;p1:notes" svg:x="2.1986in" svg:y="5.87481in" svg:width="17.58888in" svg:height="5.56562in" presentation:class="notes" presentation:placeholder="true">
            <draw:text-box/>
            <svg:title/>
            <svg:desc/>
          </draw:frame>
          <draw:page-thumbnail draw:page-number="10" svg:x="6.86979in" svg:y="0.92708in" svg:width="8.24826in" svg:height="4.63889in" presentation:class="page" draw:id="id209" presentation:style-name="a973" draw:name="Google Shape;231;p1:notes">
            <svg:title/>
            <svg:desc/>
          </draw:page-thumbnail>
        </presentation:notes>
      </draw:page>
      <draw:page draw:name="Slide33" draw:style-name="a975" draw:master-page-name="Master1-Layout2-cust-Charts-and-Tables" presentation:presentation-page-layout-name="Master1-PPL2" draw:id="Slide-288">
        <draw:frame draw:id="id210" presentation:style-name="a979" draw:name="Title 1" svg:x="0.45789in" svg:y="0.51451in" svg:width="7.06743in" svg:height="0.50517in" presentation:class="title" presentation:placeholder="false">
          <draw:text-box>
            <text:p text:style-name="a978" text:class-names="" text:cond-style-name=""><text:span text:style-name="a976" text:class-names="">Machine Learning &amp;Neural Networks</text:span><text:span text:style-name="a977" text:class-names=""/></text:p>
          </draw:text-box>
          <svg:title/>
          <svg:desc/>
        </draw:frame>
        <draw:frame draw:id="id211" presentation:style-name="a1036" draw:name="Text Placeholder 2" svg:x="0.46429in" svg:y="1.29087in" svg:width="9.00612in" svg:height="3.91342in" presentation:class="outline" presentation:placeholder="false">
          <draw:text-box>
            <text:list text:style-name="a983">
              <text:list-item>
                <text:p text:style-name="a982" text:class-names="" text:cond-style-name=""><text:span text:style-name="a980" text:class-names="">Algorithm: Computational set of instructions to solve a problem or perform a task</text:span><text:span text:style-name="a981" text:class-names=""/></text:p>
              </text:list-item>
            </text:list>
            <text:list text:style-name="a987">
              <text:list-item>
                <text:p text:style-name="a986" text:class-names="" text:cond-style-name=""><text:span text:style-name="a984" text:class-names="">Input -&gt; Algorithm -&gt; output</text:span><text:span text:style-name="a985" text:class-names=""/></text:p>
              </text:list-item>
            </text:list>
            <text:list text:style-name="a992">
              <text:list-item>
                <text:p text:style-name="a991" text:class-names="" text:cond-style-name=""><text:span text:style-name="a988" text:class-names=""><text:line-break/><text:line-break/></text:span><text:span text:style-name="a989" text:class-names="">Traditional approach:</text:span><text:span text:style-name="a990" text:class-names=""/></text:p>
              </text:list-item>
            </text:list>
            <text:list text:style-name="a996">
              <text:list-item>
                <text:p text:style-name="a995" text:class-names="" text:cond-style-name=""><text:span text:style-name="a993" text:class-names="">Write some logic using domain knowledge</text:span><text:span text:style-name="a994" text:class-names=""/></text:p>
              </text:list-item>
            </text:list>
            <text:list text:style-name="a999">
              <text:list-item>
                <text:p text:style-name="a998" text:class-names="" text:cond-style-name=""><text:span text:style-name="a997" text:class-names=""/></text:p>
              </text:list-item>
            </text:list>
            <text:list text:style-name="a1003">
              <text:list-item>
                <text:p text:style-name="a1002" text:class-names="" text:cond-style-name=""><text:span text:style-name="a1000" text:class-names="">Machine learning approach:</text:span><text:span text:style-name="a1001" text:class-names=""/></text:p>
              </text:list-item>
            </text:list>
            <text:list text:style-name="a1007">
              <text:list-item>
                <text:p text:style-name="a1006" text:class-names="" text:cond-style-name=""><text:span text:style-name="a1004" text:class-names="">Apply no domain knowledge </text:span><text:span text:style-name="a1005" text:class-names=""/></text:p>
              </text:list-item>
            </text:list>
            <text:list text:style-name="a1011">
              <text:list-item>
                <text:p text:style-name="a1010" text:class-names="" text:cond-style-name=""><text:span text:style-name="a1008" text:class-names="">Supply data</text:span><text:span text:style-name="a1009" text:class-names=""/></text:p>
              </text:list-item>
            </text:list>
            <text:list text:style-name="a1015">
              <text:list-item>
                <text:p text:style-name="a1014" text:class-names="" text:cond-style-name=""><text:span text:style-name="a1012" text:class-names="">Let the machine figure it out</text:span><text:span text:style-name="a1013" text:class-names=""/></text:p>
              </text:list-item>
            </text:list>
            <text:list text:style-name="a1020">
              <text:list-item>
                <text:p text:style-name="a1019" text:class-names="" text:cond-style-name=""><text:span text:style-name="a1016" text:class-names="">As long as we can express the formulation mathematically we can automate the tuning of the parameters to get the best result for our</text:span><text:span text:style-name="a1017" text:class-names=""><text:s text:c="1"/>data. </text:span><text:span text:style-name="a1018" text:class-names=""/></text:p>
              </text:list-item>
            </text:list>
            <text:list text:style-name="a1023">
              <text:list-item>
                <text:p text:style-name="a1022" text:class-names="" text:cond-style-name=""><text:span text:style-name="a1021" text:class-names=""/></text:p>
              </text:list-item>
            </text:list>
            <text:list text:style-name="a1026">
              <text:list-item>
                <text:p text:style-name="a1025" text:class-names="" text:cond-style-name=""><text:span text:style-name="a1024" text:class-names=""/></text:p>
              </text:list-item>
            </text:list>
            <text:list text:style-name="a1029">
              <text:list-item>
                <text:p text:style-name="a1028" text:class-names="" text:cond-style-name=""><text:span text:style-name="a1027" text:class-names=""/></text:p>
              </text:list-item>
            </text:list>
            <text:list text:style-name="a1032">
              <text:list-item>
                <text:p text:style-name="a1031" text:class-names="" text:cond-style-name=""><text:span text:style-name="a1030" text:class-names=""/></text:p>
              </text:list-item>
            </text:list>
            <text:list text:style-name="a1035">
              <text:list-item>
                <text:p text:style-name="a1034" text:class-names="" text:cond-style-name=""><text:span text:style-name="a1033" text:class-names=""/></text:p>
              </text:list-item>
            </text:list>
          </draw:text-box>
          <svg:title/>
          <svg:desc/>
        </draw:frame>
      </draw:page>
      <draw:page draw:name="Slide38" draw:style-name="a1037" draw:master-page-name="Master1-Layout2-cust-Charts-and-Tables" presentation:presentation-page-layout-name="Master1-PPL2" draw:id="Slide-293">
        <draw:frame draw:id="id212" presentation:style-name="a1041" draw:name="Title 1" svg:x="0.45789in" svg:y="0.51451in" svg:width="7.06743in" svg:height="0.50517in" presentation:class="title" presentation:placeholder="false">
          <draw:text-box>
            <text:p text:style-name="a1040" text:class-names="" text:cond-style-name=""><text:span text:style-name="a1038" text:class-names="">Machine Learning &amp;Neural Networks</text:span><text:span text:style-name="a1039" text:class-names=""/></text:p>
          </draw:text-box>
          <svg:title/>
          <svg:desc/>
        </draw:frame>
        <draw:frame draw:id="id213" presentation:style-name="a1084" draw:name="Text Placeholder 2" svg:x="0.46429in" svg:y="1.29869in" svg:width="9.00612in" svg:height="3.91342in" presentation:class="outline" presentation:placeholder="false">
          <draw:text-box>
            <text:list text:style-name="a1045">
              <text:list-item>
                <text:p text:style-name="a1044" text:class-names="" text:cond-style-name=""><text:span text:style-name="a1042" text:class-names="">Neural Network mechanism</text:span><text:span text:style-name="a1043" text:class-names=""/></text:p>
              </text:list-item>
            </text:list>
            <text:list text:style-name="a1048">
              <text:list-item>
                <text:p text:style-name="a1047" text:class-names="" text:cond-style-name=""><text:span text:style-name="a1046" text:class-names=""/></text:p>
              </text:list-item>
            </text:list>
            <text:list text:style-name="a1052">
              <text:list-item>
                <text:p text:style-name="a1051" text:class-names="" text:cond-style-name=""><text:span text:style-name="a1049" text:class-names="">Node diagram</text:span><text:span text:style-name="a1050" text:class-names=""/></text:p>
              </text:list-item>
            </text:list>
            <text:list text:style-name="a1055">
              <text:list-item>
                <text:p text:style-name="a1054" text:class-names="" text:cond-style-name=""><text:span text:style-name="a1053" text:class-names=""/></text:p>
              </text:list-item>
            </text:list>
            <text:list text:style-name="a1059">
              <text:list-item>
                <text:p text:style-name="a1058" text:class-names="" text:cond-style-name=""><text:span text:style-name="a1056" text:class-names="">Longer equation with more parameters</text:span><text:span text:style-name="a1057" text:class-names=""/></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Can be highly expressive with lots of terms</text:span></text:p>
              </text:list-item>
            </text:list>
            <text:list text:style-name="a1069">
              <text:list-item>
                <text:p text:style-name="a1068" text:class-names="" text:cond-style-name=""><text:span text:style-name="a1066" text:class-names="">Not just a straight line</text:span><text:span text:style-name="a1067" text:class-names=""/></text:p>
              </text:list-item>
            </text:list>
            <text:list text:style-name="a1073">
              <text:list-item>
                <text:p text:style-name="a1072" text:class-names="" text:cond-style-name=""><text:span text:style-name="a1070" text:class-names="">Not just two inputs</text:span><text:span text:style-name="a1071" text:class-names=""/></text:p>
              </text:list-item>
            </text:list>
            <text:list text:style-name="a1076">
              <text:list-item>
                <text:p text:style-name="a1075" text:class-names="" text:cond-style-name=""><text:span text:style-name="a1074" text:class-names=""/></text:p>
              </text:list-item>
            </text:list>
            <text:list text:style-name="a1079">
              <text:list-item>
                <text:p text:style-name="a1078" text:class-names="" text:cond-style-name=""><text:span text:style-name="a1077" text:class-names="">Hard to set the exact values of weights</text:span></text:p>
              </text:list-item>
            </text:list>
            <text:list text:style-name="a1083">
              <text:list-item>
                <text:p text:style-name="a1082" text:class-names="" text:cond-style-name=""><text:span text:style-name="a1080" text:class-names="">Need more data</text:span><text:span text:style-name="a1081" text:class-names=""/></text:p>
              </text:list-item>
            </text:list>
          </draw:text-box>
          <svg:title/>
          <svg:desc/>
        </draw:frame>
      </draw:page>
      <draw:page draw:name="Slide40" draw:style-name="a1085" draw:master-page-name="Master1-Layout2-cust-Charts-and-Tables" presentation:presentation-page-layout-name="Master1-PPL2" draw:id="Slide-295">
        <draw:frame draw:id="id214" presentation:style-name="a1089" draw:name="Title 1" svg:x="0.45789in" svg:y="0.51451in" svg:width="7.06743in" svg:height="0.50517in" presentation:class="title" presentation:placeholder="false">
          <draw:text-box>
            <text:p text:style-name="a1088" text:class-names="" text:cond-style-name=""><text:span text:style-name="a1086" text:class-names="">Machine Learning &amp;Neural Networks</text:span><text:span text:style-name="a1087" text:class-names=""/></text:p>
          </draw:text-box>
          <svg:title/>
          <svg:desc/>
        </draw:frame>
        <draw:frame draw:id="id215" presentation:style-name="a1131" draw:name="Text Placeholder 2" svg:x="0.46429in" svg:y="1.29869in" svg:width="9.00612in" svg:height="3.91342in" presentation:class="outline" presentation:placeholder="false">
          <draw:text-box>
            <text:list text:style-name="a1095">
              <text:list-item>
                <text:p text:style-name="a1094" text:class-names="" text:cond-style-name=""><text:span text:style-name="a1090" text:class-names="">Problems with this mechanism</text:span><text:span text:style-name="a1091" text:class-names=""><text:line-break/><text:line-break/></text:span><text:span text:style-name="a1092" text:class-names="">- Slow</text:span><text:span text:style-name="a1093" text:class-names=""/></text:p>
              </text:list-item>
            </text:list>
            <text:list text:style-name="a1098">
              <text:list-item>
                <text:p text:style-name="a1097" text:class-names="" text:cond-style-name=""><text:span text:style-name="a1096" text:class-names=""/></text:p>
              </text:list-item>
            </text:list>
            <text:list text:style-name="a1101">
              <text:list-item>
                <text:p text:style-name="a1100" text:class-names="" text:cond-style-name=""><text:span text:style-name="a1099" text:class-names="">Fixed input size</text:span></text:p>
              </text:list-item>
            </text:list>
            <text:list text:style-name="a1104">
              <text:list-item>
                <text:list text:style-name="a1104">
                  <text:list-item>
                    <text:p text:style-name="a1103" text:class-names="" text:cond-style-name=""><text:span text:style-name="a1102" text:class-names="">Good for things like images with a known size</text:span></text:p>
                  </text:list-item>
                </text:list>
              </text:list-item>
            </text:list>
            <text:list text:style-name="a1108">
              <text:list-item>
                <text:list text:style-name="a1108">
                  <text:list-item>
                    <text:p text:style-name="a1107" text:class-names="" text:cond-style-name=""><text:span text:style-name="a1105" text:class-names="">Bad for things like text/chat bots, where input size can va</text:span><text:span text:style-name="a1106" text:class-names="">ry. </text:span></text:p>
                  </text:list-item>
                </text:list>
              </text:list-item>
            </text:list>
            <text:list text:style-name="a1112">
              <text:list-item>
                <text:p text:style-name="a1111" text:class-names="" text:cond-style-name=""><text:span text:style-name="a1109" text:class-names="">Requires numbers</text:span><text:span text:style-name="a1110" text:class-names=""/></text:p>
              </text:list-item>
            </text:list>
            <text:list text:style-name="a1115">
              <text:list-item>
                <text:p text:style-name="a1114" text:class-names="" text:cond-style-name=""><text:span text:style-name="a1113" text:class-names=""/></text:p>
              </text:list-item>
            </text:list>
            <text:list text:style-name="a1119">
              <text:list-item>
                <text:p text:style-name="a1118" text:class-names="" text:cond-style-name=""><text:span text:style-name="a1116" text:class-names="">Recurrent Neural Networks</text:span><text:span text:style-name="a1117" text:class-names=""/></text:p>
              </text:list-item>
            </text:list>
            <text:list text:style-name="a1122">
              <text:list-item>
                <text:p text:style-name="a1121" text:class-names="" text:cond-style-name=""><text:span text:style-name="a1120" text:class-names=""/></text:p>
              </text:list-item>
            </text:list>
            <text:list text:style-name="a1126">
              <text:list-item>
                <text:p text:style-name="a1125" text:class-names="" text:cond-style-name=""><text:span text:style-name="a1123" text:class-names="">Next letter prediction</text:span><text:span text:style-name="a1124" text:class-names=""/></text:p>
              </text:list-item>
            </text:list>
            <text:list text:style-name="a1130">
              <text:list-item>
                <text:p text:style-name="a1129" text:class-names="" text:cond-style-name=""><text:span text:style-name="a1127" text:class-names="">Each letter gets a number</text:span><text:span text:style-name="a1128" text:class-names=""/></text:p>
              </text:list-item>
            </text:list>
          </draw:text-box>
          <svg:title/>
          <svg:desc/>
        </draw:frame>
      </draw:page>
      <draw:page draw:name="Slide42" draw:style-name="a1132" draw:master-page-name="Master1-Layout2-cust-Charts-and-Tables" presentation:presentation-page-layout-name="Master1-PPL2" draw:id="Slide-297">
        <draw:frame draw:id="id216" presentation:style-name="a1136" draw:name="Title 1" svg:x="0.45789in" svg:y="0.51451in" svg:width="7.06743in" svg:height="0.50517in" presentation:class="title" presentation:placeholder="false">
          <draw:text-box>
            <text:p text:style-name="a1135" text:class-names="" text:cond-style-name=""><text:span text:style-name="a1133" text:class-names="">Machine Learning &amp;Neural Networks</text:span><text:span text:style-name="a1134" text:class-names=""/></text:p>
          </draw:text-box>
          <svg:title/>
          <svg:desc/>
        </draw:frame>
        <draw:frame draw:id="id217" presentation:style-name="a1163" draw:name="Text Placeholder 2" svg:x="0.46429in" svg:y="1.29869in" svg:width="9.00612in" svg:height="3.91342in" presentation:class="outline" presentation:placeholder="false">
          <draw:text-box>
            <text:list text:style-name="a1139">
              <text:list-item>
                <text:p text:style-name="a1138" text:class-names="" text:cond-style-name=""><text:span text:style-name="a1137" text:class-names="">The insights that changed everything</text:span></text:p>
              </text:list-item>
            </text:list>
            <text:list text:style-name="a1142">
              <text:list-item>
                <text:p text:style-name="a1141" text:class-names="" text:cond-style-name=""><text:span text:style-name="a1140" text:class-names=""/></text:p>
              </text:list-item>
            </text:list>
            <text:list text:style-name="a1146">
              <text:list-item>
                <text:p text:style-name="a1145" text:class-names="" text:cond-style-name=""><text:span text:style-name="a1143" text:class-names="">Parallelisation</text:span><text:span text:style-name="a1144" text:class-names=""/></text:p>
              </text:list-item>
            </text:list>
            <text:list text:style-name="a1150">
              <text:list-item>
                <text:p text:style-name="a1149" text:class-names="" text:cond-style-name=""><text:span text:style-name="a1147" text:class-names="">- What if we could look at **all tokens at once?**</text:span><text:span text:style-name="a1148" text:class-names=""/></text:p>
              </text:list-item>
            </text:list>
            <text:list text:style-name="a1154">
              <text:list-item>
                <text:p text:style-name="a1153" text:class-names="" text:cond-style-name=""><text:span text:style-name="a1151" text:class-names="">- And let each token attend to every other token?</text:span><text:span text:style-name="a1152" text:class-names=""/></text:p>
              </text:list-item>
            </text:list>
            <text:list text:style-name="a1158">
              <text:list-item>
                <text:p text:style-name="a1157" text:class-names="" text:cond-style-name=""><text:span text:style-name="a1155" text:class-names="">- → Transformer architecture (2017: "Attention is All You Need")</text:span><text:span text:style-name="a1156" text:class-names=""/></text:p>
              </text:list-item>
            </text:list>
            <text:list text:style-name="a1162">
              <text:list-item>
                <text:p text:style-name="a1161" text:class-names="" text:cond-style-name=""><text:span text:style-name="a1159" text:class-names="">- Transition to modern LLMs</text:span><text:span text:style-name="a1160" text:class-names=""/></text:p>
              </text:list-item>
            </text:list>
          </draw:text-box>
          <svg:title/>
          <svg:desc/>
        </draw:frame>
      </draw:page>
      <draw:page draw:name="Slide53" draw:style-name="a1164" draw:master-page-name="Master1-Layout2-cust-Charts-and-Tables" presentation:presentation-page-layout-name="Master1-PPL2" draw:id="Slide-308">
        <draw:frame draw:id="id218" presentation:style-name="a1168" draw:name="Title 1" svg:x="0.45789in" svg:y="0.51451in" svg:width="7.06743in" svg:height="0.50517in" presentation:class="title" presentation:placeholder="false">
          <draw:text-box>
            <text:p text:style-name="a1167" text:class-names="" text:cond-style-name=""><text:span text:style-name="a1165" text:class-names="">Summary</text:span><text:span text:style-name="a1166" text:class-names=""/></text:p>
          </draw:text-box>
          <svg:title/>
          <svg:desc/>
        </draw:frame>
        <draw:frame draw:id="id219" presentation:style-name="a1209" draw:name="Text Placeholder 2" svg:x="0.46429in" svg:y="1.29869in" svg:width="9.00612in" svg:height="3.91342in" presentation:class="outline" presentation:placeholder="false">
          <draw:text-box>
            <text:list text:style-name="a1172">
              <text:list-item>
                <text:p text:style-name="a1171" text:class-names="" text:cond-style-name=""><text:span text:style-name="a1169" text:class-names="">If we can express our problem mathematically we can solve it with enough data. </text:span><text:span text:style-name="a1170" text:class-names=""/></text:p>
              </text:list-item>
            </text:list>
            <text:list text:style-name="a1178">
              <text:list-item>
                <text:list text:style-name="a1178">
                  <text:list-item>
                    <text:p text:style-name="a1177" text:class-names="" text:cond-style-name=""><text:span text:style-name="a1173" text:class-names="">Without needing to define or even kno</text:span><text:span text:style-name="a1174" text:class-names="">w the</text:span><text:span text:style-name="a1175" text:class-names=""><text:s text:c="1"/>specifics</text:span><text:span text:style-name="a1176" text:class-names=""/></text:p>
                  </text:list-item>
                </text:list>
              </text:list-item>
            </text:list>
            <text:list text:style-name="a1182">
              <text:list-item>
                <text:list text:style-name="a1182">
                  <text:list-item>
                    <text:p text:style-name="a1181" text:class-names="" text:cond-style-name=""><text:span text:style-name="a1179" text:class-names="">We can </text:span><text:span text:style-name="a1180" text:class-names=""/></text:p>
                  </text:list-item>
                </text:list>
              </text:list-item>
            </text:list>
            <text:list text:style-name="a1186">
              <text:list-item>
                <text:p text:style-name="a1185" text:class-names="" text:cond-style-name=""><text:span text:style-name="a1183" text:class-names="">The more parameters the longer the equation</text:span><text:span text:style-name="a1184" text:class-names=""/></text:p>
              </text:list-item>
            </text:list>
            <text:list text:style-name="a1191">
              <text:list-item>
                <text:list text:style-name="a1191">
                  <text:list-item>
                    <text:p text:style-name="a1190" text:class-names="" text:cond-style-name=""><text:span text:style-name="a1187" text:class-names="">Longer<text:s text:c="1"/></text:span><text:span text:style-name="a1188" text:class-names="">equation</text:span><text:span text:style-name="a1189" text:class-names=""><text:s text:c="1"/>= more complex model</text:span></text:p>
                  </text:list-item>
                </text:list>
              </text:list-item>
            </text:list>
            <text:list text:style-name="a1196">
              <text:list-item>
                <text:list text:style-name="a1196">
                  <text:list-item>
                    <text:p text:style-name="a1195" text:class-names="" text:cond-style-name=""><text:span text:style-name="a1192" text:class-names="">More<text:s text:c="1"/></text:span><text:span text:style-name="a1193" text:class-names="">complex</text:span><text:span text:style-name="a1194" text:class-names=""><text:s text:c="1"/>model requires more data</text:span></text:p>
                  </text:list-item>
                </text:list>
              </text:list-item>
            </text:list>
            <text:list text:style-name="a1199">
              <text:list-item>
                <text:list text:style-name="a1199">
                  <text:list-item>
                    <text:p text:style-name="a1198" text:class-names="" text:cond-style-name=""><text:span text:style-name="a1197" text:class-names=""/></text:p>
                  </text:list-item>
                </text:list>
              </text:list-item>
            </text:list>
            <text:list text:style-name="a1202">
              <text:list-item>
                <text:p text:style-name="a1201" text:class-names="" text:cond-style-name=""><text:span text:style-name="a1200" text:class-names="">To deal with language we need<text:s text:c="1"/></text:span></text:p>
              </text:list-item>
            </text:list>
            <text:list text:style-name="a1205">
              <text:list-item>
                <text:list text:style-name="a1205">
                  <text:list-item>
                    <text:p text:style-name="a1204" text:class-names="" text:cond-style-name=""><text:span text:style-name="a1203" text:class-names="">to express our input language numerically</text:span></text:p>
                  </text:list-item>
                </text:list>
              </text:list-item>
            </text:list>
            <text:list text:style-name="a1208">
              <text:list-item>
                <text:p text:style-name="a1207" text:class-names="" text:cond-style-name=""><text:span text:style-name="a1206" text:class-names=""/></text:p>
              </text:list-item>
            </text:list>
          </draw:text-box>
          <svg:title/>
          <svg:desc/>
        </draw:frame>
      </draw:page>
      <draw:page draw:name="Slide36" draw:style-name="a1210" draw:master-page-name="Master1-Layout3-cust-Cover-Slide_green_opt1" presentation:presentation-page-layout-name="Master1-PPL3" draw:id="Slide-291">
        <draw:frame draw:id="id220" presentation:style-name="a1218" draw:name="Google Shape;233;p1" svg:x="0.43351in" svg:y="3.05433in" svg:width="5.45276in" svg:height="1.37697in" presentation:class="title" presentation:placeholder="false">
          <draw:text-box>
            <text:p text:style-name="a1213" text:class-names="" text:cond-style-name=""><text:span text:style-name="a1211" text:class-names="">Intro to Large Language Models (LLMs)</text:span><text:span text:style-name="a1212" text:class-names=""/></text:p>
            <text:p text:style-name="a1217" text:class-names="" text:cond-style-name=""><text:span text:style-name="a1214" text:class-names=""><text:line-break/></text:span><text:span text:style-name="a1215" text:class-names="">Part 3 – Current LLMs?</text:span><text:span text:style-name="a1216" text:class-names=""/></text:p>
          </draw:text-box>
          <svg:title/>
          <svg:desc/>
        </draw:frame>
        <presentation:notes draw:style-name="a1221">
          <draw:frame draw:id="id221" presentation:style-name="a1219" draw:name="Google Shape;230;p1:notes" svg:x="2.1986in" svg:y="5.87481in" svg:width="17.58888in" svg:height="5.56562in" presentation:class="notes" presentation:placeholder="true">
            <draw:text-box/>
            <svg:title/>
            <svg:desc/>
          </draw:frame>
          <draw:page-thumbnail draw:page-number="16" svg:x="6.86979in" svg:y="0.92708in" svg:width="8.24826in" svg:height="4.63889in" presentation:class="page" draw:id="id222" presentation:style-name="a1220" draw:name="Google Shape;231;p1:notes">
            <svg:title/>
            <svg:desc/>
          </draw:page-thumbnail>
        </presentation:notes>
      </draw:page>
      <draw:page draw:name="Slide43" draw:style-name="a1222" draw:master-page-name="Master1-Layout2-cust-Charts-and-Tables" presentation:presentation-page-layout-name="Master1-PPL2" draw:id="Slide-298">
        <draw:frame draw:id="id223" presentation:style-name="a1226" draw:name="Title 1" svg:x="0.45789in" svg:y="0.51451in" svg:width="7.06743in" svg:height="0.50517in" presentation:class="title" presentation:placeholder="false">
          <draw:text-box>
            <text:p text:style-name="a1225" text:class-names="" text:cond-style-name=""><text:span text:style-name="a1223" text:class-names="">Scale changed everything</text:span><text:span text:style-name="a1224" text:class-names=""/></text:p>
          </draw:text-box>
          <svg:title/>
          <svg:desc/>
        </draw:frame>
        <draw:frame draw:id="id224" presentation:style-name="a1253" draw:name="Text Placeholder 2" svg:x="0.46429in" svg:y="1.29869in" svg:width="9.00612in" svg:height="3.91342in" presentation:class="outline" presentation:placeholder="false">
          <draw:text-box>
            <text:list text:style-name="a1229">
              <text:list-item>
                <text:p text:style-name="a1228" text:class-names="" text:cond-style-name=""><text:span text:style-name="a1227" text:class-names="">The insights that changed everything</text:span></text:p>
              </text:list-item>
            </text:list>
            <text:list text:style-name="a1232">
              <text:list-item>
                <text:p text:style-name="a1231" text:class-names="" text:cond-style-name=""><text:span text:style-name="a1230" text:class-names=""/></text:p>
              </text:list-item>
            </text:list>
            <text:list text:style-name="a1236">
              <text:list-item>
                <text:p text:style-name="a1235" text:class-names="" text:cond-style-name=""><text:span text:style-name="a1233" text:class-names="">Parallelisation</text:span><text:span text:style-name="a1234" text:class-names=""/></text:p>
              </text:list-item>
            </text:list>
            <text:list text:style-name="a1240">
              <text:list-item>
                <text:p text:style-name="a1239" text:class-names="" text:cond-style-name=""><text:span text:style-name="a1237" text:class-names="">- What if we could look at **all tokens at once?**</text:span><text:span text:style-name="a1238" text:class-names=""/></text:p>
              </text:list-item>
            </text:list>
            <text:list text:style-name="a1244">
              <text:list-item>
                <text:p text:style-name="a1243" text:class-names="" text:cond-style-name=""><text:span text:style-name="a1241" text:class-names="">- And let each token attend to every other token?</text:span><text:span text:style-name="a1242" text:class-names=""/></text:p>
              </text:list-item>
            </text:list>
            <text:list text:style-name="a1248">
              <text:list-item>
                <text:p text:style-name="a1247" text:class-names="" text:cond-style-name=""><text:span text:style-name="a1245" text:class-names="">- → Transformer architecture (2017: "Attention is All You Need")</text:span><text:span text:style-name="a1246" text:class-names=""/></text:p>
              </text:list-item>
            </text:list>
            <text:list text:style-name="a1252">
              <text:list-item>
                <text:p text:style-name="a1251" text:class-names="" text:cond-style-name=""><text:span text:style-name="a1249" text:class-names="">- Transition to modern LLMs</text:span><text:span text:style-name="a1250" text:class-names=""/></text:p>
              </text:list-item>
            </text:list>
          </draw:text-box>
          <svg:title/>
          <svg:desc/>
        </draw:frame>
      </draw:page>
      <draw:page draw:name="Slide44" draw:style-name="a1254" draw:master-page-name="Master1-Layout2-cust-Charts-and-Tables" presentation:presentation-page-layout-name="Master1-PPL2" draw:id="Slide-299">
        <draw:frame draw:id="id225" presentation:style-name="a1258" draw:name="Title 1" svg:x="0.45789in" svg:y="0.51451in" svg:width="7.06743in" svg:height="0.50517in" presentation:class="title" presentation:placeholder="false">
          <draw:text-box>
            <text:p text:style-name="a1257" text:class-names="" text:cond-style-name=""><text:span text:style-name="a1255" text:class-names="">Current LLMs</text:span><text:span text:style-name="a1256" text:class-names=""/></text:p>
          </draw:text-box>
          <svg:title/>
          <svg:desc/>
        </draw:frame>
        <draw:frame draw:id="id226" presentation:style-name="a1263" draw:name="Text Placeholder 2" svg:x="0.46429in" svg:y="1.29869in" svg:width="9.00612in" svg:height="3.91342in" presentation:class="outline" presentation:placeholder="false">
          <draw:text-box>
            <text:list text:style-name="a1262">
              <text:list-item>
                <text:p text:style-name="a1261" text:class-names="" text:cond-style-name=""><text:span text:style-name="a1259" text:class-names="">Overview</text:span><text:span text:style-name="a1260" text:class-names=""/></text:p>
              </text:list-item>
            </text:list>
          </draw:text-box>
          <svg:title/>
          <svg:desc/>
        </draw:frame>
      </draw:page>
      <draw:page draw:name="Slide46" draw:style-name="a1264" draw:master-page-name="Master1-Layout2-cust-Charts-and-Tables" presentation:presentation-page-layout-name="Master1-PPL2" draw:id="Slide-301">
        <draw:frame draw:id="id227" presentation:style-name="a1268" draw:name="Title 1" svg:x="0.45789in" svg:y="0.51451in" svg:width="7.06743in" svg:height="0.50517in" presentation:class="title" presentation:placeholder="false">
          <draw:text-box>
            <text:p text:style-name="a1267" text:class-names="" text:cond-style-name=""><text:span text:style-name="a1265" text:class-names="">Current LLMs</text:span><text:span text:style-name="a1266" text:class-names=""/></text:p>
          </draw:text-box>
          <svg:title/>
          <svg:desc/>
        </draw:frame>
        <draw:frame draw:id="id228" presentation:style-name="a1273" draw:name="Text Placeholder 2" svg:x="0.46429in" svg:y="1.29869in" svg:width="9.00612in" svg:height="3.91342in" presentation:class="outline" presentation:placeholder="false">
          <draw:text-box>
            <text:list text:style-name="a1272">
              <text:list-item>
                <text:p text:style-name="a1271" text:class-names="" text:cond-style-name=""><text:span text:style-name="a1269" text:class-names="">Tokenisation</text:span><text:span text:style-name="a1270" text:class-names=""/></text:p>
              </text:list-item>
            </text:list>
          </draw:text-box>
          <svg:title/>
          <svg:desc/>
        </draw:frame>
      </draw:page>
      <draw:page draw:name="Slide45" draw:style-name="a1274" draw:master-page-name="Master1-Layout2-cust-Charts-and-Tables" presentation:presentation-page-layout-name="Master1-PPL2" draw:id="Slide-300">
        <draw:frame draw:id="id229" presentation:style-name="a1278" draw:name="Title 1" svg:x="0.45789in" svg:y="0.51451in" svg:width="7.06743in" svg:height="0.50517in" presentation:class="title" presentation:placeholder="false">
          <draw:text-box>
            <text:p text:style-name="a1277" text:class-names="" text:cond-style-name=""><text:span text:style-name="a1275" text:class-names="">Current LLMs</text:span><text:span text:style-name="a1276" text:class-names=""/></text:p>
          </draw:text-box>
          <svg:title/>
          <svg:desc/>
        </draw:frame>
        <draw:frame draw:id="id230" presentation:style-name="a1283" draw:name="Text Placeholder 2" svg:x="0.46429in" svg:y="1.29869in" svg:width="9.00612in" svg:height="3.91342in" presentation:class="outline" presentation:placeholder="false">
          <draw:text-box>
            <text:list text:style-name="a1282">
              <text:list-item>
                <text:p text:style-name="a1281" text:class-names="" text:cond-style-name=""><text:span text:style-name="a1279" text:class-names="">Embeddings</text:span><text:span text:style-name="a1280" text:class-names=""/></text:p>
              </text:list-item>
            </text:list>
          </draw:text-box>
          <svg:title/>
          <svg:desc/>
        </draw:frame>
      </draw:page>
      <draw:page draw:name="Slide47" draw:style-name="a1284" draw:master-page-name="Master1-Layout2-cust-Charts-and-Tables" presentation:presentation-page-layout-name="Master1-PPL2" draw:id="Slide-302">
        <draw:frame draw:id="id231" presentation:style-name="a1288" draw:name="Title 1" svg:x="0.45789in" svg:y="0.51451in" svg:width="7.06743in" svg:height="0.50517in" presentation:class="title" presentation:placeholder="false">
          <draw:text-box>
            <text:p text:style-name="a1287" text:class-names="" text:cond-style-name=""><text:span text:style-name="a1285" text:class-names="">Current LLMs</text:span><text:span text:style-name="a1286" text:class-names=""/></text:p>
          </draw:text-box>
          <svg:title/>
          <svg:desc/>
        </draw:frame>
        <draw:frame draw:id="id232" presentation:style-name="a1293" draw:name="Text Placeholder 2" svg:x="0.46429in" svg:y="1.29869in" svg:width="9.00612in" svg:height="3.91342in" presentation:class="outline" presentation:placeholder="false">
          <draw:text-box>
            <text:list text:style-name="a1292">
              <text:list-item>
                <text:p text:style-name="a1291" text:class-names="" text:cond-style-name=""><text:span text:style-name="a1289" text:class-names="">Attention</text:span><text:span text:style-name="a1290" text:class-names=""/></text:p>
              </text:list-item>
            </text:list>
          </draw:text-box>
          <svg:title/>
          <svg:desc/>
        </draw:frame>
      </draw:page>
      <draw:page draw:name="Slide48" draw:style-name="a1294" draw:master-page-name="Master1-Layout2-cust-Charts-and-Tables" presentation:presentation-page-layout-name="Master1-PPL2" draw:id="Slide-303">
        <draw:frame draw:id="id233" presentation:style-name="a1298" draw:name="Title 1" svg:x="0.45789in" svg:y="0.51451in" svg:width="7.06743in" svg:height="0.50517in" presentation:class="title" presentation:placeholder="false">
          <draw:text-box>
            <text:p text:style-name="a1297" text:class-names="" text:cond-style-name=""><text:span text:style-name="a1295" text:class-names="">Current LLMs</text:span><text:span text:style-name="a1296" text:class-names=""/></text:p>
          </draw:text-box>
          <svg:title/>
          <svg:desc/>
        </draw:frame>
        <draw:frame draw:id="id234" presentation:style-name="a1303" draw:name="Text Placeholder 2" svg:x="0.46429in" svg:y="1.29869in" svg:width="9.00612in" svg:height="3.91342in" presentation:class="outline" presentation:placeholder="false">
          <draw:text-box>
            <text:list text:style-name="a1302">
              <text:list-item>
                <text:p text:style-name="a1301" text:class-names="" text:cond-style-name=""><text:span text:style-name="a1299" text:class-names="">Putting it all together</text:span><text:span text:style-name="a1300" text:class-names=""/></text:p>
              </text:list-item>
            </text:list>
          </draw:text-box>
          <svg:title/>
          <svg:desc/>
        </draw:frame>
      </draw:page>
      <draw:page draw:name="Slide49" draw:style-name="a1304" draw:master-page-name="Master1-Layout2-cust-Charts-and-Tables" presentation:presentation-page-layout-name="Master1-PPL2" draw:id="Slide-304">
        <draw:frame draw:id="id235" presentation:style-name="a1308" draw:name="Title 1" svg:x="0.45789in" svg:y="0.51451in" svg:width="7.06743in" svg:height="0.50517in" presentation:class="title" presentation:placeholder="false">
          <draw:text-box>
            <text:p text:style-name="a1307" text:class-names="" text:cond-style-name=""><text:span text:style-name="a1305" text:class-names="">Important concepts</text:span><text:span text:style-name="a1306" text:class-names=""/></text:p>
          </draw:text-box>
          <svg:title/>
          <svg:desc/>
        </draw:frame>
        <draw:frame draw:id="id236" presentation:style-name="a1359" draw:name="Text Placeholder 2" svg:x="0.46429in" svg:y="1.29869in" svg:width="9.00612in" svg:height="3.91342in" presentation:class="outline" presentation:placeholder="false">
          <draw:text-box>
            <text:list text:style-name="a1312">
              <text:list-item>
                <text:p text:style-name="a1311" text:class-names="" text:cond-style-name=""><text:span text:style-name="a1309" text:class-names="">Statelessnesss</text:span><text:span text:style-name="a1310" text:class-names=""/></text:p>
              </text:list-item>
            </text:list>
            <text:list text:style-name="a1315">
              <text:list-item>
                <text:p text:style-name="a1314" text:class-names="" text:cond-style-name=""><text:span text:style-name="a1313" text:class-names=""/></text:p>
              </text:list-item>
            </text:list>
            <text:list text:style-name="a1318">
              <text:list-item>
                <text:p text:style-name="a1317" text:class-names="" text:cond-style-name=""><text:span text:style-name="a1316" text:class-names=""/></text:p>
              </text:list-item>
            </text:list>
            <text:list text:style-name="a1323">
              <text:list-item>
                <text:p text:style-name="a1322" text:class-names="" text:cond-style-name=""><text:span text:style-name="a1319" text:class-names="">```</text:span><text:span text:style-name="a1320" text:class-names="">json</text:span><text:span text:style-name="a1321" text:class-names=""/></text:p>
              </text:list-item>
            </text:list>
            <text:list text:style-name="a1327">
              <text:list-item>
                <text:p text:style-name="a1326" text:class-names="" text:cond-style-name=""><text:span text:style-name="a1324" text:class-names="">[</text:span><text:span text:style-name="a1325" text:class-names=""/></text:p>
              </text:list-item>
            </text:list>
            <text:list text:style-name="a1331">
              <text:list-item>
                <text:p text:style-name="a1330" text:class-names="" text:cond-style-name=""><text:span text:style-name="a1328" text:class-names="">    { "role": "system", "content": "You are a helpful assistant." },</text:span><text:span text:style-name="a1329" text:class-names=""/></text:p>
              </text:list-item>
            </text:list>
            <text:list text:style-name="a1335">
              <text:list-item>
                <text:p text:style-name="a1334" text:class-names="" text:cond-style-name=""><text:span text:style-name="a1332" text:class-names="">    { "role": "user", "content": "What is the capital of France?" },</text:span><text:span text:style-name="a1333" text:class-names=""/></text:p>
              </text:list-item>
            </text:list>
            <text:list text:style-name="a1339">
              <text:list-item>
                <text:p text:style-name="a1338" text:class-names="" text:cond-style-name=""><text:span text:style-name="a1336" text:class-names="">    { "role": "assistant", "content": "The capital of France is Paris." },</text:span><text:span text:style-name="a1337" text:class-names=""/></text:p>
              </text:list-item>
            </text:list>
            <text:list text:style-name="a1343">
              <text:list-item>
                <text:p text:style-name="a1342" text:class-names="" text:cond-style-name=""><text:span text:style-name="a1340" text:class-names="">    { "role": "user", "content": "What about Germany?" }</text:span><text:span text:style-name="a1341" text:class-names=""/></text:p>
              </text:list-item>
            </text:list>
            <text:list text:style-name="a1347">
              <text:list-item>
                <text:p text:style-name="a1346" text:class-names="" text:cond-style-name=""><text:span text:style-name="a1344" text:class-names="">]</text:span><text:span text:style-name="a1345" text:class-names=""/></text:p>
              </text:list-item>
            </text:list>
            <text:list text:style-name="a1351">
              <text:list-item>
                <text:p text:style-name="a1350" text:class-names="" text:cond-style-name=""><text:span text:style-name="a1348" text:class-names="">```</text:span><text:span text:style-name="a1349" text:class-names=""/></text:p>
              </text:list-item>
            </text:list>
            <text:list text:style-name="a1355">
              <text:list-item>
                <text:p text:style-name="a1354" text:class-names="" text:cond-style-name=""><text:span text:style-name="a1352" text:class-names="">- The "memory" is just the growing list passed each time</text:span><text:span text:style-name="a1353" text:class-names=""/></text:p>
              </text:list-item>
            </text:list>
            <text:list text:style-name="a1358">
              <text:list-item>
                <text:p text:style-name="a1357" text:class-names="" text:cond-style-name=""><text:span text:style-name="a1356" text:class-names=""/></text:p>
              </text:list-item>
            </text:list>
          </draw:text-box>
          <svg:title/>
          <svg:desc/>
        </draw:frame>
      </draw:page>
      <draw:page draw:name="Slide50" draw:style-name="a1360" draw:master-page-name="Master1-Layout2-cust-Charts-and-Tables" presentation:presentation-page-layout-name="Master1-PPL2" draw:id="Slide-305">
        <draw:frame draw:id="id237" presentation:style-name="a1365" draw:name="Title 1" svg:x="0.42664in" svg:y="0.51451in" svg:width="6.80962in" svg:height="0.50517in" presentation:class="title" presentation:placeholder="false">
          <draw:text-box>
            <text:p text:style-name="a1364" text:class-names="" text:cond-style-name=""><text:span text:style-name="a1361" text:class-names="">Important<text:s text:c="1"/></text:span><text:span text:style-name="a1362" text:class-names="">concepts</text:span><text:span text:style-name="a1363" text:class-names=""/></text:p>
          </draw:text-box>
          <svg:title/>
          <svg:desc/>
        </draw:frame>
        <draw:frame draw:id="id238" presentation:style-name="a1370" draw:name="Text Placeholder 2" svg:x="0.46429in" svg:y="1.29869in" svg:width="9.00612in" svg:height="3.91342in" presentation:class="outline" presentation:placeholder="false">
          <draw:text-box>
            <text:list text:style-name="a1369">
              <text:list-item>
                <text:p text:style-name="a1368" text:class-names="" text:cond-style-name=""><text:span text:style-name="a1366" text:class-names="">Parameters</text:span><text:span text:style-name="a1367" text:class-names=""/></text:p>
              </text:list-item>
            </text:list>
          </draw:text-box>
          <svg:title/>
          <svg:desc/>
        </draw:frame>
      </draw:page>
      <draw:page draw:name="Slide51" draw:style-name="a1371" draw:master-page-name="Master1-Layout2-cust-Charts-and-Tables" presentation:presentation-page-layout-name="Master1-PPL2" draw:id="Slide-306">
        <draw:frame draw:id="id239" presentation:style-name="a1376" draw:name="Title 1" svg:x="0.42664in" svg:y="0.51451in" svg:width="6.80962in" svg:height="0.50517in" presentation:class="title" presentation:placeholder="false">
          <draw:text-box>
            <text:p text:style-name="a1375" text:class-names="" text:cond-style-name=""><text:span text:style-name="a1372" text:class-names="">Important<text:s text:c="1"/></text:span><text:span text:style-name="a1373" text:class-names="">concepts</text:span><text:span text:style-name="a1374" text:class-names=""/></text:p>
          </draw:text-box>
          <svg:title/>
          <svg:desc/>
        </draw:frame>
        <draw:frame draw:id="id240" presentation:style-name="a1415" draw:name="Text Placeholder 2" svg:x="0.46429in" svg:y="1.29869in" svg:width="9.00612in" svg:height="3.91342in" presentation:class="outline" presentation:placeholder="false">
          <draw:text-box>
            <text:list text:style-name="a1379">
              <text:list-item>
                <text:p text:style-name="a1378" text:class-names="" text:cond-style-name=""><text:span text:style-name="a1377" text:class-names="">Context Window</text:span></text:p>
              </text:list-item>
            </text:list>
            <text:list text:style-name="a1382">
              <text:list-item>
                <text:p text:style-name="a1381" text:class-names="" text:cond-style-name=""><text:span text:style-name="a1380" text:class-names=""/></text:p>
              </text:list-item>
            </text:list>
            <text:list text:style-name="a1386">
              <text:list-item>
                <text:p text:style-name="a1385" text:class-names="" text:cond-style-name=""><text:span text:style-name="a1383" text:class-names="">- The maximum number of tokens the model can see at once</text:span><text:span text:style-name="a1384" text:class-names=""/></text:p>
              </text:list-item>
            </text:list>
            <text:list text:style-name="a1390">
              <text:list-item>
                <text:p text:style-name="a1389" text:class-names="" text:cond-style-name=""><text:span text:style-name="a1387" text:class-names="">- GPT-3.5: 4K tokens. GPT-4: 128K tokens. Gemini 1.5: 1M tokens</text:span><text:span text:style-name="a1388" text:class-names=""/></text:p>
              </text:list-item>
            </text:list>
            <text:list text:style-name="a1394">
              <text:list-item>
                <text:p text:style-name="a1393" text:class-names="" text:cond-style-name=""><text:span text:style-name="a1391" text:class-names="">- Everything outside the window is **invisible** to the model</text:span><text:span text:style-name="a1392" text:class-names=""/></text:p>
              </text:list-item>
            </text:list>
            <text:list text:style-name="a1398">
              <text:list-item>
                <text:p text:style-name="a1397" text:class-names="" text:cond-style-name=""><text:span text:style-name="a1395" text:class-names="">- Implication: long conversations eventually drop early context</text:span><text:span text:style-name="a1396" text:class-names=""/></text:p>
              </text:list-item>
            </text:list>
            <text:list text:style-name="a1402">
              <text:list-item>
                <text:p text:style-name="a1401" text:class-names="" text:cond-style-name=""><text:span text:style-name="a1399" text:class-names="">- Implication: token cost = prompt tokens + response tokens</text:span><text:span text:style-name="a1400" text:class-names=""/></text:p>
              </text:list-item>
            </text:list>
            <text:list text:style-name="a1405">
              <text:list-item>
                <text:p text:style-name="a1404" text:class-names="" text:cond-style-name=""><text:span text:style-name="a1403" text:class-names=""/></text:p>
              </text:list-item>
            </text:list>
            <text:list text:style-name="a1408">
              <text:list-item>
                <text:p text:style-name="a1407" text:class-names="" text:cond-style-name=""><text:span text:style-name="a1406" text:class-names=""/></text:p>
              </text:list-item>
            </text:list>
            <text:list text:style-name="a1411">
              <text:list-item>
                <text:p text:style-name="a1410" text:class-names="" text:cond-style-name=""><text:span text:style-name="a1409" text:class-names="">(Start a new chat from summary)</text:span></text:p>
              </text:list-item>
            </text:list>
            <text:list text:style-name="a1414">
              <text:list-item>
                <text:p text:style-name="a1413" text:class-names="" text:cond-style-name=""><text:span text:style-name="a1412" text:class-names=""/></text:p>
              </text:list-item>
            </text:list>
          </draw:text-box>
          <svg:title/>
          <svg:desc/>
        </draw:frame>
      </draw:page>
      <draw:page draw:name="Slide52" draw:style-name="a1416" draw:master-page-name="Master1-Layout3-cust-Cover-Slide_green_opt1" presentation:presentation-page-layout-name="Master1-PPL3" draw:id="Slide-307">
        <draw:frame draw:id="id241" presentation:style-name="a1424" draw:name="Google Shape;233;p1" svg:x="0.43351in" svg:y="3.05433in" svg:width="5.45276in" svg:height="1.37697in" presentation:class="title" presentation:placeholder="false">
          <draw:text-box>
            <text:p text:style-name="a1419" text:class-names="" text:cond-style-name=""><text:span text:style-name="a1417" text:class-names="">Intro to Large Language Models (LLMs)</text:span><text:span text:style-name="a1418" text:class-names=""/></text:p>
            <text:p text:style-name="a1423" text:class-names="" text:cond-style-name=""><text:span text:style-name="a1420" text:class-names=""><text:line-break/></text:span><text:span text:style-name="a1421" text:class-names="">Part 4 – Summary</text:span><text:span text:style-name="a1422" text:class-names=""/></text:p>
          </draw:text-box>
          <svg:title/>
          <svg:desc/>
        </draw:frame>
        <presentation:notes draw:style-name="a1427">
          <draw:frame draw:id="id242" presentation:style-name="a1425" draw:name="Google Shape;230;p1:notes" svg:x="2.1986in" svg:y="5.87481in" svg:width="17.58888in" svg:height="5.56562in" presentation:class="notes" presentation:placeholder="true">
            <draw:text-box/>
            <svg:title/>
            <svg:desc/>
          </draw:frame>
          <draw:page-thumbnail draw:page-number="26" svg:x="6.86979in" svg:y="0.92708in" svg:width="8.24826in" svg:height="4.63889in" presentation:class="page" draw:id="id243" presentation:style-name="a1426" draw:name="Google Shape;231;p1:notes">
            <svg:title/>
            <svg:desc/>
          </draw:page-thumbnail>
        </presentation:notes>
      </draw:page>
      <draw:page draw:name="Slide31" draw:style-name="a1428" draw:master-page-name="Master1-Layout2-cust-Charts-and-Tables" presentation:presentation-page-layout-name="Master1-PPL2" draw:id="Slide-286">
        <draw:frame draw:id="id244" presentation:style-name="a1432" draw:name="Google Shape;1464;g339c4082edf_0_11" svg:x="0.42664in" svg:y="0.51451in" svg:width="6.80971in" svg:height="0.50525in" presentation:class="title" presentation:placeholder="false">
          <draw:text-box>
            <text:p text:style-name="a1431" text:class-names="" text:cond-style-name=""><text:span text:style-name="a1429" text:class-names="">Thank you!</text:span><text:span text:style-name="a1430" text:class-names=""/></text:p>
          </draw:text-box>
          <svg:title/>
          <svg:desc/>
        </draw:frame>
        <draw:frame draw:id="id245" draw:style-name="a1433" draw:name="Google Shape;1465;g339c4082edf_0_11" svg:x="3.65408in" svg:y="1.31775in" svg:width="2.69185in" svg:height="2.69185in" style:rel-width="scale" style:rel-height="scale">
          <draw:image xlink:href="media/image4.jpg" xlink:type="simple" xlink:show="embed" xlink:actuate="onLoad"/>
          <svg:title/>
          <svg:desc>A qr code with black squares

Description automatically generated</svg:desc>
        </draw:frame>
        <draw:frame draw:id="id246" draw:style-name="a1437" draw:name="Google Shape;1466;g339c4082edf_0_11" svg:x="0.24642in" svg:y="3.17958in" svg:width="1.57021in" svg:height="1.57021in">
          <draw:text-box>
            <text:p text:style-name="a1436" text:class-names="" text:cond-style-name=""><text:span text:style-name="a1434" text:class-names=""><text:s text:c="1"/></text:span><text:span text:style-name="a1435" text:class-names=""/></text:p>
          </draw:text-box>
          <svg:title/>
          <svg:desc/>
        </draw:frame>
        <draw:frame draw:id="id247" draw:style-name="a1445" draw:name="Google Shape;1467;g339c4082edf_0_11" svg:x="1.43077in" svg:y="4.33333in" svg:width="7.13845in" svg:height="0.77428in">
          <draw:text-box>
            <text:p text:style-name="a1440" text:class-names="" text:cond-style-name=""><text:span text:style-name="a1438" text:class-names="">Post-workshop Anonymous Feedback Form 2024-25​</text:span><text:span text:style-name="a1439" text:class-names=""/></text:p>
            <text:p text:style-name="a1444" text:class-names="" text:cond-style-name=""><text:span text:style-name="a1441" text:class-names=""><text:a xlink:href="https://tinyurl.com/2d8fys7e" text:style-name="" text:visited-style-name="">https://tinyurl.com/2d8fys7e</text:a></text:span><text:span text:style-name="a1442" text:class-names="">​</text:span><text:span text:style-name="a1443" text:class-names=""/></text:p>
          </draw:text-box>
          <svg:title/>
          <svg:desc/>
        </draw:frame>
        <presentation:notes draw:style-name="a1448">
          <draw:page-thumbnail draw:page-number="27" svg:x="3.66508in" svg:y="0.9276in" svg:width="14.65814in" svg:height="4.63812in" presentation:class="page" draw:id="id248" presentation:style-name="a1446" draw:name="Google Shape;1461;g339c4082edf_0_11:notes">
            <svg:title/>
            <svg:desc/>
          </draw:page-thumbnail>
          <draw:frame draw:id="id249" presentation:style-name="a1447" draw:name="Google Shape;1462;g339c4082edf_0_11:notes" svg:x="2.1986in" svg:y="5.87481in" svg:width="17.58891in" svg:height="5.5656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Cover Slide_grey_opt1">
      <presentation:placeholder presentation:object="title" svg:x="0.42559in" svg:y="1.67052in" svg:width="3.49989in" svg:height="1.8751in"/>
      <presentation:placeholder presentation:object="subtitle" svg:x="0.42559in" svg:y="4.06603in" svg:width="4.32369in" svg:height="0.4656in"/>
    </style:presentation-page-layout>
    <style:presentation-page-layout style:name="Master1-PPL2" style:display-name="Charts and Tables">
      <presentation:placeholder presentation:object="title" svg:x="0.42664in" svg:y="0.51451in" svg:width="6.80962in" svg:height="0.50517in"/>
      <presentation:placeholder presentation:object="outline" svg:x="0.46429in" svg:y="1.29869in" svg:width="9.00612in" svg:height="3.91342in"/>
    </style:presentation-page-layout>
    <style:presentation-page-layout style:name="Master1-PPL3" style:display-name="Cover Slide_green_opt1">
      <presentation:placeholder presentation:object="title" svg:x="0.42559in" svg:y="3.38708in" svg:width="5.14749in" svg:height="1.09127in"/>
    </style:presentation-page-layout>
    <style:presentation-page-layout style:name="Master1-PPL4" style:display-name="Cover Slide_white_opt1">
      <presentation:placeholder presentation:object="title" svg:x="0.42559in" svg:y="3.38708in" svg:width="5.14749in" svg:height="1.09127in"/>
    </style:presentation-page-layout>
    <style:presentation-page-layout style:name="Master1-PPL5" style:display-name="Cover Slide_green_opt2">
      <presentation:placeholder presentation:object="subtitle" svg:x="0.42559in" svg:y="4.06603in" svg:width="4.32369in" svg:height="0.4656in"/>
      <presentation:placeholder presentation:object="title" svg:x="0.42559in" svg:y="1.67052in" svg:width="3.49989in" svg:height="1.8751in"/>
    </style:presentation-page-layout>
    <style:presentation-page-layout style:name="Master1-PPL6" style:display-name="Cover Slide_white_opt3">
      <presentation:placeholder presentation:object="subtitle" svg:x="0.42559in" svg:y="4.06603in" svg:width="4.32369in" svg:height="0.4656in"/>
      <presentation:placeholder presentation:object="title" svg:x="0.42559in" svg:y="1.67052in" svg:width="3.49989in" svg:height="1.8751in"/>
      <presentation:placeholder presentation:object="graphic" svg:x="5.98703in" svg:y="-0.00123in" svg:width="4.19715in" svg:height="4.5516in"/>
    </style:presentation-page-layout>
    <style:presentation-page-layout style:name="Master1-PPL7" style:display-name="1_Cover Slide_green_opt3">
      <presentation:placeholder presentation:object="subtitle" svg:x="0.42559in" svg:y="4.06603in" svg:width="4.32369in" svg:height="0.4656in"/>
      <presentation:placeholder presentation:object="title" svg:x="0.42559in" svg:y="1.67052in" svg:width="3.49989in" svg:height="1.8751in"/>
      <presentation:placeholder presentation:object="graphic" svg:x="5.98703in" svg:y="-0.00123in" svg:width="4.19715in" svg:height="4.5516in"/>
    </style:presentation-page-layout>
    <style:presentation-page-layout style:name="Master1-PPL8" style:display-name="Cover Slide_white_opt4_2">
      <presentation:placeholder presentation:object="subtitle" svg:x="0.42559in" svg:y="4.06603in" svg:width="4.32369in" svg:height="0.4656in"/>
      <presentation:placeholder presentation:object="title" svg:x="0.42559in" svg:y="1.67052in" svg:width="3.49989in" svg:height="1.8751in"/>
      <presentation:placeholder presentation:object="graphic" svg:x="6.35694in" svg:y="0.00757in" svg:width="3.14753in" svg:height="3.20443in"/>
    </style:presentation-page-layout>
    <style:presentation-page-layout style:name="Master1-PPL9" style:display-name="Cover Slide_green_opt4">
      <presentation:placeholder presentation:object="subtitle" svg:x="0.42559in" svg:y="4.06603in" svg:width="4.32369in" svg:height="0.4656in"/>
      <presentation:placeholder presentation:object="title" svg:x="0.42559in" svg:y="1.67052in" svg:width="3.49989in" svg:height="1.8751in"/>
      <presentation:placeholder presentation:object="graphic" svg:x="6.35694in" svg:y="0.00757in" svg:width="3.14753in" svg:height="3.20443in"/>
    </style:presentation-page-layout>
    <style:presentation-page-layout style:name="Master1-PPL10" style:display-name="Cover Slide_white_opt5_1">
      <presentation:placeholder presentation:object="title" svg:x="0.42559in" svg:y="1.67052in" svg:width="3.49989in" svg:height="1.8751in"/>
      <presentation:placeholder presentation:object="subtitle" svg:x="0.42559in" svg:y="4.06603in" svg:width="4.32369in" svg:height="0.4656in"/>
      <presentation:placeholder presentation:object="graphic" svg:x="6.07453in" svg:y="0in" svg:width="3.92547in" svg:height="5.625in"/>
    </style:presentation-page-layout>
    <style:presentation-page-layout style:name="Master1-PPL11" style:display-name="Cover Slide_green_opt5">
      <presentation:placeholder presentation:object="graphic" svg:x="6.07453in" svg:y="0in" svg:width="3.92547in" svg:height="5.625in"/>
      <presentation:placeholder presentation:object="title" svg:x="0.42559in" svg:y="1.67052in" svg:width="3.49989in" svg:height="1.8751in"/>
      <presentation:placeholder presentation:object="subtitle" svg:x="0.42559in" svg:y="4.06603in" svg:width="4.32369in" svg:height="0.4656in"/>
    </style:presentation-page-layout>
    <style:presentation-page-layout style:name="Master1-PPL12" style:display-name="Cover Slide_white_opt6_3">
      <presentation:placeholder presentation:object="title" svg:x="0.42559in" svg:y="1.67052in" svg:width="3.49989in" svg:height="1.8751in"/>
      <presentation:placeholder presentation:object="subtitle" svg:x="0.42559in" svg:y="4.06603in" svg:width="4.32369in" svg:height="0.4656in"/>
      <presentation:placeholder presentation:object="graphic" svg:x="7.59089in" svg:y="-0.00549in" svg:width="2.40911in" svg:height="5.625in"/>
    </style:presentation-page-layout>
    <style:presentation-page-layout style:name="Master1-PPL13" style:display-name="Cover Slide_green_opt6">
      <presentation:placeholder presentation:object="title" svg:x="0.42559in" svg:y="1.67052in" svg:width="3.49989in" svg:height="1.8751in"/>
      <presentation:placeholder presentation:object="subtitle" svg:x="0.42559in" svg:y="4.06603in" svg:width="4.32369in" svg:height="0.4656in"/>
      <presentation:placeholder presentation:object="graphic" svg:x="7.59089in" svg:y="-0.00549in" svg:width="2.40911in" svg:height="5.625in"/>
    </style:presentation-page-layout>
    <style:presentation-page-layout style:name="Master1-PPL14" style:display-name="Divider Slide_white_opt1_2">
      <presentation:placeholder presentation:object="title" svg:x="0.42559in" svg:y="1.67052in" svg:width="3.65739in" svg:height="1.8751in"/>
      <presentation:placeholder presentation:object="subtitle" svg:x="0.42559in" svg:y="4.06603in" svg:width="4.32369in" svg:height="0.4656in"/>
      <presentation:placeholder presentation:object="graphic" svg:x="7.59089in" svg:y="-0.00549in" svg:width="2.40911in" svg:height="5.625in"/>
    </style:presentation-page-layout>
    <style:presentation-page-layout style:name="Master1-PPL15" style:display-name="Divider Slide_green_opt1_3">
      <presentation:placeholder presentation:object="subtitle" svg:x="0.42559in" svg:y="4.06603in" svg:width="4.32369in" svg:height="0.4656in"/>
      <presentation:placeholder presentation:object="title" svg:x="0.42559in" svg:y="1.67052in" svg:width="3.65739in" svg:height="1.8751in"/>
      <presentation:placeholder presentation:object="graphic" svg:x="7.59089in" svg:y="-0.00549in" svg:width="2.40911in" svg:height="5.625in"/>
    </style:presentation-page-layout>
    <style:presentation-page-layout style:name="Master1-PPL16" style:display-name="Divider Slide_white_opt2">
      <presentation:placeholder presentation:object="title" svg:x="0.42559in" svg:y="1.67052in" svg:width="3.65739in" svg:height="1.8751in"/>
      <presentation:placeholder presentation:object="subtitle" svg:x="0.42559in" svg:y="4.06603in" svg:width="4.32369in" svg:height="0.4656in"/>
    </style:presentation-page-layout>
    <style:presentation-page-layout style:name="Master1-PPL17" style:display-name="Divider Slide_green_opt2">
      <presentation:placeholder presentation:object="title" svg:x="0.42559in" svg:y="1.67052in" svg:width="3.65739in" svg:height="1.8751in"/>
      <presentation:placeholder presentation:object="subtitle" svg:x="0.42559in" svg:y="4.06603in" svg:width="4.32369in" svg:height="0.4656in"/>
    </style:presentation-page-layout>
    <style:presentation-page-layout style:name="Master1-PPL18" style:display-name="Divider Slide_white_opt3_2">
      <presentation:placeholder presentation:object="graphic" svg:x="6.95365in" svg:y="0in" svg:width="2.49813in" svg:height="2.1103in"/>
      <presentation:placeholder presentation:object="title" svg:x="0.42559in" svg:y="1.67052in" svg:width="3.65739in" svg:height="1.8751in"/>
      <presentation:placeholder presentation:object="subtitle" svg:x="0.42559in" svg:y="4.06603in" svg:width="4.32369in" svg:height="0.4656in"/>
    </style:presentation-page-layout>
    <style:presentation-page-layout style:name="Master1-PPL19" style:display-name="Divider Slide_green_opt3_1">
      <presentation:placeholder presentation:object="title" svg:x="0.42559in" svg:y="1.67052in" svg:width="3.65739in" svg:height="1.8751in"/>
      <presentation:placeholder presentation:object="subtitle" svg:x="0.42559in" svg:y="4.06603in" svg:width="4.32369in" svg:height="0.4656in"/>
      <presentation:placeholder presentation:object="graphic" svg:x="6.95056in" svg:y="0in" svg:width="2.49813in" svg:height="2.1103in"/>
    </style:presentation-page-layout>
    <style:presentation-page-layout style:name="Master1-PPL20" style:display-name="Divider Slide_green_opt3">
      <presentation:placeholder presentation:object="title" svg:x="1.41824in" svg:y="1.37086in" svg:width="3.80265in" svg:height="2.32122in"/>
    </style:presentation-page-layout>
    <style:presentation-page-layout style:name="Master1-PPL21" style:display-name="1_Custom Layout">
      <presentation:placeholder presentation:object="title" svg:x="0.42664in" svg:y="0.51451in" svg:width="6.80962in" svg:height="0.50517in"/>
    </style:presentation-page-layout>
    <style:presentation-page-layout style:name="Master1-PPL22" style:display-name="2_Custom Layout">
      <presentation:placeholder presentation:object="title" svg:x="0.42664in" svg:y="0.51451in" svg:width="6.80962in" svg:height="0.50517in"/>
      <presentation:placeholder presentation:object="graphic" svg:x="6.07453in" svg:y="1.55897in" svg:width="3.92547in" svg:height="4.06746in"/>
    </style:presentation-page-layout>
    <style:presentation-page-layout style:name="Master1-PPL23" style:display-name="Text Only Slide_opt1">
      <presentation:placeholder presentation:object="title" svg:x="0.42664in" svg:y="0.51451in" svg:width="7.56767in" svg:height="0.50517in"/>
      <presentation:placeholder presentation:object="outline" svg:x="0.46429in" svg:y="1.29869in" svg:width="9.00612in" svg:height="2.78439in"/>
    </style:presentation-page-layout>
    <style:presentation-page-layout style:name="Master1-PPL24" style:display-name="Text Only Slide_opt2">
      <presentation:placeholder presentation:object="outline" svg:x="0.46429in" svg:y="2.34194in" svg:width="9.00612in" svg:height="2.78439in"/>
      <presentation:placeholder presentation:object="title" svg:x="0.42664in" svg:y="1.42081in" svg:width="7.56767in" svg:height="0.50517in"/>
    </style:presentation-page-layout>
    <style:presentation-page-layout style:name="Master1-PPL25" style:display-name="Text Only Slide_opt3">
      <presentation:placeholder presentation:object="outline" svg:x="0.4664in" svg:y="1.39398in" svg:width="9.00612in" svg:height="2.93453in"/>
      <presentation:placeholder presentation:object="title" svg:x="0.42664in" svg:y="0.51451in" svg:width="7.56767in" svg:height="0.50517in"/>
    </style:presentation-page-layout>
    <style:presentation-page-layout style:name="Master1-PPL26" style:display-name="Text &amp; Image Slide_opt1">
      <presentation:placeholder presentation:object="outline" svg:x="0.46454in" svg:y="2.80224in" svg:width="4.80078in" svg:height="2.32409in"/>
      <presentation:placeholder presentation:object="title" svg:x="0.42664in" svg:y="1.42317in" svg:width="4.42175in" svg:height="1.01033in"/>
      <presentation:placeholder presentation:object="graphic" svg:x="5.84852in" svg:y="0.00143in" svg:width="4.15148in" svg:height="5.625in"/>
    </style:presentation-page-layout>
    <style:presentation-page-layout style:name="Master1-PPL27" style:display-name="Text &amp; Image Slide_opt2">
      <presentation:placeholder presentation:object="outline" svg:x="4.75731in" svg:y="1.8648in" svg:width="4.80078in" svg:height="2.32409in"/>
      <presentation:placeholder presentation:object="title" svg:x="4.7573in" svg:y="0.46086in" svg:width="4.63294in" svg:height="1.01033in"/>
      <presentation:placeholder presentation:object="graphic" svg:x="0in" svg:y="0.00235in" svg:width="4.15148in" svg:height="5.625in"/>
    </style:presentation-page-layout>
    <style:presentation-page-layout style:name="Master1-PPL28" style:display-name="Image Only Slide">
      <presentation:placeholder presentation:object="graphic" svg:x="0in" svg:y="0.00235in" svg:width="10in" svg:height="5.625in"/>
    </style:presentation-page-layout>
    <style:presentation-page-layout style:name="Master1-PPL29" style:display-name="Multiple Image Slide_opt1">
      <presentation:placeholder presentation:object="graphic" svg:x="0.4789in" svg:y="1.3473in" svg:width="2.39121in" svg:height="2.18986in"/>
      <presentation:placeholder presentation:object="graphic" svg:x="3.63234in" svg:y="1.3473in" svg:width="2.39121in" svg:height="2.18986in"/>
      <presentation:placeholder presentation:object="graphic" svg:x="6.76328in" svg:y="1.3473in" svg:width="2.39121in" svg:height="2.18986in"/>
    </style:presentation-page-layout>
    <style:presentation-page-layout style:name="Master1-PPL30" style:display-name="Multiple Image Slide_opt2">
      <presentation:placeholder presentation:object="graphic" svg:x="0.19533in" svg:y="1.45874in" svg:width="3.03388in" svg:height="4.0542in"/>
      <presentation:placeholder presentation:object="graphic" svg:x="3.34877in" svg:y="1.45874in" svg:width="3.03388in" svg:height="4.0542in"/>
      <presentation:placeholder presentation:object="graphic" svg:x="6.47971in" svg:y="1.45874in" svg:width="3.03388in" svg:height="4.0542in"/>
    </style:presentation-page-layout>
    <style:presentation-page-layout style:name="Master1-PPL31" style:display-name="Multiple Image Slide_opt3">
      <presentation:placeholder presentation:object="title" svg:x="0.42664in" svg:y="1.42317in" svg:width="4.42175in" svg:height="1.01033in"/>
      <presentation:placeholder presentation:object="graphic" svg:x="0.13995in" svg:y="3.17065in" svg:width="3.03388in" svg:height="2.3423in"/>
      <presentation:placeholder presentation:object="graphic" svg:x="3.29338in" svg:y="3.17065in" svg:width="3.03388in" svg:height="2.3423in"/>
      <presentation:placeholder presentation:object="graphic" svg:x="6.42432in" svg:y="3.17065in" svg:width="3.03388in" svg:height="2.3423in"/>
    </style:presentation-page-layout>
    <style:presentation-page-layout style:name="Master1-PPL32" style:display-name="Text &amp; Image Slide_opt4">
      <presentation:placeholder presentation:object="outline" svg:x="0.46454in" svg:y="2.80224in" svg:width="4.80078in" svg:height="2.32409in"/>
      <presentation:placeholder presentation:object="title" svg:x="0.42664in" svg:y="1.42317in" svg:width="4.42175in" svg:height="1.01033in"/>
    </style:presentation-page-layout>
    <style:presentation-page-layout style:name="Master1-PPL33" style:display-name="Closing Slide_opt3">
      <presentation:placeholder presentation:object="title" svg:x="0.42664in" svg:y="4.56744in" svg:width="4.42175in" svg:height="0.53723in"/>
    </style:presentation-page-layout>
    <style:presentation-page-layout style:name="Master1-PPL34" style:display-name="Closing Slide_opt2">
      <presentation:placeholder presentation:object="title" svg:x="0.42664in" svg:y="4.56744in" svg:width="4.42175in" svg:height="0.53723in"/>
    </style:presentation-page-layout>
    <style:presentation-page-layout style:name="Master1-PPL35" style:display-name="Closing Slide_opt1">
      <presentation:placeholder presentation:object="title" svg:x="0.42664in" svg:y="4.56744in" svg:width="4.42175in" svg:height="0.53723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21.98611in" fo:page-height="12.36806in" style:print-orientation="landscape" style:register-truth-ref-style-name=""/>
    </style:page-layout>
    <style:page-layout style:name="pageLayout3">
      <style:page-layout-properties fo:page-width="21.98611in" fo:page-height="12.36806in" style:print-orientation="landscape" style:register-truth-ref-style-name=""/>
    </style:page-layout>
    <style:style style:family="text" style:name="a7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4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draw:fill="none" draw:stroke="none"/>
    </style:style>
    <style:style style:family="presentation" style:name="a7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23">
      <style:graphic-properties draw:fill="none" draw:stroke="none"/>
    </style:style>
    <style:style style:family="graphic" style:name="a78" style:parent-style-name="Graphics">
      <style:graphic-properties draw:fill="none" fo:clip="rect(0in, 0in, 0in, 0in)" draw:stroke="none" draw:image-opacity="100%"/>
    </style:style>
    <style:style style:family="presentation" style:name="a524">
      <style:graphic-properties draw:fill="none" draw:stroke="non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25">
      <style:graphic-properties draw:fill="none" draw:stroke="solid" svg:stroke-width="0.01042in" svg:stroke-color="#000000" svg:stroke-opacity="100%" draw:stroke-linejoin="round" svg:stroke-linecap="butt"/>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5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7" style:parent-style-name="Graphics">
      <style:graphic-properties draw:fill="none" fo:clip="rect(0in, 0in, 0in, 0in)" draw:stroke="none" draw:image-opacity="100%"/>
    </style:style>
    <style:style style:family="presentation" style:name="a208">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draw:fill="none" draw:stroke="solid" svg:stroke-width="0.01042in" svg:stroke-color="#000000" svg:stroke-opacity="100%" draw:stroke-linejoin="round" svg:stroke-linecap="butt"/>
    </style:style>
    <style:style style:family="paragraph" style:name="a31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in)" draw:stroke="none" draw:image-opacity="100%"/>
    </style:style>
    <style:style style:family="presentation" style:name="a317">
      <style:graphic-properties draw:fill="none" draw:stroke="non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draw:fill="none" draw:stroke="solid" svg:stroke-width="0.01042in" svg:stroke-color="#000000" svg:stroke-opacity="100%" draw:stroke-linejoin="round" svg:stroke-linecap="butt"/>
    </style:style>
    <style:style style:family="paragraph" style:name="a426">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32" style:parent-style-name="Graphics">
      <style:graphic-properties draw:fill="none" fo:clip="rect(0in, 0in, 0in, 0in)" draw:stroke="none" draw:image-opacity="100%"/>
    </style:style>
    <style:style style:family="presentation" style:name="a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graphic" style:name="a89" style:parent-style-name="Graphics">
      <style:graphic-properties draw:fill="none" fo:clip="rect(0in, 0in, 0in, 0in)" draw:stroke="none" draw:image-opacity="100%"/>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presentation" style:name="a5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draw:fill="none" draw:stroke="none"/>
    </style:style>
    <style:style style:family="graphic" style:name="a108" style:parent-style-name="Graphics">
      <style:graphic-properties draw:fill="none" fo:clip="rect(0in, 0in, 0in, 0in)" draw:stroke="none" draw:image-opacity="100%"/>
    </style:style>
    <style:style style:family="paragraph" style:name="a21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graphic" style:name="a320">
      <style:graphic-properties fo:wrap-option="wrap" fo:padding-top="0.04998in" fo:padding-bottom="0.04998in" fo:padding-left="0.09998in" fo:padding-right="0.09998in" draw:textarea-vertical-align="middle" draw:textarea-horizontal-align="center" draw:fill="solid" draw:fill-color="#01dca5" draw:opacity="100%" draw:stroke="none" draw:auto-grow-width="false" draw:auto-grow-height="false"/>
      <style:paragraph-properties style:font-independent-line-spacing="true" style:writing-mode="lr-tb"/>
    </style:style>
    <style:style style:family="graphic" style:name="a219" style:parent-style-name="Graphics">
      <style:graphic-properties draw:fill="none" fo:clip="rect(0in, 0in, 0in, 0in)" draw:stroke="none" draw:image-opacity="100%"/>
    </style:style>
    <style:style style:family="text" style:name="a32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55583in" style:font-size-asian="0.55583in" style:font-size-complex="0.5558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24" style:parent-style-name="Graphics">
      <style:graphic-properties draw:fill="none" fo:clip="rect(0in, 0in, 0in, 0in)" draw:stroke="none" draw:image-opacity="100%"/>
    </style:style>
    <style:style style:family="text" style:name="a32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draw:fill="none" draw:stroke="solid" svg:stroke-width="0.01042in" svg:stroke-color="#000000" svg:stroke-opacity="100%" draw:stroke-linejoin="round" svg:stroke-linecap="butt"/>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parent-style-name="Graphics">
      <style:graphic-properties draw:fill="none" fo:clip="rect(0in, 0in, 0in, 0in)" draw:stroke="none" draw:image-opacity="100%"/>
    </style:style>
    <style:style style:family="presentation" style:name="a433">
      <style:graphic-properties draw:fill="none" draw:stroke="solid" svg:stroke-width="0.01042in" svg:stroke-color="#000000" svg:stroke-opacity="100%" draw:stroke-linejoin="round" svg:stroke-linecap="butt"/>
    </style:style>
    <style:style style:family="graphic" style:name="a90" style:parent-style-name="Graphics">
      <style:graphic-properties draw:fill="none" fo:clip="rect(0in, 0in, 0in, 0in)" draw:stroke="none" draw:image-opacity="100%"/>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40">
      <style:graphic-properties draw:fill="none" draw:stroke="non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2">
      <style:graphic-properties draw:fill="none" draw:stroke="solid" svg:stroke-width="0.01042in" svg:stroke-color="#000000" svg:stroke-opacity="100%" draw:stroke-linejoin="round" svg:stroke-linecap="butt"/>
    </style:style>
    <style:style style:family="presentation" style:name="a11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non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8">
      <style:graphic-properties draw:fill="none" draw:stroke="solid" svg:stroke-width="0.01042in" svg:stroke-color="#000000" svg:stroke-opacity="100%" draw:stroke-linejoin="round" svg:stroke-linecap="butt"/>
    </style:style>
    <style:style style:family="paragraph" style:name="a5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5" style:parent-style-name="Graphics">
      <style:graphic-properties draw:fill="none" fo:clip="rect(0in, 0in, 0in, 0in)" draw:stroke="none" draw:image-opacity="100%"/>
    </style:style>
    <style:style style:family="presentation" style:name="a5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draw:fill="none" draw:stroke="none"/>
    </style:style>
    <style:style style:family="drawing-page" style:name="a5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
      <style:graphic-properties draw:fill="none" draw:stroke="solid" svg:stroke-width="0.01042in" svg:stroke-color="#000000" svg:stroke-opacity="100%" draw:stroke-linejoin="round" svg:stroke-linecap="butt"/>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none"/>
    </style:style>
    <style:style style:family="presentation" style:name="a3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5" style:parent-style-name="Graphics">
      <style:graphic-properties draw:fill="none" fo:clip="rect(0in, 0in, 0in, 0in)" draw:stroke="none" draw:image-opacity="100%"/>
    </style:style>
    <style:style style:family="graphic" style:name="a336" style:parent-style-name="Graphics">
      <style:graphic-properties draw:fill="none" fo:clip="rect(0in, 0in, 0in, 0in)" draw:stroke="none" draw:image-opacity="100%"/>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55583in" style:font-size-asian="0.55583in" style:font-size-complex="0.5558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parent-style-name="Graphics">
      <style:graphic-properties draw:fill="none" fo:clip="rect(0in, 0in, 0in, 0in)" draw:stroke="none" draw:image-opacity="100%"/>
    </style:style>
    <style:style style:family="presentation" style:name="a55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5" style:parent-style-name="Graphics">
      <style:graphic-properties draw:fill="none" fo:clip="rect(0in, 0in, 0in, 0in)" draw:stroke="none" draw:image-opacity="100%"/>
    </style:style>
    <style:style style:family="graphic" style:name="a556" style:parent-style-name="Graphics">
      <style:graphic-properties draw:fill="none" fo:clip="rect(0in, 0in, 0in, 0in)" draw:stroke="none" draw:image-opacity="100%"/>
    </style:style>
    <style:style style:family="graphic" style:name="a126" style:parent-style-name="Graphics">
      <style:graphic-properties draw:fill="none" fo:clip="rect(0in, 0in, 0in, 0in)" draw:stroke="none" draw:image-opacity="100%"/>
    </style:style>
    <style:style style:family="presentation" style:name="a557">
      <style:graphic-properties draw:fill="none" draw:stroke="solid" svg:stroke-width="0.01042in" svg:stroke-color="#000000" svg:stroke-opacity="100%" draw:stroke-linejoin="round" svg:stroke-linecap="butt"/>
    </style:style>
    <style:style style:family="text" style:name="a12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solid" svg:stroke-width="0.01042in" svg:stroke-color="#000000" svg:stroke-opacity="100%" draw:stroke-linejoin="round" svg:stroke-linecap="butt"/>
    </style:style>
    <style:style style:family="paragraph" style:name="a55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3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draw:fill="none" draw:stroke="non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4998in" fo:padding-bottom="0.04998in" fo:padding-left="0.09998in" fo:padding-right="0.09998in" draw:textarea-vertical-align="middle" draw:textarea-horizontal-align="center" draw:fill="solid" draw:fill-color="#01dca5" draw:opacity="100%" draw:stroke="none" draw:auto-grow-width="false" draw:auto-grow-height="false"/>
      <style:paragraph-properties style:font-independent-line-spacing="true" style:writing-mode="lr-tb"/>
    </style:style>
    <style:style style:family="presentation" style:name="a347">
      <style:graphic-properties draw:fill="none" draw:stroke="solid" svg:stroke-width="0.01042in" svg:stroke-color="#000000" svg:stroke-opacity="100%" draw:stroke-linejoin="round" svg:stroke-linecap="butt"/>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fo:clip="rect(0in, 0in, 0in, 0in)" draw:stroke="none" draw:image-opacity="100%"/>
    </style:style>
    <style:style style:family="paragraph" style:name="a34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042in" svg:stroke-color="#000000" svg:stroke-opacity="100%" draw:stroke-linejoin="round" svg:stroke-linecap="butt"/>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
      <style:graphic-properties draw:fill="none" draw:stroke="none"/>
    </style:style>
    <style:style style:family="graphic" style:name="a564" style:parent-style-name="Graphics">
      <style:graphic-properties draw:fill="none" fo:clip="rect(0in, 0in, 0in, 0in)" draw:stroke="none" draw:image-opacity="100%"/>
    </style:style>
    <style:style style:family="presentation" style:name="a134">
      <style:graphic-properties draw:fill="none" draw:stroke="solid" svg:stroke-width="0.01042in" svg:stroke-color="#000000" svg:stroke-opacity="100%" draw:stroke-linejoin="round" svg:stroke-linecap="butt"/>
    </style:style>
    <style:style style:family="text" style:name="a56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none" draw:stroke="solid" svg:stroke-width="0.01042in" svg:stroke-color="#000000" svg:stroke-opacity="100%" draw:stroke-linejoin="round" svg:stroke-linecap="butt"/>
    </style:style>
    <style:style style:family="text" style:name="a24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46" style:parent-style-name="Graphics">
      <style:graphic-properties draw:fill="none" fo:clip="rect(0in, 0in, 0in, 0in)" draw:stroke="none" draw:image-opacity="100%"/>
    </style:style>
    <style:style style:family="presentation" style:name="a247">
      <style:graphic-properties draw:fill="none" draw:stroke="none"/>
    </style:style>
    <style:style style:family="presentation" style:name="a248">
      <style:graphic-properties draw:fill="none" draw:stroke="solid" svg:stroke-width="0.01042in" svg:stroke-color="#000000" svg:stroke-opacity="100%" draw:stroke-linejoin="round" svg:stroke-linecap="butt"/>
    </style:style>
    <style:style style:family="presentation" style:name="a3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graphic" style:name="a357" style:parent-style-name="Graphics">
      <style:graphic-properties draw:fill="none" fo:clip="rect(0in, 0in, 0in, 0in)" draw:stroke="none" draw:image-opacity="100%"/>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075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68" style:parent-style-name="Graphics">
      <style:graphic-properties draw:fill="none" fo:clip="rect(0in, 0in, 0in, 0in)" draw:stroke="none" draw:image-opacity="100%"/>
    </style:style>
    <style:style style:family="paragraph" style:name="a5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9">
      <style:graphic-properties draw:fill="none" draw:stroke="none"/>
    </style:style>
    <style:style style:family="graphic" style:name="a141" style:parent-style-name="Graphics">
      <style:graphic-properties draw:fill="none" fo:clip="rect(0in, 0in, 0in, 0in)" draw:stroke="none" draw:image-opacity="100%"/>
    </style:style>
    <style:style style:family="presentation" style:name="a5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2" style:parent-style-name="Graphics">
      <style:graphic-properties draw:fill="none" fo:clip="rect(0in, 0in, 0in, 0in)" draw:stroke="none" draw:image-opacity="100%"/>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paragraph" style:name="a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9" style:parent-style-name="Graphics">
      <style:graphic-properties draw:fill="none" fo:clip="rect(0in, 0in, 0in, 0in)" draw:stroke="none" draw:image-opacity="100%"/>
    </style:style>
    <style:style style:family="presentation" style:name="a2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presentation" style:name="a3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58" style:parent-style-name="Graphics">
      <style:graphic-properties draw:fill="none" fo:clip="rect(0in, 0in, 0in, 0in)" draw:stroke="none" draw:image-opacity="100%"/>
    </style:style>
    <style:style style:family="graphic" style:name="a361" style:parent-style-name="Graphics">
      <style:graphic-properties draw:fill="none" fo:clip="rect(0in, 0in, 0in, 0in)" draw:stroke="none" draw:image-opacity="100%"/>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365">
      <style:graphic-properties draw:fill="none" draw:stroke="solid" svg:stroke-width="0.01042in" svg:stroke-color="#000000" svg:stroke-opacity="100%" draw:stroke-linejoin="round" svg:stroke-linecap="butt"/>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draw:fill="none" draw:stroke="solid" svg:stroke-width="0.01042in" svg:stroke-color="#000000" svg:stroke-opacity="100%" draw:stroke-linejoin="round" svg:stroke-linecap="butt"/>
    </style:style>
    <style:style style:family="presentation" style:name="a3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graphic" style:name="a581" style:parent-style-name="Graphics">
      <style:graphic-properties draw:fill="none" fo:clip="rect(0in, 0in, 0in, 0in)" draw:stroke="none" draw:image-opacity="100%"/>
    </style:style>
    <style:style style:family="graphic" style:name="a479">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151">
      <style:graphic-properties draw:fill="none" draw:stroke="solid" svg:stroke-width="0.01042in" svg:stroke-color="#000000" svg:stroke-opacity="100%" draw:stroke-linejoin="round" svg:stroke-linecap="butt"/>
    </style:style>
    <style:style style:family="presentation" style:name="a582">
      <style:graphic-properties draw:fill="none" draw:stroke="solid" svg:stroke-width="0.01042in" svg:stroke-color="#000000" svg:stroke-opacity="100%" draw:stroke-linejoin="round" svg:stroke-linecap="butt"/>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parent-style-name="Graphics">
      <style:graphic-properties draw:fill="none" fo:clip="rect(0in, 0in, 0in, 0in)" draw:stroke="none" draw:image-opacity="100%"/>
    </style:style>
    <style:style style:family="graphic" style:name="a261">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graphic" style:name="a159" style:parent-style-name="Graphics">
      <style:graphic-properties draw:fill="none" fo:clip="rect(0in, 0in, 0in, 0in)" draw:stroke="none" draw:image-opacity="100%"/>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55583in" style:font-size-asian="0.55583in" style:font-size-complex="0.5558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8">
      <style:graphic-properties draw:fill="none" draw:stroke="none"/>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9">
      <style:graphic-properties draw:fill="none" draw:stroke="solid" svg:stroke-width="0.01042in" svg:stroke-color="#000000" svg:stroke-opacity="100%" draw:stroke-linejoin="round" svg:stroke-linecap="butt"/>
    </style:style>
    <style:style style:family="text" style:name="a372">
      <style:text-properties fo:font-variant="normal" fo:text-transform="none" fo:color="#01dca5"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78" style:parent-style-name="Graphics">
      <style:graphic-properties draw:fill="none" fo:clip="rect(0in, 0in, 0in, 0in)" draw:stroke="none" draw:image-opacity="100%"/>
    </style:style>
    <style:style style:family="text" style:name="a48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solid" svg:stroke-width="0.01042in" svg:stroke-color="#000000" svg:stroke-opacity="100%" draw:stroke-linejoin="round" svg:stroke-linecap="butt"/>
    </style:style>
    <style:style style:family="paragraph" style:name="a481">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87" style:parent-style-name="Graphics">
      <style:graphic-properties draw:fill="none" fo:clip="rect(0in, 0in, 0in, 0in)" draw:stroke="none" draw:image-opacity="100%"/>
    </style:style>
    <style:style style:family="presentation" style:name="a488">
      <style:graphic-properties draw:fill="none" draw:stroke="non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017d69" draw:opacity="100%" draw:stroke="none" draw:auto-grow-width="false" draw:auto-grow-height="false"/>
      <style:paragraph-properties style:font-independent-line-spacing="true" style:writing-mode="lr-tb"/>
    </style:style>
    <style:style style:family="presentation" style:name="a489">
      <style:graphic-properties draw:fill="none" draw:stroke="solid" svg:stroke-width="0.01042in" svg:stroke-color="#000000" svg:stroke-opacity="100%" draw:stroke-linejoin="round" svg:stroke-linecap="butt"/>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aragraph" style:name="a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9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parent-style-name="Graphics">
      <style:graphic-properties draw:fill="none" fo:clip="rect(0in, 0in, 0in, 0in)" draw:stroke="none" draw:image-opacity="100%"/>
    </style:style>
    <style:style style:family="presentation" style:name="a16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none" draw:stroke="solid" svg:stroke-width="0.01042in" svg:stroke-color="#000000" svg:stroke-opacity="100%" draw:stroke-linejoin="round" svg:stroke-linecap="butt"/>
    </style:style>
    <style:style style:family="text" style:name="a166">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draw:fill="none" draw:stroke="none"/>
    </style:style>
    <style:style style:family="presentation" style:name="a2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17056in" style:font-size-asian="0.17056in" style:font-size-complex="0.17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17056in" style:font-size-asian="0.17056in" style:font-size-complex="0.17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87.052%" fo:text-align="left" style:tab-stop-distance="1in" fo:margin-left="0.006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17056in" style:font-size-asian="0.17056in" style:font-size-complex="0.17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01dca5"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6">
      <style:graphic-properties draw:fill="none" draw:stroke="none"/>
    </style:style>
    <style:style style:family="presentation" style:name="a497">
      <style:graphic-properties draw:fill="none" draw:stroke="solid" svg:stroke-width="0.01042in" svg:stroke-color="#000000" svg:stroke-opacity="100%" draw:stroke-linejoin="round" svg:stroke-linecap="butt"/>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draw:fill="none" draw:stroke="solid" svg:stroke-width="0.01042in" svg:stroke-color="#000000" svg:stroke-opacity="100%" draw:stroke-linejoin="round" svg:stroke-linecap="butt"/>
    </style:style>
    <style:style style:family="paragraph" style:name="a4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Outfit" style:font-family-asian="Outfit" style:font-family-complex="Outfit" fo:font-size="0.17056in" style:font-size-asian="0.17056in" style:font-size-complex="0.17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paragraph" style:name="a281">
      <style:paragraph-properties fo:line-height="106.514%" fo:text-align="left" style:tab-stop-distance="1in" fo:margin-left="0.006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55583in" style:font-size-asian="0.55583in" style:font-size-complex="0.5558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86" style:parent-style-name="Graphics">
      <style:graphic-properties draw:fill="none" fo:clip="rect(0in, 0in, 0in, 0in)" draw:stroke="none" draw:image-opacity="100%"/>
    </style:style>
    <style:style style:family="graphic" style:name="a287" style:parent-style-name="Graphics">
      <style:graphic-properties draw:fill="none" fo:clip="rect(0in, 0in, 0in, 0in)" draw:stroke="none" draw:image-opacity="100%"/>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parent-style-name="Graphics">
      <style:graphic-properties draw:fill="none" fo:clip="rect(0in, 0in, 0in, 0in)" draw:stroke="none" draw:image-opacity="100%"/>
    </style:style>
    <style:style style:family="presentation" style:name="a393">
      <style:graphic-properties draw:fill="none"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presentation" style:name="a397">
      <style:graphic-properties draw:fill="none" draw:stroke="solid" svg:stroke-width="0.01042in" svg:stroke-color="#000000" svg:stroke-opacity="100%" draw:stroke-linejoin="round" svg:stroke-linecap="butt"/>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draw:fill="none" draw:stroke="non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graphic" style:name="a184" style:parent-style-name="Graphics">
      <style:graphic-properties draw:fill="none" fo:clip="rect(0in, 0in, 0in, 0in)" draw:stroke="none" draw:image-opacity="100%"/>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draw:fill="none" draw:stroke="solid" svg:stroke-width="0.01042in" svg:stroke-color="#000000" svg:stroke-opacity="100%" draw:stroke-linejoin="round" svg:stroke-linecap="butt"/>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draw:fill="none" draw:stroke="solid" svg:stroke-width="0.01042in" svg:stroke-color="#000000" svg:stroke-opacity="100%" draw:stroke-linejoin="round" svg:stroke-linecap="butt"/>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 style:parent-style-name="Graphics">
      <style:graphic-properties draw:fill="none" fo:clip="rect(0in, 0in, 0in, 0in)" draw:stroke="none" draw:image-opacity="100%"/>
    </style:style>
    <style:style style:family="text" style:name="a15">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parent-style-name="Graphics">
      <style:graphic-properties draw:fill="none" fo:clip="rect(0in, 0in, 0in, 0in)" draw:stroke="none" draw:image-opacity="100%"/>
    </style:style>
    <style:style style:family="presentation" style:name="a19">
      <style:graphic-properties draw:fill="none" draw:stroke="solid" svg:stroke-width="0.01042in" svg:stroke-color="#000000" svg:stroke-opacity="100%" draw:stroke-linejoin="round" svg:stroke-linecap="butt"/>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1dca5"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text" style:name="a29">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draw:fill="none" fo:clip="rect(0in, 0in, 0in, 0in)" draw:stroke="none" draw:image-opacity="100%"/>
    </style:style>
    <style:style style:family="text" style:name="a33">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042in" svg:stroke-color="#000000" svg:stroke-opacity="100%" draw:stroke-linejoin="round" svg:stroke-linecap="butt"/>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graphic" style:name="a47" style:parent-style-name="Graphics">
      <style:graphic-properties draw:fill="none" fo:clip="rect(0in, 0in, 0in, 0in)" draw:stroke="none" draw:image-opacity="100%"/>
    </style:style>
    <style:style style:family="graphic" style:name="a48" style:parent-style-name="Graphics">
      <style:graphic-properties draw:fill="none" fo:clip="rect(0in, 0in, 0in, 0in)" draw:stroke="none" draw:image-opacity="100%"/>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7792in" style:font-size-asian="0.27792in" style:font-size-complex="0.2779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
      <style:graphic-properties fo:wrap-option="wrap" fo:padding-top="0.04998in" fo:padding-bottom="0.04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
      <style:graphic-properties draw:fill="none" draw:stroke="solid" svg:stroke-width="0.01042in" svg:stroke-color="#000000" svg:stroke-opacity="100%" draw:stroke-linejoin="round" svg:stroke-linecap="butt"/>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2">
      <style:graphic-properties draw:fill="none" draw:stroke="solid" svg:stroke-width="0.01042in" svg:stroke-color="#000000" svg:stroke-opacity="100%" draw:stroke-linejoin="round" svg:stroke-linecap="but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parent-style-name="Graphics">
      <style:graphic-properties draw:fill="none" fo:clip="rect(0in, 0in, 0in, 0in)" draw:stroke="none" draw:image-opacity="100%"/>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graphic" style:name="a507" style:parent-style-name="Graphics">
      <style:graphic-properties draw:fill="none" fo:clip="rect(0in, 0in, 0in, 0in)" draw:stroke="none" draw:image-opacity="100%"/>
    </style:style>
    <style:style style:family="presentation" style:name="a508">
      <style:graphic-properties draw:fill="none" draw:stroke="none"/>
    </style:style>
    <style:style style:family="presentation" style:name="a509">
      <style:graphic-properties draw:fill="none" draw:stroke="none"/>
    </style:style>
    <style:style style:family="presentation" style:name="a4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5486in" style:font-size-asian="0.45486in" style:font-size-complex="0.4548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06">
      <style:graphic-properties fo:wrap-option="wrap" fo:padding-top="0in" fo:padding-bottom="0in" fo:padding-left="0in" fo:padding-right="0in" draw:textarea-vertical-align="top" draw:textarea-horizontal-align="left" draw:fill="solid" draw:fill-color="#01dca5" draw:opacity="100%" draw:stroke="none" draw:auto-grow-width="false" draw:auto-grow-height="false"/>
      <style:paragraph-properties style:font-independent-line-spacing="true" style:writing-mode="lr-tb"/>
    </style:style>
    <style:style style:family="graphic" style:name="a63" style:parent-style-name="Graphics">
      <style:graphic-properties draw:fill="none" fo:clip="rect(0in, 0in, 0in, 0in)" draw:stroke="none" draw:image-opacity="100%"/>
    </style:style>
    <style:style style:family="text" style:name="a407">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41694in" style:font-size-asian="0.41694in" style:font-size-complex="0.41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draw:fill="none" draw:stroke="solid" svg:stroke-width="0.01042in" svg:stroke-color="#000000" svg:stroke-opacity="100%" draw:stroke-linejoin="round" svg:stroke-linecap="butt"/>
    </style:style>
    <style:style style:family="presentation" style:name="a510">
      <style:graphic-properties draw:fill="none" draw:stroke="non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draw:fill="none" draw:stroke="solid" svg:stroke-width="0.01042in" svg:stroke-color="#000000" svg:stroke-opacity="100%" draw:stroke-linejoin="round" svg:stroke-linecap="butt"/>
    </style:style>
    <style:style style:family="presentation" style:name="a40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8" style:parent-style-name="Graphics">
      <style:graphic-properties draw:fill="none" fo:clip="rect(0in, 0in, 0in, 0in)" draw:stroke="none" draw:image-opacity="100%"/>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graphic" style:name="a301" style:parent-style-name="Graphics">
      <style:graphic-properties draw:fill="none" fo:clip="rect(0in, 0in, 0in, 0in)" draw:stroke="none" draw:image-opacity="100%"/>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55583in" style:font-size-asian="0.55583in" style:font-size-complex="0.5558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05" style:parent-style-name="Graphics">
      <style:graphic-properties draw:fill="none" fo:clip="rect(0in, 0in, 0in, 0in)" draw:stroke="none" draw:image-opacity="100%"/>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10" style:parent-style-name="Graphics">
      <style:graphic-properties draw:fill="none" fo:clip="rect(0in, 0in, 0in, 0in)" draw:stroke="none" draw:image-opacity="100%"/>
    </style:style>
    <style:style style:family="presentation" style:name="a309">
      <style:graphic-properties draw:fill="none" draw:stroke="solid" svg:stroke-width="0.01042in" svg:stroke-color="#000000" svg:stroke-opacity="100%" draw:stroke-linejoin="round" svg:stroke-linecap="butt"/>
    </style:style>
    <style:style style:family="text" style:name="a411">
      <style:text-properties fo:font-variant="normal" fo:text-transform="none" fo:color="#003c3b" style:text-line-through-type="none" style:text-line-through-style="none" style:text-line-through-width="auto" style:text-line-through-color="font-color" style:text-position="0% 100%" fo:font-family="Outfit" style:font-family-asian="Outfit" style:font-family-complex="Outfit" fo:font-size="0.20208in" style:font-size-asian="0.20208in" style:font-size-complex="0.2020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0.5in" fo:margin-right="0in" fo:text-indent="-0.35104in" fo:margin-top="0.06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round" svg:stroke-linecap="butt"/>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003c3b"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in)" draw:stroke="none" draw:image-opacity="100%"/>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3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13">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2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6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59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5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51">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482">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23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63">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51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2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45">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8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27">
      <text:list-level-style-bullet text:level="1" text:bullet-char="•">
        <style:list-level-properties text:space-before="0.14896in" text:min-label-width="0.35104in"/>
        <style:text-properties fo:color="#003c3b" fo:font-family="Arial" fo:font-size="0.20208in"/>
      </text:list-level-style-bullet>
      <text:list-level-style-bullet text:level="2" text:bullet-char="•">
        <style:list-level-properties text:space-before="0.64896in" text:min-label-width="0.35104in"/>
        <style:text-properties fo:color="#003c3b" fo:font-family="Arial" fo:font-size="0.20208in"/>
      </text:list-level-style-bullet>
      <text:list-level-style-bullet text:level="3" text:bullet-char="•">
        <style:list-level-properties text:space-before="1.14896in" text:min-label-width="0.35104in"/>
        <style:text-properties fo:color="#003c3b" fo:font-family="Arial" fo:font-size="0.20208in"/>
      </text:list-level-style-bullet>
      <text:list-level-style-bullet text:level="4" text:bullet-char="•">
        <style:list-level-properties text:space-before="1.64896in" text:min-label-width="0.35104in"/>
        <style:text-properties fo:color="#003c3b" fo:font-family="Arial" fo:font-size="0.20208in"/>
      </text:list-level-style-bullet>
      <text:list-level-style-bullet text:level="5" text:bullet-char="•">
        <style:list-level-properties text:space-before="2.14896in" text:min-label-width="0.35104in"/>
        <style:text-properties fo:color="#003c3b" fo:font-family="Arial" fo:font-size="0.20208in"/>
      </text:list-level-style-bullet>
      <text:list-level-style-bullet text:level="6" text:bullet-char="•">
        <style:list-level-properties text:space-before="2.64896in" text:min-label-width="0.35104in"/>
        <style:text-properties fo:color="#003c3b" fo:font-family="Arial" fo:font-size="0.20208in"/>
      </text:list-level-style-bullet>
      <text:list-level-style-bullet text:level="7" text:bullet-char="•">
        <style:list-level-properties text:space-before="3.14896in" text:min-label-width="0.35104in"/>
        <style:text-properties fo:color="#003c3b" fo:font-family="Arial" fo:font-size="0.20208in"/>
      </text:list-level-style-bullet>
      <text:list-level-style-bullet text:level="8" text:bullet-char="•">
        <style:list-level-properties text:space-before="3.64896in" text:min-label-width="0.35104in"/>
        <style:text-properties fo:color="#003c3b" fo:font-family="Arial" fo:font-size="0.20208in"/>
      </text:list-level-style-bullet>
      <text:list-level-style-bullet text:level="9" text:bullet-char="•">
        <style:list-level-properties text:space-before="4.14896in" text:min-label-width="0.35104in"/>
        <style:text-properties fo:color="#003c3b" fo:font-family="Arial" fo:font-size="0.20208in"/>
      </text:list-level-style-bullet>
    </text:list-style>
    <text:list-style style:name="a4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3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6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8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1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7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5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2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Custom-Design" style:page-layout-name="pageLayout1" draw:style-name="a0">
      <draw:frame draw:id="id0" presentation:style-name="a3" draw:name="Google Shape;6;p38" svg:x="0.68778in" svg:y="0.29925in" svg:width="8.62445in" svg:height="1.08726in" presentation:class="title" presentation:placeholder="false">
        <draw:text-box>
          <text:p text:style-name="a2" text:class-names="" text:cond-style-name=""><text:span text:style-name="a1" text:class-names=""/></text:p>
        </draw:text-box>
        <svg:title/>
        <svg:desc/>
      </draw:frame>
      <presentation:notes style:page-layout-name="pageLayout2" draw:style-name="a9">
        <draw:page-thumbnail svg:x="3.66508in" svg:y="0.9276in" svg:width="14.65814in" svg:height="4.63801in" presentation:class="page" draw:id="id1" presentation:style-name="a4" draw:name="Google Shape;3;n">
          <svg:title/>
          <svg:desc/>
        </draw:page-thumbnail>
        <draw:frame draw:id="id2" presentation:style-name="a8" draw:name="Google Shape;4;n" svg:x="2.1986in" svg:y="5.87481in" svg:width="17.58888in" svg:height="5.56562in" presentation:class="notes" presentation:placeholder="false">
          <draw:text-box>
            <text:list text:style-name="a7">
              <text:list-item>
                <text:p text:style-name="a6" text:class-names="" text:cond-style-name=""><text:span text:style-name="a5" text:class-names=""/></text:p>
              </text:list-item>
            </text:list>
          </draw:text-box>
          <svg:title/>
          <svg:desc/>
        </draw:frame>
      </presentation:notes>
    </style:master-page>
    <style:master-page style:name="Master1-Layout1-cust-Cover-Slide_grey_opt1" style:page-layout-name="pageLayout1" draw:style-name="a10">
      <draw:frame draw:id="id3" presentation:style-name="a13" draw:name="Google Shape;8;p42" svg:x="0.42559in" svg:y="1.67052in" svg:width="3.49989in" svg:height="1.8751in" presentation:class="title" presentation:placeholder="false">
        <draw:text-box>
          <text:p text:style-name="a12" text:class-names="" text:cond-style-name=""><text:span text:style-name="a11" text:class-names=""/></text:p>
        </draw:text-box>
        <svg:title/>
        <svg:desc/>
      </draw:frame>
      <draw:frame draw:id="id4" draw:style-name="a14" draw:name="Google Shape;9;p42"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5" presentation:style-name="a17" draw:name="Google Shape;10;p42" svg:x="0.42559in" svg:y="4.06603in" svg:width="4.32369in" svg:height="0.4656in" presentation:class="subtitle" presentation:placeholder="false">
        <draw:text-box>
          <text:p text:style-name="a16" text:class-names="" text:cond-style-name=""><text:span text:style-name="a15" text:class-names=""/></text:p>
        </draw:text-box>
        <svg:title/>
        <svg:desc/>
      </draw:frame>
      <draw:frame draw:id="id6" draw:style-name="a18" draw:name="Google Shape;11;p42" svg:x="5.25072in" svg:y="0.0002in" svg:width="4.74928in" svg:height="5.62461in" style:rel-width="scale" style:rel-height="scale">
        <draw:image xlink:href="media/image6.png" xlink:type="simple" xlink:show="embed" xlink:actuate="onLoad"/>
        <svg:title/>
        <svg:desc>Icon

Description automatically generated</svg:desc>
      </draw:frame>
      <presentation:notes style:page-layout-name="pageLayout2" draw:style-name="a24">
        <draw:page-thumbnail svg:x="3.66508in" svg:y="0.9276in" svg:width="14.65814in" svg:height="4.63801in" presentation:class="page" draw:id="id1" presentation:style-name="a19" draw:name="Google Shape;3;n">
          <svg:title/>
          <svg:desc/>
        </draw:page-thumbnail>
        <draw:frame draw:id="id2" presentation:style-name="a23" draw:name="Google Shape;4;n" svg:x="2.1986in" svg:y="5.87481in" svg:width="17.58888in" svg:height="5.56562in" presentation:class="notes" presentation:placeholder="false">
          <draw:text-box>
            <text:list text:style-name="a22">
              <text:list-item>
                <text:p text:style-name="a21" text:class-names="" text:cond-style-name=""><text:span text:style-name="a20" text:class-names=""/></text:p>
              </text:list-item>
            </text:list>
          </draw:text-box>
          <svg:title/>
          <svg:desc/>
        </draw:frame>
      </presentation:notes>
    </style:master-page>
    <style:master-page style:name="Master1-Layout2-cust-Charts-and-Tables" style:page-layout-name="pageLayout1" draw:style-name="a25">
      <draw:custom-shape svg:x="0in" svg:y="0in" svg:width="0.1355in" svg:height="5.62468in" draw:id="id7" draw:style-name="a28" draw:name="Google Shape;13;p40">
        <svg:title/>
        <svg:desc/>
        <text:p text:style-name="a27" text:class-names="" text:cond-style-name=""><text:span text:style-name="a26"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8" presentation:style-name="a31" draw:name="Google Shape;14;p40" svg:x="0.42664in" svg:y="0.51451in" svg:width="6.80962in" svg:height="0.50517in" presentation:class="title" presentation:placeholder="false">
        <draw:text-box>
          <text:p text:style-name="a30" text:class-names="" text:cond-style-name=""><text:span text:style-name="a29" text:class-names=""/></text:p>
        </draw:text-box>
        <svg:title/>
        <svg:desc/>
      </draw:frame>
      <draw:frame draw:id="id9" draw:style-name="a32" draw:name="Google Shape;15;p40" svg:x="7.43559in" svg:y="0.11072in" svg:width="1.79672in" svg:height="1.18252in" style:rel-width="scale" style:rel-height="scale">
        <draw:image xlink:href="media/image5.png" xlink:type="simple" xlink:show="embed" xlink:actuate="onLoad"/>
        <svg:title/>
        <svg:desc>Logo

Description automatically generated with medium confidence</svg:desc>
      </draw:frame>
      <draw:frame draw:id="id10" presentation:style-name="a36" draw:name="Google Shape;16;p40" svg:x="0.46429in" svg:y="1.29869in" svg:width="9.00612in" svg:height="3.91342in" presentation:class="outline" presentation:placeholder="false">
        <draw:text-box>
          <text:list text:style-name="a35">
            <text:list-item>
              <text:p text:style-name="a34" text:class-names="" text:cond-style-name=""><text:span text:style-name="a33" text:class-names=""/></text:p>
            </text:list-item>
          </text:list>
        </draw:text-box>
        <svg:title/>
        <svg:desc/>
      </draw:frame>
      <presentation:notes style:page-layout-name="pageLayout2" draw:style-name="a42">
        <draw:page-thumbnail svg:x="3.66508in" svg:y="0.9276in" svg:width="14.65814in" svg:height="4.63801in" presentation:class="page" draw:id="id1" presentation:style-name="a37" draw:name="Google Shape;3;n">
          <svg:title/>
          <svg:desc/>
        </draw:page-thumbnail>
        <draw:frame draw:id="id2" presentation:style-name="a41" draw:name="Google Shape;4;n" svg:x="2.1986in" svg:y="5.87481in" svg:width="17.58888in" svg:height="5.56562in" presentation:class="notes" presentation:placeholder="false">
          <draw:text-box>
            <text:list text:style-name="a40">
              <text:list-item>
                <text:p text:style-name="a39" text:class-names="" text:cond-style-name=""><text:span text:style-name="a38" text:class-names=""/></text:p>
              </text:list-item>
            </text:list>
          </draw:text-box>
          <svg:title/>
          <svg:desc/>
        </draw:frame>
      </presentation:notes>
    </style:master-page>
    <style:master-page style:name="Master1-Layout3-cust-Cover-Slide_green_opt1" style:page-layout-name="pageLayout1" draw:style-name="a43">
      <draw:custom-shape svg:x="-0.00727in" svg:y="-0.00814in" svg:width="10.00727in" svg:height="5.64119in" draw:id="id11" draw:style-name="a46" draw:name="Google Shape;18;p39">
        <svg:title/>
        <svg:desc/>
        <text:p text:style-name="a45" text:class-names="" text:cond-style-name=""><text:span text:style-name="a44"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12" draw:style-name="a47" draw:name="Google Shape;19;p39" svg:x="0.23626in" svg:y="0.35532in" svg:width="4.52283in" svg:height="2.9767in" style:rel-width="scale" style:rel-height="scale">
        <draw:image xlink:href="media/image7.png" xlink:type="simple" xlink:show="embed" xlink:actuate="onLoad"/>
        <svg:title/>
        <svg:desc>Logo

Description automatically generated</svg:desc>
      </draw:frame>
      <draw:frame draw:id="id13" draw:style-name="a48" draw:name="Google Shape;20;p39" svg:x="5.75217in" svg:y="0.00845in" svg:width="4.24783in" svg:height="5.62461in" style:rel-width="scale" style:rel-height="scale">
        <draw:image xlink:href="media/image8.png" xlink:type="simple" xlink:show="embed" xlink:actuate="onLoad"/>
        <svg:title/>
        <svg:desc>Icon

Description automatically generated</svg:desc>
      </draw:frame>
      <draw:frame draw:id="id14" presentation:style-name="a51" draw:name="Google Shape;21;p39" svg:x="0.42559in" svg:y="3.38708in" svg:width="5.14749in" svg:height="1.09127in" presentation:class="title" presentation:placeholder="false">
        <draw:text-box>
          <text:p text:style-name="a50" text:class-names="" text:cond-style-name=""><text:span text:style-name="a49" text:class-names=""/></text:p>
        </draw:text-box>
        <svg:title/>
        <svg:desc/>
      </draw:frame>
      <presentation:notes style:page-layout-name="pageLayout2" draw:style-name="a57">
        <draw:page-thumbnail svg:x="3.66508in" svg:y="0.9276in" svg:width="14.65814in" svg:height="4.63801in" presentation:class="page" draw:id="id1" presentation:style-name="a52" draw:name="Google Shape;3;n">
          <svg:title/>
          <svg:desc/>
        </draw:page-thumbnail>
        <draw:frame draw:id="id2" presentation:style-name="a56" draw:name="Google Shape;4;n" svg:x="2.1986in" svg:y="5.87481in" svg:width="17.58888in" svg:height="5.56562in" presentation:class="notes" presentation:placeholder="false">
          <draw:text-box>
            <text:list text:style-name="a55">
              <text:list-item>
                <text:p text:style-name="a54" text:class-names="" text:cond-style-name=""><text:span text:style-name="a53" text:class-names=""/></text:p>
              </text:list-item>
            </text:list>
          </draw:text-box>
          <svg:title/>
          <svg:desc/>
        </draw:frame>
      </presentation:notes>
    </style:master-page>
    <style:master-page style:name="Master1-Layout4-cust-Cover-Slide_white_opt1" style:page-layout-name="pageLayout1" draw:style-name="a58">
      <draw:frame draw:id="id15" draw:style-name="a59" draw:name="Google Shape;23;p41" svg:x="5.78799in" svg:y="0.00039in" svg:width="4.21201in" svg:height="5.62461in" style:rel-width="scale" style:rel-height="scale">
        <draw:image xlink:href="media/image9.png" xlink:type="simple" xlink:show="embed" xlink:actuate="onLoad"/>
        <svg:title/>
        <svg:desc>Icon

Description automatically generated</svg:desc>
      </draw:frame>
      <draw:frame draw:id="id16" presentation:style-name="a62" draw:name="Google Shape;24;p41" svg:x="0.42559in" svg:y="3.38708in" svg:width="5.14749in" svg:height="1.09127in" presentation:class="title" presentation:placeholder="false">
        <draw:text-box>
          <text:p text:style-name="a61" text:class-names="" text:cond-style-name=""><text:span text:style-name="a60" text:class-names=""/></text:p>
        </draw:text-box>
        <svg:title/>
        <svg:desc/>
      </draw:frame>
      <draw:frame draw:id="id17" draw:style-name="a63" draw:name="Google Shape;25;p41" svg:x="0.25306in" svg:y="0.35532in" svg:width="4.52283in" svg:height="2.9767in" style:rel-width="scale" style:rel-height="scale">
        <draw:image xlink:href="media/image10.png" xlink:type="simple" xlink:show="embed" xlink:actuate="onLoad"/>
        <svg:title/>
        <svg:desc>Logo

Description automatically generated with medium confidence</svg:desc>
      </draw:frame>
      <presentation:notes style:page-layout-name="pageLayout2" draw:style-name="a69">
        <draw:page-thumbnail svg:x="3.66508in" svg:y="0.9276in" svg:width="14.65814in" svg:height="4.63801in" presentation:class="page" draw:id="id1" presentation:style-name="a64" draw:name="Google Shape;3;n">
          <svg:title/>
          <svg:desc/>
        </draw:page-thumbnail>
        <draw:frame draw:id="id2" presentation:style-name="a68" draw:name="Google Shape;4;n" svg:x="2.1986in" svg:y="5.87481in" svg:width="17.58888in" svg:height="5.56562in" presentation:class="notes" presentation:placeholder="false">
          <draw:text-box>
            <text:list text:style-name="a67">
              <text:list-item>
                <text:p text:style-name="a66" text:class-names="" text:cond-style-name=""><text:span text:style-name="a65" text:class-names=""/></text:p>
              </text:list-item>
            </text:list>
          </draw:text-box>
          <svg:title/>
          <svg:desc/>
        </draw:frame>
      </presentation:notes>
    </style:master-page>
    <style:master-page style:name="Master1-Layout5-cust-Cover-Slide_green_opt2" style:page-layout-name="pageLayout1" draw:style-name="a70">
      <draw:custom-shape svg:x="0in" svg:y="0in" svg:width="10in" svg:height="5.625in" draw:id="id18" draw:style-name="a73" draw:name="Google Shape;27;p43">
        <svg:title/>
        <svg:desc/>
        <text:p text:style-name="a72" text:class-names="" text:cond-style-name=""><text:span text:style-name="a71"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19" draw:style-name="a74" draw:name="Google Shape;28;p43" svg:x="0.3339in" svg:y="0.11205in" svg:width="1.79672in" svg:height="1.18252in" style:rel-width="scale" style:rel-height="scale">
        <draw:image xlink:href="media/image11.png" xlink:type="simple" xlink:show="embed" xlink:actuate="onLoad"/>
        <svg:title/>
        <svg:desc>Logo

Description automatically generated</svg:desc>
      </draw:frame>
      <draw:frame draw:id="id20" presentation:style-name="a77" draw:name="Google Shape;29;p43" svg:x="0.42559in" svg:y="4.06603in" svg:width="4.32369in" svg:height="0.4656in" presentation:class="subtitle" presentation:placeholder="false">
        <draw:text-box>
          <text:p text:style-name="a76" text:class-names="" text:cond-style-name=""><text:span text:style-name="a75" text:class-names=""/></text:p>
        </draw:text-box>
        <svg:title/>
        <svg:desc/>
      </draw:frame>
      <draw:frame draw:id="id21" draw:style-name="a78" draw:name="Google Shape;30;p43" svg:x="5.19024in" svg:y="0in" svg:width="4.80976in" svg:height="5.62461in" style:rel-width="scale" style:rel-height="scale">
        <draw:image xlink:href="media/image12.png" xlink:type="simple" xlink:show="embed" xlink:actuate="onLoad"/>
        <svg:title/>
        <svg:desc>Icon

Description automatically generated</svg:desc>
      </draw:frame>
      <draw:frame draw:id="id22" presentation:style-name="a81" draw:name="Google Shape;31;p43" svg:x="0.42559in" svg:y="1.67052in" svg:width="3.49989in" svg:height="1.8751in" presentation:class="title" presentation:placeholder="false">
        <draw:text-box>
          <text:p text:style-name="a80" text:class-names="" text:cond-style-name=""><text:span text:style-name="a79" text:class-names=""/></text:p>
        </draw:text-box>
        <svg:title/>
        <svg:desc/>
      </draw:frame>
      <presentation:notes style:page-layout-name="pageLayout2" draw:style-name="a87">
        <draw:page-thumbnail svg:x="3.66508in" svg:y="0.9276in" svg:width="14.65814in" svg:height="4.63801in" presentation:class="page" draw:id="id1" presentation:style-name="a82" draw:name="Google Shape;3;n">
          <svg:title/>
          <svg:desc/>
        </draw:page-thumbnail>
        <draw:frame draw:id="id2" presentation:style-name="a86" draw:name="Google Shape;4;n" svg:x="2.1986in" svg:y="5.87481in" svg:width="17.58888in" svg:height="5.56562in" presentation:class="notes" presentation:placeholder="false">
          <draw:text-box>
            <text:list text:style-name="a85">
              <text:list-item>
                <text:p text:style-name="a84" text:class-names="" text:cond-style-name=""><text:span text:style-name="a83" text:class-names=""/></text:p>
              </text:list-item>
            </text:list>
          </draw:text-box>
          <svg:title/>
          <svg:desc/>
        </draw:frame>
      </presentation:notes>
    </style:master-page>
    <style:master-page style:name="Master1-Layout6-cust-Cover-Slide_white_opt3" style:page-layout-name="pageLayout1" draw:style-name="a88">
      <draw:frame draw:id="id23" draw:style-name="a89" draw:name="Google Shape;33;p44" svg:x="5.61628in" svg:y="-0.00123in" svg:width="4.91351in" svg:height="4.94387in" style:rel-width="scale" style:rel-height="scale">
        <draw:image xlink:href="media/image13.png" xlink:type="simple" xlink:show="embed" xlink:actuate="onLoad"/>
        <svg:title/>
        <svg:desc>A group of people inside a building

Description automatically generated with medium confidence</svg:desc>
      </draw:frame>
      <draw:frame draw:id="id24" draw:style-name="a90" draw:name="Google Shape;34;p44"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25" presentation:style-name="a93" draw:name="Google Shape;35;p44" svg:x="0.42559in" svg:y="4.06603in" svg:width="4.32369in" svg:height="0.4656in" presentation:class="subtitle" presentation:placeholder="false">
        <draw:text-box>
          <text:p text:style-name="a92" text:class-names="" text:cond-style-name=""><text:span text:style-name="a91" text:class-names=""/></text:p>
        </draw:text-box>
        <svg:title/>
        <svg:desc/>
      </draw:frame>
      <draw:frame draw:id="id26" presentation:style-name="a96" draw:name="Google Shape;36;p44" svg:x="0.42559in" svg:y="1.67052in" svg:width="3.49989in" svg:height="1.8751in" presentation:class="title" presentation:placeholder="false">
        <draw:text-box>
          <text:p text:style-name="a95" text:class-names="" text:cond-style-name=""><text:span text:style-name="a94" text:class-names=""/></text:p>
        </draw:text-box>
        <svg:title/>
        <svg:desc/>
      </draw:frame>
      <draw:frame draw:id="id27" presentation:style-name="a97" draw:name="Google Shape;37;p44" svg:x="5.98703in" svg:y="-0.00123in" svg:width="4.19715in" svg:height="4.5516in" presentation:class="graphic" presentation:placeholder="false">
        <svg:title/>
        <svg:desc/>
      </draw:frame>
      <presentation:notes style:page-layout-name="pageLayout2" draw:style-name="a103">
        <draw:page-thumbnail svg:x="3.66508in" svg:y="0.9276in" svg:width="14.65814in" svg:height="4.63801in" presentation:class="page" draw:id="id1" presentation:style-name="a98" draw:name="Google Shape;3;n">
          <svg:title/>
          <svg:desc/>
        </draw:page-thumbnail>
        <draw:frame draw:id="id2" presentation:style-name="a102" draw:name="Google Shape;4;n" svg:x="2.1986in" svg:y="5.87481in" svg:width="17.58888in" svg:height="5.56562in" presentation:class="notes" presentation:placeholder="false">
          <draw:text-box>
            <text:list text:style-name="a101">
              <text:list-item>
                <text:p text:style-name="a100" text:class-names="" text:cond-style-name=""><text:span text:style-name="a99" text:class-names=""/></text:p>
              </text:list-item>
            </text:list>
          </draw:text-box>
          <svg:title/>
          <svg:desc/>
        </draw:frame>
      </presentation:notes>
    </style:master-page>
    <style:master-page style:name="Master1-Layout7-cust-1_Cover-Slide_green_opt3" style:page-layout-name="pageLayout1" draw:style-name="a104">
      <draw:custom-shape svg:x="0in" svg:y="0.00032in" svg:width="10in" svg:height="5.62468in" draw:id="id28" draw:style-name="a107" draw:name="Google Shape;39;p45">
        <svg:title/>
        <svg:desc/>
        <text:p text:style-name="a106" text:class-names="" text:cond-style-name=""><text:span text:style-name="a105"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29" draw:style-name="a108" draw:name="Google Shape;40;p45" svg:x="5.63032in" svg:y="-0.00123in" svg:width="4.91055in" svg:height="4.94089in" style:rel-width="scale" style:rel-height="scale">
        <draw:image xlink:href="media/image14.png" xlink:type="simple" xlink:show="embed" xlink:actuate="onLoad"/>
        <svg:title/>
        <svg:desc>A picture containing text, sky, outdoor, green

Description automatically generated</svg:desc>
      </draw:frame>
      <draw:frame draw:id="id30" presentation:style-name="a111" draw:name="Google Shape;41;p45" svg:x="0.42559in" svg:y="4.06603in" svg:width="4.32369in" svg:height="0.4656in" presentation:class="subtitle" presentation:placeholder="false">
        <draw:text-box>
          <text:p text:style-name="a110" text:class-names="" text:cond-style-name=""><text:span text:style-name="a109" text:class-names=""/></text:p>
        </draw:text-box>
        <svg:title/>
        <svg:desc/>
      </draw:frame>
      <draw:frame draw:id="id31" presentation:style-name="a114" draw:name="Google Shape;42;p45" svg:x="0.42559in" svg:y="1.67052in" svg:width="3.49989in" svg:height="1.8751in" presentation:class="title" presentation:placeholder="false">
        <draw:text-box>
          <text:p text:style-name="a113" text:class-names="" text:cond-style-name=""><text:span text:style-name="a112" text:class-names=""/></text:p>
        </draw:text-box>
        <svg:title/>
        <svg:desc/>
      </draw:frame>
      <draw:frame draw:id="id32" draw:style-name="a115" draw:name="Google Shape;43;p45" svg:x="0.3339in" svg:y="0.11205in" svg:width="1.79672in" svg:height="1.18252in" style:rel-width="scale" style:rel-height="scale">
        <draw:image xlink:href="media/image11.png" xlink:type="simple" xlink:show="embed" xlink:actuate="onLoad"/>
        <svg:title/>
        <svg:desc>Logo

Description automatically generated</svg:desc>
      </draw:frame>
      <draw:frame draw:id="id33" presentation:style-name="a116" draw:name="Google Shape;44;p45" svg:x="5.98703in" svg:y="-0.00123in" svg:width="4.19715in" svg:height="4.5516in" presentation:class="graphic" presentation:placeholder="false">
        <svg:title/>
        <svg:desc/>
      </draw:frame>
      <presentation:notes style:page-layout-name="pageLayout2" draw:style-name="a122">
        <draw:page-thumbnail svg:x="3.66508in" svg:y="0.9276in" svg:width="14.65814in" svg:height="4.63801in" presentation:class="page" draw:id="id1" presentation:style-name="a117" draw:name="Google Shape;3;n">
          <svg:title/>
          <svg:desc/>
        </draw:page-thumbnail>
        <draw:frame draw:id="id2" presentation:style-name="a121" draw:name="Google Shape;4;n" svg:x="2.1986in" svg:y="5.87481in" svg:width="17.58888in" svg:height="5.56562in" presentation:class="notes" presentation:placeholder="false">
          <draw:text-box>
            <text:list text:style-name="a120">
              <text:list-item>
                <text:p text:style-name="a119" text:class-names="" text:cond-style-name=""><text:span text:style-name="a118" text:class-names=""/></text:p>
              </text:list-item>
            </text:list>
          </draw:text-box>
          <svg:title/>
          <svg:desc/>
        </draw:frame>
      </presentation:notes>
    </style:master-page>
    <style:master-page style:name="Master1-Layout8-cust-Cover-Slide_white_opt4_2" style:page-layout-name="pageLayout1" draw:style-name="a123">
      <draw:frame draw:id="id34" draw:style-name="a124" draw:name="Google Shape;46;p46" svg:x="8.29522in" svg:y="-0.00604in" svg:width="4.65628in" svg:height="5.63722in" style:rel-width="scale" style:rel-height="scale">
        <draw:image xlink:href="media/image15.png" xlink:type="simple" xlink:show="embed" xlink:actuate="onLoad"/>
        <svg:title/>
        <svg:desc>Shape

Description automatically generated</svg:desc>
      </draw:frame>
      <draw:frame draw:id="id35" draw:style-name="a125" draw:name="Google Shape;47;p46" svg:x="6.35694in" svg:y="-0.00604in" svg:width="3.14753in" svg:height="3.21804in" style:rel-width="scale" style:rel-height="scale">
        <draw:image xlink:href="media/image16.png" xlink:type="simple" xlink:show="embed" xlink:actuate="onLoad"/>
        <svg:title/>
        <svg:desc/>
      </draw:frame>
      <draw:frame draw:id="id36" draw:style-name="a126" draw:name="Google Shape;48;p46"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37" presentation:style-name="a129" draw:name="Google Shape;49;p46" svg:x="0.42559in" svg:y="4.06603in" svg:width="4.32369in" svg:height="0.4656in" presentation:class="subtitle" presentation:placeholder="false">
        <draw:text-box>
          <text:p text:style-name="a128" text:class-names="" text:cond-style-name=""><text:span text:style-name="a127" text:class-names=""/></text:p>
        </draw:text-box>
        <svg:title/>
        <svg:desc/>
      </draw:frame>
      <draw:frame draw:id="id38" presentation:style-name="a132" draw:name="Google Shape;50;p46" svg:x="0.42559in" svg:y="1.67052in" svg:width="3.49989in" svg:height="1.8751in" presentation:class="title" presentation:placeholder="false">
        <draw:text-box>
          <text:p text:style-name="a131" text:class-names="" text:cond-style-name=""><text:span text:style-name="a130" text:class-names=""/></text:p>
        </draw:text-box>
        <svg:title/>
        <svg:desc/>
      </draw:frame>
      <draw:frame draw:id="id39" presentation:style-name="a133" draw:name="Google Shape;51;p46" svg:x="6.35694in" svg:y="0.00757in" svg:width="3.14753in" svg:height="3.20443in" presentation:class="graphic" presentation:placeholder="false">
        <svg:title/>
        <svg:desc/>
      </draw:frame>
      <presentation:notes style:page-layout-name="pageLayout2" draw:style-name="a139">
        <draw:page-thumbnail svg:x="3.66508in" svg:y="0.9276in" svg:width="14.65814in" svg:height="4.63801in" presentation:class="page" draw:id="id1" presentation:style-name="a134" draw:name="Google Shape;3;n">
          <svg:title/>
          <svg:desc/>
        </draw:page-thumbnail>
        <draw:frame draw:id="id2" presentation:style-name="a138" draw:name="Google Shape;4;n" svg:x="2.1986in" svg:y="5.87481in" svg:width="17.58888in" svg:height="5.56562in" presentation:class="notes" presentation:placeholder="false">
          <draw:text-box>
            <text:list text:style-name="a137">
              <text:list-item>
                <text:p text:style-name="a136" text:class-names="" text:cond-style-name=""><text:span text:style-name="a135" text:class-names=""/></text:p>
              </text:list-item>
            </text:list>
          </draw:text-box>
          <svg:title/>
          <svg:desc/>
        </draw:frame>
      </presentation:notes>
    </style:master-page>
    <style:master-page style:name="Master1-Layout9-cust-Cover-Slide_green_opt4" style:page-layout-name="pageLayout1" draw:style-name="a140">
      <draw:frame draw:id="id40" draw:style-name="a141" draw:name="Google Shape;53;p47" svg:x="0in" svg:y="0.0002in" svg:width="10.00945in" svg:height="5.62992in" style:rel-width="scale" style:rel-height="scale">
        <draw:image xlink:href="media/image17.png" xlink:type="simple" xlink:show="embed" xlink:actuate="onLoad"/>
        <svg:title/>
        <svg:desc/>
      </draw:frame>
      <draw:frame draw:id="id41" draw:style-name="a142" draw:name="Google Shape;54;p47" svg:x="0.3339in" svg:y="0.11205in" svg:width="1.79672in" svg:height="1.18252in" style:rel-width="scale" style:rel-height="scale">
        <draw:image xlink:href="media/image11.png" xlink:type="simple" xlink:show="embed" xlink:actuate="onLoad"/>
        <svg:title/>
        <svg:desc>Logo

Description automatically generated</svg:desc>
      </draw:frame>
      <draw:frame draw:id="id42" presentation:style-name="a145" draw:name="Google Shape;55;p47" svg:x="0.42559in" svg:y="4.06603in" svg:width="4.32369in" svg:height="0.4656in" presentation:class="subtitle" presentation:placeholder="false">
        <draw:text-box>
          <text:p text:style-name="a144" text:class-names="" text:cond-style-name=""><text:span text:style-name="a143" text:class-names=""/></text:p>
        </draw:text-box>
        <svg:title/>
        <svg:desc/>
      </draw:frame>
      <draw:frame draw:id="id43" presentation:style-name="a148" draw:name="Google Shape;56;p47" svg:x="0.42559in" svg:y="1.67052in" svg:width="3.49989in" svg:height="1.8751in" presentation:class="title" presentation:placeholder="false">
        <draw:text-box>
          <text:p text:style-name="a147" text:class-names="" text:cond-style-name=""><text:span text:style-name="a146" text:class-names=""/></text:p>
        </draw:text-box>
        <svg:title/>
        <svg:desc/>
      </draw:frame>
      <draw:frame draw:id="id44" draw:style-name="a149" draw:name="Google Shape;57;p47" svg:x="6.35694in" svg:y="-0.00604in" svg:width="3.14753in" svg:height="3.21804in" style:rel-width="scale" style:rel-height="scale">
        <draw:image xlink:href="media/image18.png" xlink:type="simple" xlink:show="embed" xlink:actuate="onLoad"/>
        <svg:title/>
        <svg:desc>A picture containing sky, building, outdoor, structure

Description automatically generated</svg:desc>
      </draw:frame>
      <draw:frame draw:id="id45" presentation:style-name="a150" draw:name="Google Shape;58;p47" svg:x="6.35694in" svg:y="0.00757in" svg:width="3.14753in" svg:height="3.20443in" presentation:class="graphic" presentation:placeholder="false">
        <svg:title/>
        <svg:desc/>
      </draw:frame>
      <presentation:notes style:page-layout-name="pageLayout2" draw:style-name="a156">
        <draw:page-thumbnail svg:x="3.66508in" svg:y="0.9276in" svg:width="14.65814in" svg:height="4.63801in" presentation:class="page" draw:id="id1" presentation:style-name="a151" draw:name="Google Shape;3;n">
          <svg:title/>
          <svg:desc/>
        </draw:page-thumbnail>
        <draw:frame draw:id="id2" presentation:style-name="a155" draw:name="Google Shape;4;n" svg:x="2.1986in" svg:y="5.87481in" svg:width="17.58888in" svg:height="5.56562in" presentation:class="notes" presentation:placeholder="false">
          <draw:text-box>
            <text:list text:style-name="a154">
              <text:list-item>
                <text:p text:style-name="a153" text:class-names="" text:cond-style-name=""><text:span text:style-name="a152" text:class-names=""/></text:p>
              </text:list-item>
            </text:list>
          </draw:text-box>
          <svg:title/>
          <svg:desc/>
        </draw:frame>
      </presentation:notes>
    </style:master-page>
    <style:master-page style:name="Master1-Layout10-cust-Cover-Slide_white_opt5_1" style:page-layout-name="pageLayout1" draw:style-name="a157">
      <draw:frame draw:id="id46" draw:style-name="a158" draw:name="Google Shape;60;p48" svg:x="6.08in" svg:y="0in" svg:width="3.92in" svg:height="5.625in" style:rel-width="scale" style:rel-height="scale">
        <draw:image xlink:href="media/image19.jpg" xlink:type="simple" xlink:show="embed" xlink:actuate="onLoad"/>
        <svg:title/>
        <svg:desc>People walking in front of a building

Description automatically generated with low confidence</svg:desc>
      </draw:frame>
      <draw:frame draw:id="id47" draw:style-name="a159" draw:name="Google Shape;61;p48"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custom-shape svg:x="5.90447in" svg:y="0in" svg:width="0.16732in" svg:height="5.62468in" draw:id="id48" draw:style-name="a162" draw:name="Google Shape;62;p48">
        <svg:title/>
        <svg:desc/>
        <text:p text:style-name="a161" text:class-names="" text:cond-style-name=""><text:span text:style-name="a160"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49" presentation:style-name="a165" draw:name="Google Shape;63;p48" svg:x="0.42559in" svg:y="1.67052in" svg:width="3.49989in" svg:height="1.8751in" presentation:class="title" presentation:placeholder="false">
        <draw:text-box>
          <text:p text:style-name="a164" text:class-names="" text:cond-style-name=""><text:span text:style-name="a163" text:class-names=""/></text:p>
        </draw:text-box>
        <svg:title/>
        <svg:desc/>
      </draw:frame>
      <draw:frame draw:id="id50" presentation:style-name="a168" draw:name="Google Shape;64;p48" svg:x="0.42559in" svg:y="4.06603in" svg:width="4.32369in" svg:height="0.4656in" presentation:class="subtitle" presentation:placeholder="false">
        <draw:text-box>
          <text:p text:style-name="a167" text:class-names="" text:cond-style-name=""><text:span text:style-name="a166" text:class-names=""/></text:p>
        </draw:text-box>
        <svg:title/>
        <svg:desc/>
      </draw:frame>
      <draw:frame draw:id="id51" presentation:style-name="a169" draw:name="Google Shape;65;p48" svg:x="6.07453in" svg:y="0in" svg:width="3.92547in" svg:height="5.625in" presentation:class="graphic" presentation:placeholder="false">
        <svg:title/>
        <svg:desc/>
      </draw:frame>
      <presentation:notes style:page-layout-name="pageLayout2" draw:style-name="a175">
        <draw:page-thumbnail svg:x="3.66508in" svg:y="0.9276in" svg:width="14.65814in" svg:height="4.63801in" presentation:class="page" draw:id="id1" presentation:style-name="a170" draw:name="Google Shape;3;n">
          <svg:title/>
          <svg:desc/>
        </draw:page-thumbnail>
        <draw:frame draw:id="id2" presentation:style-name="a174" draw:name="Google Shape;4;n" svg:x="2.1986in" svg:y="5.87481in" svg:width="17.58888in" svg:height="5.56562in" presentation:class="notes" presentation:placeholder="false">
          <draw:text-box>
            <text:list text:style-name="a173">
              <text:list-item>
                <text:p text:style-name="a172" text:class-names="" text:cond-style-name=""><text:span text:style-name="a171" text:class-names=""/></text:p>
              </text:list-item>
            </text:list>
          </draw:text-box>
          <svg:title/>
          <svg:desc/>
        </draw:frame>
      </presentation:notes>
    </style:master-page>
    <style:master-page style:name="Master1-Layout11-cust-Cover-Slide_green_opt5" style:page-layout-name="pageLayout1" draw:style-name="a176">
      <draw:custom-shape svg:x="0in" svg:y="0in" svg:width="5.90721in" svg:height="5.62468in" draw:id="id52" draw:style-name="a179" draw:name="Google Shape;67;p49">
        <svg:title/>
        <svg:desc/>
        <text:p text:style-name="a178" text:class-names="" text:cond-style-name=""><text:span text:style-name="a177"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53" presentation:style-name="a180" draw:name="Google Shape;68;p49" svg:x="6.07453in" svg:y="0in" svg:width="3.92547in" svg:height="5.625in" presentation:class="graphic" presentation:placeholder="false">
        <svg:title/>
        <svg:desc/>
      </draw:frame>
      <draw:custom-shape svg:x="5.90721in" svg:y="0in" svg:width="0.16732in" svg:height="5.62468in" draw:id="id54" draw:style-name="a183" draw:name="Google Shape;69;p49">
        <svg:title/>
        <svg:desc/>
        <text:p text:style-name="a182" text:class-names="" text:cond-style-name=""><text:span text:style-name="a181"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55" draw:style-name="a184" draw:name="Google Shape;70;p49" svg:x="0.3339in" svg:y="0.11205in" svg:width="1.79672in" svg:height="1.18252in" style:rel-width="scale" style:rel-height="scale">
        <draw:image xlink:href="media/image11.png" xlink:type="simple" xlink:show="embed" xlink:actuate="onLoad"/>
        <svg:title/>
        <svg:desc>Logo

Description automatically generated</svg:desc>
      </draw:frame>
      <draw:frame draw:id="id56" presentation:style-name="a187" draw:name="Google Shape;71;p49" svg:x="0.42559in" svg:y="1.67052in" svg:width="3.49989in" svg:height="1.8751in" presentation:class="title" presentation:placeholder="false">
        <draw:text-box>
          <text:p text:style-name="a186" text:class-names="" text:cond-style-name=""><text:span text:style-name="a185" text:class-names=""/></text:p>
        </draw:text-box>
        <svg:title/>
        <svg:desc/>
      </draw:frame>
      <draw:frame draw:id="id57" presentation:style-name="a190" draw:name="Google Shape;72;p49" svg:x="0.42559in" svg:y="4.06603in" svg:width="4.32369in" svg:height="0.4656in" presentation:class="subtitle" presentation:placeholder="false">
        <draw:text-box>
          <text:p text:style-name="a189" text:class-names="" text:cond-style-name=""><text:span text:style-name="a188" text:class-names=""/></text:p>
        </draw:text-box>
        <svg:title/>
        <svg:desc/>
      </draw:frame>
      <presentation:notes style:page-layout-name="pageLayout2" draw:style-name="a196">
        <draw:page-thumbnail svg:x="3.66508in" svg:y="0.9276in" svg:width="14.65814in" svg:height="4.63801in" presentation:class="page" draw:id="id1" presentation:style-name="a191" draw:name="Google Shape;3;n">
          <svg:title/>
          <svg:desc/>
        </draw:page-thumbnail>
        <draw:frame draw:id="id2" presentation:style-name="a195" draw:name="Google Shape;4;n" svg:x="2.1986in" svg:y="5.87481in" svg:width="17.58888in" svg:height="5.56562in" presentation:class="notes" presentation:placeholder="false">
          <draw:text-box>
            <text:list text:style-name="a194">
              <text:list-item>
                <text:p text:style-name="a193" text:class-names="" text:cond-style-name=""><text:span text:style-name="a192" text:class-names=""/></text:p>
              </text:list-item>
            </text:list>
          </draw:text-box>
          <svg:title/>
          <svg:desc/>
        </draw:frame>
      </presentation:notes>
    </style:master-page>
    <style:master-page style:name="Master1-Layout12-cust-Cover-Slide_white_opt6_3" style:page-layout-name="pageLayout1" draw:style-name="a197">
      <draw:custom-shape svg:x="7.42357in" svg:y="0in" svg:width="0.16732in" svg:height="5.62468in" draw:id="id58" draw:style-name="a200" draw:name="Google Shape;74;p50">
        <svg:title/>
        <svg:desc/>
        <text:p text:style-name="a199" text:class-names="" text:cond-style-name=""><text:span text:style-name="a198"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59" presentation:style-name="a203" draw:name="Google Shape;75;p50" svg:x="0.42559in" svg:y="1.67052in" svg:width="3.49989in" svg:height="1.8751in" presentation:class="title" presentation:placeholder="false">
        <draw:text-box>
          <text:p text:style-name="a202" text:class-names="" text:cond-style-name=""><text:span text:style-name="a201" text:class-names=""/></text:p>
        </draw:text-box>
        <svg:title/>
        <svg:desc/>
      </draw:frame>
      <draw:frame draw:id="id60" presentation:style-name="a206" draw:name="Google Shape;76;p50" svg:x="0.42559in" svg:y="4.06603in" svg:width="4.32369in" svg:height="0.4656in" presentation:class="subtitle" presentation:placeholder="false">
        <draw:text-box>
          <text:p text:style-name="a205" text:class-names="" text:cond-style-name=""><text:span text:style-name="a204" text:class-names=""/></text:p>
        </draw:text-box>
        <svg:title/>
        <svg:desc/>
      </draw:frame>
      <draw:frame draw:id="id61" draw:style-name="a207" draw:name="Google Shape;77;p50"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62" presentation:style-name="a208" draw:name="Google Shape;78;p50" svg:x="7.59089in" svg:y="-0.00549in" svg:width="2.40911in" svg:height="5.625in" presentation:class="graphic" presentation:placeholder="false">
        <svg:title/>
        <svg:desc/>
      </draw:frame>
      <presentation:notes style:page-layout-name="pageLayout2" draw:style-name="a214">
        <draw:page-thumbnail svg:x="3.66508in" svg:y="0.9276in" svg:width="14.65814in" svg:height="4.63801in" presentation:class="page" draw:id="id1" presentation:style-name="a209" draw:name="Google Shape;3;n">
          <svg:title/>
          <svg:desc/>
        </draw:page-thumbnail>
        <draw:frame draw:id="id2" presentation:style-name="a213" draw:name="Google Shape;4;n" svg:x="2.1986in" svg:y="5.87481in" svg:width="17.58888in" svg:height="5.56562in" presentation:class="notes" presentation:placeholder="false">
          <draw:text-box>
            <text:list text:style-name="a212">
              <text:list-item>
                <text:p text:style-name="a211" text:class-names="" text:cond-style-name=""><text:span text:style-name="a210" text:class-names=""/></text:p>
              </text:list-item>
            </text:list>
          </draw:text-box>
          <svg:title/>
          <svg:desc/>
        </draw:frame>
      </presentation:notes>
    </style:master-page>
    <style:master-page style:name="Master1-Layout13-cust-Cover-Slide_green_opt6" style:page-layout-name="pageLayout1" draw:style-name="a215">
      <draw:custom-shape svg:x="0in" svg:y="0in" svg:width="7.42357in" svg:height="5.62468in" draw:id="id63" draw:style-name="a218" draw:name="Google Shape;80;p51">
        <svg:title/>
        <svg:desc/>
        <text:p text:style-name="a217" text:class-names="" text:cond-style-name=""><text:span text:style-name="a216"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64" draw:style-name="a219" draw:name="Google Shape;81;p51" svg:x="0.3339in" svg:y="0.11205in" svg:width="1.79672in" svg:height="1.18252in" style:rel-width="scale" style:rel-height="scale">
        <draw:image xlink:href="media/image11.png" xlink:type="simple" xlink:show="embed" xlink:actuate="onLoad"/>
        <svg:title/>
        <svg:desc>Logo

Description automatically generated</svg:desc>
      </draw:frame>
      <draw:frame draw:id="id65" presentation:style-name="a222" draw:name="Google Shape;82;p51" svg:x="0.42559in" svg:y="1.67052in" svg:width="3.49989in" svg:height="1.8751in" presentation:class="title" presentation:placeholder="false">
        <draw:text-box>
          <text:p text:style-name="a221" text:class-names="" text:cond-style-name=""><text:span text:style-name="a220" text:class-names=""/></text:p>
        </draw:text-box>
        <svg:title/>
        <svg:desc/>
      </draw:frame>
      <draw:custom-shape svg:x="7.42357in" svg:y="0in" svg:width="0.16732in" svg:height="5.62468in" draw:id="id66" draw:style-name="a225" draw:name="Google Shape;83;p51">
        <svg:title/>
        <svg:desc/>
        <text:p text:style-name="a224" text:class-names="" text:cond-style-name=""><text:span text:style-name="a223"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67" presentation:style-name="a228" draw:name="Google Shape;84;p51" svg:x="0.42559in" svg:y="4.06603in" svg:width="4.32369in" svg:height="0.4656in" presentation:class="subtitle" presentation:placeholder="false">
        <draw:text-box>
          <text:p text:style-name="a227" text:class-names="" text:cond-style-name=""><text:span text:style-name="a226" text:class-names=""/></text:p>
        </draw:text-box>
        <svg:title/>
        <svg:desc/>
      </draw:frame>
      <draw:frame draw:id="id68" presentation:style-name="a229" draw:name="Google Shape;85;p51" svg:x="7.59089in" svg:y="-0.00549in" svg:width="2.40911in" svg:height="5.625in" presentation:class="graphic" presentation:placeholder="false">
        <svg:title/>
        <svg:desc/>
      </draw:frame>
      <presentation:notes style:page-layout-name="pageLayout2" draw:style-name="a235">
        <draw:page-thumbnail svg:x="3.66508in" svg:y="0.9276in" svg:width="14.65814in" svg:height="4.63801in" presentation:class="page" draw:id="id1" presentation:style-name="a230" draw:name="Google Shape;3;n">
          <svg:title/>
          <svg:desc/>
        </draw:page-thumbnail>
        <draw:frame draw:id="id2" presentation:style-name="a234" draw:name="Google Shape;4;n" svg:x="2.1986in" svg:y="5.87481in" svg:width="17.58888in" svg:height="5.56562in" presentation:class="notes" presentation:placeholder="false">
          <draw:text-box>
            <text:list text:style-name="a233">
              <text:list-item>
                <text:p text:style-name="a232" text:class-names="" text:cond-style-name=""><text:span text:style-name="a231" text:class-names=""/></text:p>
              </text:list-item>
            </text:list>
          </draw:text-box>
          <svg:title/>
          <svg:desc/>
        </draw:frame>
      </presentation:notes>
    </style:master-page>
    <style:master-page style:name="Master1-Layout14-cust-Divider-Slide_white_opt1_2" style:page-layout-name="pageLayout1" draw:style-name="a236">
      <draw:custom-shape svg:x="7.42357in" svg:y="0in" svg:width="0.16732in" svg:height="5.62468in" draw:id="id69" draw:style-name="a239" draw:name="Google Shape;87;p52">
        <svg:title/>
        <svg:desc/>
        <text:p text:style-name="a238" text:class-names="" text:cond-style-name=""><text:span text:style-name="a237"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70" presentation:style-name="a242" draw:name="Google Shape;88;p52" svg:x="0.42559in" svg:y="1.67052in" svg:width="3.65739in" svg:height="1.8751in" presentation:class="title" presentation:placeholder="false">
        <draw:text-box>
          <text:p text:style-name="a241" text:class-names="" text:cond-style-name=""><text:span text:style-name="a240" text:class-names=""/></text:p>
        </draw:text-box>
        <svg:title/>
        <svg:desc/>
      </draw:frame>
      <draw:frame draw:id="id71" presentation:style-name="a245" draw:name="Google Shape;89;p52" svg:x="0.42559in" svg:y="4.06603in" svg:width="4.32369in" svg:height="0.4656in" presentation:class="subtitle" presentation:placeholder="false">
        <draw:text-box>
          <text:p text:style-name="a244" text:class-names="" text:cond-style-name=""><text:span text:style-name="a243" text:class-names=""/></text:p>
        </draw:text-box>
        <svg:title/>
        <svg:desc/>
      </draw:frame>
      <draw:frame draw:id="id72" draw:style-name="a246" draw:name="Google Shape;90;p52"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73" presentation:style-name="a247" draw:name="Google Shape;91;p52" svg:x="7.59089in" svg:y="-0.00549in" svg:width="2.40911in" svg:height="5.625in" presentation:class="graphic" presentation:placeholder="false">
        <svg:title/>
        <svg:desc/>
      </draw:frame>
      <presentation:notes style:page-layout-name="pageLayout2" draw:style-name="a253">
        <draw:page-thumbnail svg:x="3.66508in" svg:y="0.9276in" svg:width="14.65814in" svg:height="4.63801in" presentation:class="page" draw:id="id1" presentation:style-name="a248" draw:name="Google Shape;3;n">
          <svg:title/>
          <svg:desc/>
        </draw:page-thumbnail>
        <draw:frame draw:id="id2" presentation:style-name="a252" draw:name="Google Shape;4;n" svg:x="2.1986in" svg:y="5.87481in" svg:width="17.58888in" svg:height="5.56562in" presentation:class="notes" presentation:placeholder="false">
          <draw:text-box>
            <text:list text:style-name="a251">
              <text:list-item>
                <text:p text:style-name="a250" text:class-names="" text:cond-style-name=""><text:span text:style-name="a249" text:class-names=""/></text:p>
              </text:list-item>
            </text:list>
          </draw:text-box>
          <svg:title/>
          <svg:desc/>
        </draw:frame>
      </presentation:notes>
    </style:master-page>
    <style:master-page style:name="Master1-Layout15-cust-Divider-Slide_green_opt1_3" style:page-layout-name="pageLayout1" draw:style-name="a254">
      <draw:custom-shape svg:x="0in" svg:y="0in" svg:width="7.42357in" svg:height="5.62468in" draw:id="id74" draw:style-name="a257" draw:name="Google Shape;93;p53">
        <svg:title/>
        <svg:desc/>
        <text:p text:style-name="a256" text:class-names="" text:cond-style-name=""><text:span text:style-name="a255"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75" draw:style-name="a258" draw:name="Google Shape;94;p53" svg:x="0.3339in" svg:y="0.11205in" svg:width="1.79672in" svg:height="1.18252in" style:rel-width="scale" style:rel-height="scale">
        <draw:image xlink:href="media/image11.png" xlink:type="simple" xlink:show="embed" xlink:actuate="onLoad"/>
        <svg:title/>
        <svg:desc>Logo

Description automatically generated</svg:desc>
      </draw:frame>
      <draw:custom-shape svg:x="7.42357in" svg:y="0in" svg:width="0.16732in" svg:height="5.62468in" draw:id="id76" draw:style-name="a261" draw:name="Google Shape;95;p53">
        <svg:title/>
        <svg:desc/>
        <text:p text:style-name="a260" text:class-names="" text:cond-style-name=""><text:span text:style-name="a259"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77" presentation:style-name="a264" draw:name="Google Shape;96;p53" svg:x="0.42559in" svg:y="4.06603in" svg:width="4.32369in" svg:height="0.4656in" presentation:class="subtitle" presentation:placeholder="false">
        <draw:text-box>
          <text:p text:style-name="a263" text:class-names="" text:cond-style-name=""><text:span text:style-name="a262" text:class-names=""/></text:p>
        </draw:text-box>
        <svg:title/>
        <svg:desc/>
      </draw:frame>
      <draw:frame draw:id="id78" presentation:style-name="a267" draw:name="Google Shape;97;p53" svg:x="0.42559in" svg:y="1.67052in" svg:width="3.65739in" svg:height="1.8751in" presentation:class="title" presentation:placeholder="false">
        <draw:text-box>
          <text:p text:style-name="a266" text:class-names="" text:cond-style-name=""><text:span text:style-name="a265" text:class-names=""/></text:p>
        </draw:text-box>
        <svg:title/>
        <svg:desc/>
      </draw:frame>
      <draw:frame draw:id="id79" presentation:style-name="a268" draw:name="Google Shape;98;p53" svg:x="7.59089in" svg:y="-0.00549in" svg:width="2.40911in" svg:height="5.625in" presentation:class="graphic" presentation:placeholder="false">
        <svg:title/>
        <svg:desc/>
      </draw:frame>
      <presentation:notes style:page-layout-name="pageLayout2" draw:style-name="a274">
        <draw:page-thumbnail svg:x="3.66508in" svg:y="0.9276in" svg:width="14.65814in" svg:height="4.63801in" presentation:class="page" draw:id="id1" presentation:style-name="a269" draw:name="Google Shape;3;n">
          <svg:title/>
          <svg:desc/>
        </draw:page-thumbnail>
        <draw:frame draw:id="id2" presentation:style-name="a273" draw:name="Google Shape;4;n" svg:x="2.1986in" svg:y="5.87481in" svg:width="17.58888in" svg:height="5.56562in" presentation:class="notes" presentation:placeholder="false">
          <draw:text-box>
            <text:list text:style-name="a272">
              <text:list-item>
                <text:p text:style-name="a271" text:class-names="" text:cond-style-name=""><text:span text:style-name="a270" text:class-names=""/></text:p>
              </text:list-item>
            </text:list>
          </draw:text-box>
          <svg:title/>
          <svg:desc/>
        </draw:frame>
      </presentation:notes>
    </style:master-page>
    <style:master-page style:name="Master1-Layout16-cust-Divider-Slide_white_opt2" style:page-layout-name="pageLayout1" draw:style-name="a275">
      <draw:frame draw:id="id80" draw:style-name="a282" draw:name="Google Shape;100;p54" svg:x="8.69816in" svg:y="4.8599in" svg:width="0.83544in" svg:height="0.52494in">
        <draw:text-box>
          <text:p text:style-name="a278" text:class-names="" text:cond-style-name=""><text:span text:style-name="a276" text:class-names="">University</text:span><text:span text:style-name="a277" text:class-names=""/></text:p>
          <text:p text:style-name="a281" text:class-names="" text:cond-style-name=""><text:span text:style-name="a279" text:class-names="">ofGalway.ie</text:span><text:span text:style-name="a280" text:class-names=""/></text:p>
        </draw:text-box>
        <svg:title/>
        <svg:desc/>
      </draw:frame>
      <draw:frame draw:id="id81" presentation:style-name="a285" draw:name="Google Shape;101;p54" svg:x="0.42559in" svg:y="1.67052in" svg:width="3.65739in" svg:height="1.8751in" presentation:class="title" presentation:placeholder="false">
        <draw:text-box>
          <text:p text:style-name="a284" text:class-names="" text:cond-style-name=""><text:span text:style-name="a283" text:class-names=""/></text:p>
        </draw:text-box>
        <svg:title/>
        <svg:desc/>
      </draw:frame>
      <draw:frame draw:id="id82" draw:style-name="a286" draw:name="Google Shape;102;p54" svg:x="4.57019in" svg:y="0.0002in" svg:width="5.42981in" svg:height="5.62461in" style:rel-width="scale" style:rel-height="scale">
        <draw:image xlink:href="media/image20.png" xlink:type="simple" xlink:show="embed" xlink:actuate="onLoad"/>
        <svg:title/>
        <svg:desc>Icon

Description automatically generated</svg:desc>
      </draw:frame>
      <draw:frame draw:id="id83" draw:style-name="a287" draw:name="Google Shape;103;p54"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84" presentation:style-name="a290" draw:name="Google Shape;104;p54" svg:x="0.42559in" svg:y="4.06603in" svg:width="4.32369in" svg:height="0.4656in" presentation:class="subtitle" presentation:placeholder="false">
        <draw:text-box>
          <text:p text:style-name="a289" text:class-names="" text:cond-style-name=""><text:span text:style-name="a288" text:class-names=""/></text:p>
        </draw:text-box>
        <svg:title/>
        <svg:desc/>
      </draw:frame>
      <presentation:notes style:page-layout-name="pageLayout2" draw:style-name="a296">
        <draw:page-thumbnail svg:x="3.66508in" svg:y="0.9276in" svg:width="14.65814in" svg:height="4.63801in" presentation:class="page" draw:id="id1" presentation:style-name="a291" draw:name="Google Shape;3;n">
          <svg:title/>
          <svg:desc/>
        </draw:page-thumbnail>
        <draw:frame draw:id="id2" presentation:style-name="a295" draw:name="Google Shape;4;n" svg:x="2.1986in" svg:y="5.87481in" svg:width="17.58888in" svg:height="5.56562in" presentation:class="notes" presentation:placeholder="false">
          <draw:text-box>
            <text:list text:style-name="a294">
              <text:list-item>
                <text:p text:style-name="a293" text:class-names="" text:cond-style-name=""><text:span text:style-name="a292" text:class-names=""/></text:p>
              </text:list-item>
            </text:list>
          </draw:text-box>
          <svg:title/>
          <svg:desc/>
        </draw:frame>
      </presentation:notes>
    </style:master-page>
    <style:master-page style:name="Master1-Layout17-cust-Divider-Slide_green_opt2" style:page-layout-name="pageLayout1" draw:style-name="a297">
      <draw:custom-shape svg:x="0in" svg:y="0in" svg:width="10in" svg:height="5.62468in" draw:id="id85" draw:style-name="a300" draw:name="Google Shape;106;p55">
        <svg:title/>
        <svg:desc/>
        <text:p text:style-name="a299" text:class-names="" text:cond-style-name=""><text:span text:style-name="a298"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86" draw:style-name="a301" draw:name="Google Shape;107;p55" svg:x="0.3339in" svg:y="0.11205in" svg:width="1.79672in" svg:height="1.18252in" style:rel-width="scale" style:rel-height="scale">
        <draw:image xlink:href="media/image11.png" xlink:type="simple" xlink:show="embed" xlink:actuate="onLoad"/>
        <svg:title/>
        <svg:desc>Logo

Description automatically generated</svg:desc>
      </draw:frame>
      <draw:frame draw:id="id87" presentation:style-name="a304" draw:name="Google Shape;108;p55" svg:x="0.42559in" svg:y="1.67052in" svg:width="3.65739in" svg:height="1.8751in" presentation:class="title" presentation:placeholder="false">
        <draw:text-box>
          <text:p text:style-name="a303" text:class-names="" text:cond-style-name=""><text:span text:style-name="a302" text:class-names=""/></text:p>
        </draw:text-box>
        <svg:title/>
        <svg:desc/>
      </draw:frame>
      <draw:frame draw:id="id88" draw:style-name="a305" draw:name="Google Shape;109;p55" svg:x="4.50856in" svg:y="0.00845in" svg:width="5.49144in" svg:height="5.62461in" style:rel-width="scale" style:rel-height="scale">
        <draw:image xlink:href="media/image21.png" xlink:type="simple" xlink:show="embed" xlink:actuate="onLoad"/>
        <svg:title/>
        <svg:desc>Icon

Description automatically generated</svg:desc>
      </draw:frame>
      <draw:frame draw:id="id89" presentation:style-name="a308" draw:name="Google Shape;110;p55" svg:x="0.42559in" svg:y="4.06603in" svg:width="4.32369in" svg:height="0.4656in" presentation:class="subtitle" presentation:placeholder="false">
        <draw:text-box>
          <text:p text:style-name="a307" text:class-names="" text:cond-style-name=""><text:span text:style-name="a306" text:class-names=""/></text:p>
        </draw:text-box>
        <svg:title/>
        <svg:desc/>
      </draw:frame>
      <presentation:notes style:page-layout-name="pageLayout2" draw:style-name="a314">
        <draw:page-thumbnail svg:x="3.66508in" svg:y="0.9276in" svg:width="14.65814in" svg:height="4.63801in" presentation:class="page" draw:id="id1" presentation:style-name="a309" draw:name="Google Shape;3;n">
          <svg:title/>
          <svg:desc/>
        </draw:page-thumbnail>
        <draw:frame draw:id="id2" presentation:style-name="a313" draw:name="Google Shape;4;n" svg:x="2.1986in" svg:y="5.87481in" svg:width="17.58888in" svg:height="5.56562in" presentation:class="notes" presentation:placeholder="false">
          <draw:text-box>
            <text:list text:style-name="a312">
              <text:list-item>
                <text:p text:style-name="a311" text:class-names="" text:cond-style-name=""><text:span text:style-name="a310" text:class-names=""/></text:p>
              </text:list-item>
            </text:list>
          </draw:text-box>
          <svg:title/>
          <svg:desc/>
        </draw:frame>
      </presentation:notes>
    </style:master-page>
    <style:master-page style:name="Master1-Layout18-cust-Divider-Slide_white_opt3_2" style:page-layout-name="pageLayout1" draw:style-name="a315">
      <draw:frame draw:id="id90" draw:style-name="a316" draw:name="Google Shape;112;p56" svg:x="0in" svg:y="0.00039in" svg:width="10in" svg:height="5.62461in" style:rel-width="scale" style:rel-height="scale">
        <draw:image xlink:href="media/image22.png" xlink:type="simple" xlink:show="embed" xlink:actuate="onLoad"/>
        <svg:title/>
        <svg:desc>Icon

Description automatically generated</svg:desc>
      </draw:frame>
      <draw:frame draw:id="id91" presentation:style-name="a317" draw:name="Google Shape;113;p56" svg:x="6.95365in" svg:y="0in" svg:width="2.49813in" svg:height="2.1103in" presentation:class="graphic" presentation:placeholder="false">
        <svg:title/>
        <svg:desc/>
      </draw:frame>
      <draw:custom-shape svg:x="8.72695in" svg:y="0in" svg:width="0.21491in" svg:height="1.8451in" draw:id="id92" draw:style-name="a320" draw:name="Google Shape;114;p56">
        <svg:title/>
        <svg:desc/>
        <text:p text:style-name="a319" text:class-names="" text:cond-style-name=""><text:span text:style-name="a318" text:class-names=""/></text:p>
        <draw:enhanced-geometry xmlns:dr3d="urn:oasis:names:tc:opendocument:xmlns:dr3d:1.0" draw:type="non-primitive" svg:viewBox="0 0 432048 3709667" draw:enhanced-path="M 0 0 L 432048 0 C 429634 1163433 427221 2326865 424807 3490298 L 0 37096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048"/>
          <draw:equation draw:name="f7" draw:formula="?f4 / 3709667"/>
          <draw:equation draw:name="f8" draw:formula="?f0 / ?f6"/>
          <draw:equation draw:name="f9" draw:formula="?f1 / ?f6"/>
          <draw:equation draw:name="f10" draw:formula="?f2 / ?f7"/>
          <draw:equation draw:name="f11" draw:formula="?f3 / ?f7"/>
        </draw:enhanced-geometry>
      </draw:custom-shape>
      <draw:frame draw:id="id93" presentation:style-name="a323" draw:name="Google Shape;115;p56" svg:x="0.42559in" svg:y="1.67052in" svg:width="3.65739in" svg:height="1.8751in" presentation:class="title" presentation:placeholder="false">
        <draw:text-box>
          <text:p text:style-name="a322" text:class-names="" text:cond-style-name=""><text:span text:style-name="a321" text:class-names=""/></text:p>
        </draw:text-box>
        <svg:title/>
        <svg:desc/>
      </draw:frame>
      <draw:frame draw:id="id94" draw:style-name="a324" draw:name="Google Shape;116;p56"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95" presentation:style-name="a327" draw:name="Google Shape;117;p56" svg:x="0.42559in" svg:y="4.06603in" svg:width="4.32369in" svg:height="0.4656in" presentation:class="subtitle" presentation:placeholder="false">
        <draw:text-box>
          <text:p text:style-name="a326" text:class-names="" text:cond-style-name=""><text:span text:style-name="a325" text:class-names=""/></text:p>
        </draw:text-box>
        <svg:title/>
        <svg:desc/>
      </draw:frame>
      <presentation:notes style:page-layout-name="pageLayout2" draw:style-name="a333">
        <draw:page-thumbnail svg:x="3.66508in" svg:y="0.9276in" svg:width="14.65814in" svg:height="4.63801in" presentation:class="page" draw:id="id1" presentation:style-name="a328" draw:name="Google Shape;3;n">
          <svg:title/>
          <svg:desc/>
        </draw:page-thumbnail>
        <draw:frame draw:id="id2" presentation:style-name="a332" draw:name="Google Shape;4;n" svg:x="2.1986in" svg:y="5.87481in" svg:width="17.58888in" svg:height="5.56562in" presentation:class="notes" presentation:placeholder="false">
          <draw:text-box>
            <text:list text:style-name="a331">
              <text:list-item>
                <text:p text:style-name="a330" text:class-names="" text:cond-style-name=""><text:span text:style-name="a329" text:class-names=""/></text:p>
              </text:list-item>
            </text:list>
          </draw:text-box>
          <svg:title/>
          <svg:desc/>
        </draw:frame>
      </presentation:notes>
    </style:master-page>
    <style:master-page style:name="Master1-Layout19-cust-Divider-Slide_green_opt3_1" style:page-layout-name="pageLayout1" draw:style-name="a334">
      <draw:frame draw:id="id96" draw:style-name="a335" draw:name="Google Shape;119;p57" svg:x="0in" svg:y="0.00039in" svg:width="10in" svg:height="5.62461in" style:rel-width="scale" style:rel-height="scale">
        <draw:image xlink:href="media/image23.jpg" xlink:type="simple" xlink:show="embed" xlink:actuate="onLoad"/>
        <svg:title/>
        <svg:desc>Icon

Description automatically generated</svg:desc>
      </draw:frame>
      <draw:frame draw:id="id97" draw:style-name="a336" draw:name="Google Shape;120;p57" svg:x="0.3339in" svg:y="0.11205in" svg:width="1.79672in" svg:height="1.18252in" style:rel-width="scale" style:rel-height="scale">
        <draw:image xlink:href="media/image11.png" xlink:type="simple" xlink:show="embed" xlink:actuate="onLoad"/>
        <svg:title/>
        <svg:desc>Logo

Description automatically generated</svg:desc>
      </draw:frame>
      <draw:frame draw:id="id98" presentation:style-name="a339" draw:name="Google Shape;121;p57" svg:x="0.42559in" svg:y="1.67052in" svg:width="3.65739in" svg:height="1.8751in" presentation:class="title" presentation:placeholder="false">
        <draw:text-box>
          <text:p text:style-name="a338" text:class-names="" text:cond-style-name=""><text:span text:style-name="a337" text:class-names=""/></text:p>
        </draw:text-box>
        <svg:title/>
        <svg:desc/>
      </draw:frame>
      <draw:frame draw:id="id99" presentation:style-name="a342" draw:name="Google Shape;122;p57" svg:x="0.42559in" svg:y="4.06603in" svg:width="4.32369in" svg:height="0.4656in" presentation:class="subtitle" presentation:placeholder="false">
        <draw:text-box>
          <text:p text:style-name="a341" text:class-names="" text:cond-style-name=""><text:span text:style-name="a340" text:class-names=""/></text:p>
        </draw:text-box>
        <svg:title/>
        <svg:desc/>
      </draw:frame>
      <draw:frame draw:id="id100" presentation:style-name="a343" draw:name="Google Shape;123;p57" svg:x="6.95056in" svg:y="0in" svg:width="2.49813in" svg:height="2.1103in" presentation:class="graphic" presentation:placeholder="false">
        <svg:title/>
        <svg:desc/>
      </draw:frame>
      <draw:custom-shape svg:x="8.71853in" svg:y="0in" svg:width="0.21491in" svg:height="1.8451in" draw:id="id101" draw:style-name="a346" draw:name="Google Shape;124;p57">
        <svg:title/>
        <svg:desc/>
        <text:p text:style-name="a345" text:class-names="" text:cond-style-name=""><text:span text:style-name="a344" text:class-names=""/></text:p>
        <draw:enhanced-geometry xmlns:dr3d="urn:oasis:names:tc:opendocument:xmlns:dr3d:1.0" draw:type="non-primitive" svg:viewBox="0 0 432048 3709667" draw:enhanced-path="M 0 0 L 432048 0 C 429634 1163433 427221 2326865 424807 3490298 L 0 37096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048"/>
          <draw:equation draw:name="f7" draw:formula="?f4 / 3709667"/>
          <draw:equation draw:name="f8" draw:formula="?f0 / ?f6"/>
          <draw:equation draw:name="f9" draw:formula="?f1 / ?f6"/>
          <draw:equation draw:name="f10" draw:formula="?f2 / ?f7"/>
          <draw:equation draw:name="f11" draw:formula="?f3 / ?f7"/>
        </draw:enhanced-geometry>
      </draw:custom-shape>
      <presentation:notes style:page-layout-name="pageLayout2" draw:style-name="a352">
        <draw:page-thumbnail svg:x="3.66508in" svg:y="0.9276in" svg:width="14.65814in" svg:height="4.63801in" presentation:class="page" draw:id="id1" presentation:style-name="a347" draw:name="Google Shape;3;n">
          <svg:title/>
          <svg:desc/>
        </draw:page-thumbnail>
        <draw:frame draw:id="id2" presentation:style-name="a351" draw:name="Google Shape;4;n" svg:x="2.1986in" svg:y="5.87481in" svg:width="17.58888in" svg:height="5.56562in" presentation:class="notes" presentation:placeholder="false">
          <draw:text-box>
            <text:list text:style-name="a350">
              <text:list-item>
                <text:p text:style-name="a349" text:class-names="" text:cond-style-name=""><text:span text:style-name="a348" text:class-names=""/></text:p>
              </text:list-item>
            </text:list>
          </draw:text-box>
          <svg:title/>
          <svg:desc/>
        </draw:frame>
      </presentation:notes>
    </style:master-page>
    <style:master-page style:name="Master1-Layout20-cust-Divider-Slide_green_opt3" style:page-layout-name="pageLayout1" draw:style-name="a353">
      <draw:custom-shape svg:x="0in" svg:y="0.00032in" svg:width="7.42357in" svg:height="5.62468in" draw:id="id102" draw:style-name="a356" draw:name="Google Shape;126;p58">
        <svg:title/>
        <svg:desc/>
        <text:p text:style-name="a355" text:class-names="" text:cond-style-name=""><text:span text:style-name="a354"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draw:frame draw:id="id103" draw:style-name="a357" draw:name="Google Shape;127;p58" svg:x="0.34169in" svg:y="1.40631in" svg:width="3.29724in" svg:height="4.06322in" style:rel-width="scale" style:rel-height="scale">
        <draw:image xlink:href="media/image24.png" xlink:type="simple" xlink:show="embed" xlink:actuate="onLoad"/>
        <svg:title/>
        <svg:desc>Shape

Description automatically generated</svg:desc>
      </draw:frame>
      <draw:frame draw:id="id104" presentation:style-name="a360" draw:name="Google Shape;128;p58" svg:x="1.41824in" svg:y="1.37086in" svg:width="3.80265in" svg:height="2.32122in" presentation:class="title" presentation:placeholder="false">
        <draw:text-box>
          <text:p text:style-name="a359" text:class-names="" text:cond-style-name=""><text:span text:style-name="a358" text:class-names=""/></text:p>
        </draw:text-box>
        <svg:title/>
        <svg:desc/>
      </draw:frame>
      <draw:frame draw:id="id105" draw:style-name="a361" draw:name="Google Shape;129;p58" svg:x="0.3339in" svg:y="0.11205in" svg:width="1.79672in" svg:height="1.18252in" style:rel-width="scale" style:rel-height="scale">
        <draw:image xlink:href="media/image11.png" xlink:type="simple" xlink:show="embed" xlink:actuate="onLoad"/>
        <svg:title/>
        <svg:desc>Logo

Description automatically generated</svg:desc>
      </draw:frame>
      <draw:custom-shape svg:x="7.42357in" svg:y="0in" svg:width="0.16732in" svg:height="5.62468in" draw:id="id106" draw:style-name="a364" draw:name="Google Shape;130;p58">
        <svg:title/>
        <svg:desc/>
        <text:p text:style-name="a363" text:class-names="" text:cond-style-name=""><text:span text:style-name="a362"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presentation:notes style:page-layout-name="pageLayout2" draw:style-name="a370">
        <draw:page-thumbnail svg:x="3.66508in" svg:y="0.9276in" svg:width="14.65814in" svg:height="4.63801in" presentation:class="page" draw:id="id1" presentation:style-name="a365" draw:name="Google Shape;3;n">
          <svg:title/>
          <svg:desc/>
        </draw:page-thumbnail>
        <draw:frame draw:id="id2" presentation:style-name="a369" draw:name="Google Shape;4;n" svg:x="2.1986in" svg:y="5.87481in" svg:width="17.58888in" svg:height="5.56562in" presentation:class="notes" presentation:placeholder="false">
          <draw:text-box>
            <text:list text:style-name="a368">
              <text:list-item>
                <text:p text:style-name="a367" text:class-names="" text:cond-style-name=""><text:span text:style-name="a366" text:class-names=""/></text:p>
              </text:list-item>
            </text:list>
          </draw:text-box>
          <svg:title/>
          <svg:desc/>
        </draw:frame>
      </presentation:notes>
    </style:master-page>
    <style:master-page style:name="Master1-Layout21-cust-1_Custom-Layout" style:page-layout-name="pageLayout1" draw:style-name="a371">
      <draw:custom-shape svg:x="0in" svg:y="0in" svg:width="0.1355in" svg:height="5.62468in" draw:id="id107" draw:style-name="a374" draw:name="Google Shape;132;p59">
        <svg:title/>
        <svg:desc/>
        <text:p text:style-name="a373" text:class-names="" text:cond-style-name=""><text:span text:style-name="a372"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08" presentation:style-name="a377" draw:name="Google Shape;133;p59" svg:x="0.42664in" svg:y="0.51451in" svg:width="6.80962in" svg:height="0.50517in" presentation:class="title" presentation:placeholder="false">
        <draw:text-box>
          <text:p text:style-name="a376" text:class-names="" text:cond-style-name=""><text:span text:style-name="a375" text:class-names=""/></text:p>
        </draw:text-box>
        <svg:title/>
        <svg:desc/>
      </draw:frame>
      <draw:frame draw:id="id109" draw:style-name="a378" draw:name="Google Shape;134;p59" svg:x="7.43559in" svg:y="0.11072in" svg:width="1.79672in" svg:height="1.18252in" style:rel-width="scale" style:rel-height="scale">
        <draw:image xlink:href="media/image5.png" xlink:type="simple" xlink:show="embed" xlink:actuate="onLoad"/>
        <svg:title/>
        <svg:desc>Logo

Description automatically generated with medium confidence</svg:desc>
      </draw:frame>
      <presentation:notes style:page-layout-name="pageLayout2" draw:style-name="a384">
        <draw:page-thumbnail svg:x="3.66508in" svg:y="0.9276in" svg:width="14.65814in" svg:height="4.63801in" presentation:class="page" draw:id="id1" presentation:style-name="a379" draw:name="Google Shape;3;n">
          <svg:title/>
          <svg:desc/>
        </draw:page-thumbnail>
        <draw:frame draw:id="id2" presentation:style-name="a383" draw:name="Google Shape;4;n" svg:x="2.1986in" svg:y="5.87481in" svg:width="17.58888in" svg:height="5.56562in" presentation:class="notes" presentation:placeholder="false">
          <draw:text-box>
            <text:list text:style-name="a382">
              <text:list-item>
                <text:p text:style-name="a381" text:class-names="" text:cond-style-name=""><text:span text:style-name="a380" text:class-names=""/></text:p>
              </text:list-item>
            </text:list>
          </draw:text-box>
          <svg:title/>
          <svg:desc/>
        </draw:frame>
      </presentation:notes>
    </style:master-page>
    <style:master-page style:name="Master1-Layout22-cust-2_Custom-Layout" style:page-layout-name="pageLayout1" draw:style-name="a385">
      <draw:custom-shape svg:x="0in" svg:y="0.00032in" svg:width="0.1355in" svg:height="5.62468in" draw:id="id110" draw:style-name="a388" draw:name="Google Shape;136;p60">
        <svg:title/>
        <svg:desc/>
        <text:p text:style-name="a387" text:class-names="" text:cond-style-name=""><text:span text:style-name="a386"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11" presentation:style-name="a391" draw:name="Google Shape;137;p60" svg:x="0.42664in" svg:y="0.51451in" svg:width="6.80962in" svg:height="0.50517in" presentation:class="title" presentation:placeholder="false">
        <draw:text-box>
          <text:p text:style-name="a390" text:class-names="" text:cond-style-name=""><text:span text:style-name="a389" text:class-names=""/></text:p>
        </draw:text-box>
        <svg:title/>
        <svg:desc/>
      </draw:frame>
      <draw:frame draw:id="id112" draw:style-name="a392" draw:name="Google Shape;138;p60" svg:x="7.43559in" svg:y="0.11072in" svg:width="1.79672in" svg:height="1.18252in" style:rel-width="scale" style:rel-height="scale">
        <draw:image xlink:href="media/image5.png" xlink:type="simple" xlink:show="embed" xlink:actuate="onLoad"/>
        <svg:title/>
        <svg:desc>Logo

Description automatically generated with medium confidence</svg:desc>
      </draw:frame>
      <draw:frame draw:id="id113" presentation:style-name="a393" draw:name="Google Shape;139;p60" svg:x="6.07453in" svg:y="1.55897in" svg:width="3.92547in" svg:height="4.06746in" presentation:class="graphic" presentation:placeholder="false">
        <svg:title/>
        <svg:desc/>
      </draw:frame>
      <draw:custom-shape svg:x="5.93903in" svg:y="1.55897in" svg:width="0.1355in" svg:height="4.06571in" draw:id="id114" draw:style-name="a396" draw:name="Google Shape;140;p60">
        <svg:title/>
        <svg:desc/>
        <text:p text:style-name="a395" text:class-names="" text:cond-style-name=""><text:span text:style-name="a394" text:class-names=""/></text:p>
        <draw:enhanced-geometry xmlns:dr3d="urn:oasis:names:tc:opendocument:xmlns:dr3d:1.0" draw:type="non-primitive" svg:viewBox="0 0 20104100 11308715" draw:enhanced-path="M 20104099 0 L 0 0 0 11308556 20104099 11308556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11308715"/>
          <draw:equation draw:name="f8" draw:formula="?f0 / ?f6"/>
          <draw:equation draw:name="f9" draw:formula="?f1 / ?f6"/>
          <draw:equation draw:name="f10" draw:formula="?f2 / ?f7"/>
          <draw:equation draw:name="f11" draw:formula="?f3 / ?f7"/>
        </draw:enhanced-geometry>
      </draw:custom-shape>
      <presentation:notes style:page-layout-name="pageLayout2" draw:style-name="a402">
        <draw:page-thumbnail svg:x="3.66508in" svg:y="0.9276in" svg:width="14.65814in" svg:height="4.63801in" presentation:class="page" draw:id="id1" presentation:style-name="a397" draw:name="Google Shape;3;n">
          <svg:title/>
          <svg:desc/>
        </draw:page-thumbnail>
        <draw:frame draw:id="id2" presentation:style-name="a401" draw:name="Google Shape;4;n" svg:x="2.1986in" svg:y="5.87481in" svg:width="17.58888in" svg:height="5.56562in" presentation:class="notes" presentation:placeholder="false">
          <draw:text-box>
            <text:list text:style-name="a400">
              <text:list-item>
                <text:p text:style-name="a399" text:class-names="" text:cond-style-name=""><text:span text:style-name="a398" text:class-names=""/></text:p>
              </text:list-item>
            </text:list>
          </draw:text-box>
          <svg:title/>
          <svg:desc/>
        </draw:frame>
      </presentation:notes>
    </style:master-page>
    <style:master-page style:name="Master1-Layout23-cust-Text-Only-Slide_opt1" style:page-layout-name="pageLayout1" draw:style-name="a403">
      <draw:custom-shape svg:x="9.86458in" svg:y="0in" svg:width="0.1355in" svg:height="5.62468in" draw:id="id115" draw:style-name="a406" draw:name="Google Shape;142;p61">
        <svg:title/>
        <svg:desc/>
        <text:p text:style-name="a405" text:class-names="" text:cond-style-name=""><text:span text:style-name="a404"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16" presentation:style-name="a409" draw:name="Google Shape;143;p61" svg:x="0.42664in" svg:y="0.51451in" svg:width="7.56767in" svg:height="0.50517in" presentation:class="title" presentation:placeholder="false">
        <draw:text-box>
          <text:p text:style-name="a408" text:class-names="" text:cond-style-name=""><text:span text:style-name="a407" text:class-names=""/></text:p>
        </draw:text-box>
        <svg:title/>
        <svg:desc/>
      </draw:frame>
      <draw:frame draw:id="id117" draw:style-name="a410" draw:name="Google Shape;144;p61" svg:x="0.3611in" svg:y="4.34262in" svg:width="1.79672in" svg:height="1.18252in" style:rel-width="scale" style:rel-height="scale">
        <draw:image xlink:href="media/image5.png" xlink:type="simple" xlink:show="embed" xlink:actuate="onLoad"/>
        <svg:title/>
        <svg:desc>Logo

Description automatically generated with medium confidence</svg:desc>
      </draw:frame>
      <draw:frame draw:id="id118" presentation:style-name="a414" draw:name="Google Shape;145;p61" svg:x="0.46429in" svg:y="1.29869in" svg:width="9.00612in" svg:height="2.78439in" presentation:class="outline" presentation:placeholder="false">
        <draw:text-box>
          <text:list text:style-name="a413">
            <text:list-item>
              <text:p text:style-name="a412" text:class-names="" text:cond-style-name=""><text:span text:style-name="a411" text:class-names=""/></text:p>
            </text:list-item>
          </text:list>
        </draw:text-box>
        <svg:title/>
        <svg:desc/>
      </draw:frame>
      <presentation:notes style:page-layout-name="pageLayout2" draw:style-name="a420">
        <draw:page-thumbnail svg:x="3.66508in" svg:y="0.9276in" svg:width="14.65814in" svg:height="4.63801in" presentation:class="page" draw:id="id1" presentation:style-name="a415" draw:name="Google Shape;3;n">
          <svg:title/>
          <svg:desc/>
        </draw:page-thumbnail>
        <draw:frame draw:id="id2" presentation:style-name="a419" draw:name="Google Shape;4;n" svg:x="2.1986in" svg:y="5.87481in" svg:width="17.58888in" svg:height="5.56562in" presentation:class="notes" presentation:placeholder="false">
          <draw:text-box>
            <text:list text:style-name="a418">
              <text:list-item>
                <text:p text:style-name="a417" text:class-names="" text:cond-style-name=""><text:span text:style-name="a416" text:class-names=""/></text:p>
              </text:list-item>
            </text:list>
          </draw:text-box>
          <svg:title/>
          <svg:desc/>
        </draw:frame>
      </presentation:notes>
    </style:master-page>
    <style:master-page style:name="Master1-Layout24-cust-Text-Only-Slide_opt2" style:page-layout-name="pageLayout1" draw:style-name="a421">
      <draw:custom-shape svg:x="9.86458in" svg:y="0in" svg:width="0.1355in" svg:height="5.62468in" draw:id="id119" draw:style-name="a424" draw:name="Google Shape;147;p62">
        <svg:title/>
        <svg:desc/>
        <text:p text:style-name="a423" text:class-names="" text:cond-style-name=""><text:span text:style-name="a422"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20" presentation:style-name="a428" draw:name="Google Shape;148;p62" svg:x="0.46429in" svg:y="2.34194in" svg:width="9.00612in" svg:height="2.78439in" presentation:class="outline" presentation:placeholder="false">
        <draw:text-box>
          <text:list text:style-name="a427">
            <text:list-item>
              <text:p text:style-name="a426" text:class-names="" text:cond-style-name=""><text:span text:style-name="a425" text:class-names=""/></text:p>
            </text:list-item>
          </text:list>
        </draw:text-box>
        <svg:title/>
        <svg:desc/>
      </draw:frame>
      <draw:frame draw:id="id121" presentation:style-name="a431" draw:name="Google Shape;149;p62" svg:x="0.42664in" svg:y="1.42081in" svg:width="7.56767in" svg:height="0.50517in" presentation:class="title" presentation:placeholder="false">
        <draw:text-box>
          <text:p text:style-name="a430" text:class-names="" text:cond-style-name=""><text:span text:style-name="a429" text:class-names=""/></text:p>
        </draw:text-box>
        <svg:title/>
        <svg:desc/>
      </draw:frame>
      <draw:frame draw:id="id122" draw:style-name="a432" draw:name="Google Shape;150;p62"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presentation:notes style:page-layout-name="pageLayout2" draw:style-name="a438">
        <draw:page-thumbnail svg:x="3.66508in" svg:y="0.9276in" svg:width="14.65814in" svg:height="4.63801in" presentation:class="page" draw:id="id1" presentation:style-name="a433" draw:name="Google Shape;3;n">
          <svg:title/>
          <svg:desc/>
        </draw:page-thumbnail>
        <draw:frame draw:id="id2" presentation:style-name="a437" draw:name="Google Shape;4;n" svg:x="2.1986in" svg:y="5.87481in" svg:width="17.58888in" svg:height="5.56562in" presentation:class="notes" presentation:placeholder="false">
          <draw:text-box>
            <text:list text:style-name="a436">
              <text:list-item>
                <text:p text:style-name="a435" text:class-names="" text:cond-style-name=""><text:span text:style-name="a434" text:class-names=""/></text:p>
              </text:list-item>
            </text:list>
          </draw:text-box>
          <svg:title/>
          <svg:desc/>
        </draw:frame>
      </presentation:notes>
    </style:master-page>
    <style:master-page style:name="Master1-Layout25-cust-Text-Only-Slide_opt3" style:page-layout-name="pageLayout1" draw:style-name="a439">
      <draw:custom-shape svg:x="0in" svg:y="5.4892in" svg:width="10in" svg:height="0.13549in" draw:id="id123" draw:style-name="a442" draw:name="Google Shape;152;p63">
        <svg:title/>
        <svg:desc/>
        <text:p text:style-name="a441" text:class-names="" text:cond-style-name=""><text:span text:style-name="a440" text:class-names=""/></text:p>
        <draw:enhanced-geometry xmlns:dr3d="urn:oasis:names:tc:opendocument:xmlns:dr3d:1.0" draw:type="non-primitive" svg:viewBox="0 0 20104100 272415" draw:enhanced-path="M 20104099 0 L 0 0 0 272243 20104099 272243 201040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04100"/>
          <draw:equation draw:name="f7" draw:formula="?f4 / 272415"/>
          <draw:equation draw:name="f8" draw:formula="?f0 / ?f6"/>
          <draw:equation draw:name="f9" draw:formula="?f1 / ?f6"/>
          <draw:equation draw:name="f10" draw:formula="?f2 / ?f7"/>
          <draw:equation draw:name="f11" draw:formula="?f3 / ?f7"/>
        </draw:enhanced-geometry>
      </draw:custom-shape>
      <draw:frame draw:id="id124" presentation:style-name="a446" draw:name="Google Shape;153;p63" svg:x="0.4664in" svg:y="1.39398in" svg:width="9.00612in" svg:height="2.93453in" presentation:class="outline" presentation:placeholder="false">
        <draw:text-box>
          <text:list text:style-name="a445">
            <text:list-item>
              <text:p text:style-name="a444" text:class-names="" text:cond-style-name=""><text:span text:style-name="a443" text:class-names=""/></text:p>
            </text:list-item>
          </text:list>
        </draw:text-box>
        <svg:title/>
        <svg:desc/>
      </draw:frame>
      <draw:frame draw:id="id125" presentation:style-name="a449" draw:name="Google Shape;154;p63" svg:x="0.42664in" svg:y="0.51451in" svg:width="7.56767in" svg:height="0.50517in" presentation:class="title" presentation:placeholder="false">
        <draw:text-box>
          <text:p text:style-name="a448" text:class-names="" text:cond-style-name=""><text:span text:style-name="a447" text:class-names=""/></text:p>
        </draw:text-box>
        <svg:title/>
        <svg:desc/>
      </draw:frame>
      <draw:frame draw:id="id126" draw:style-name="a450" draw:name="Google Shape;155;p63" svg:x="0.3611in" svg:y="4.34262in" svg:width="1.79672in" svg:height="1.18252in" style:rel-width="scale" style:rel-height="scale">
        <draw:image xlink:href="media/image5.png" xlink:type="simple" xlink:show="embed" xlink:actuate="onLoad"/>
        <svg:title/>
        <svg:desc>Logo

Description automatically generated with medium confidence</svg:desc>
      </draw:frame>
      <presentation:notes style:page-layout-name="pageLayout2" draw:style-name="a456">
        <draw:page-thumbnail svg:x="3.66508in" svg:y="0.9276in" svg:width="14.65814in" svg:height="4.63801in" presentation:class="page" draw:id="id1" presentation:style-name="a451" draw:name="Google Shape;3;n">
          <svg:title/>
          <svg:desc/>
        </draw:page-thumbnail>
        <draw:frame draw:id="id2" presentation:style-name="a455" draw:name="Google Shape;4;n" svg:x="2.1986in" svg:y="5.87481in" svg:width="17.58888in" svg:height="5.56562in" presentation:class="notes" presentation:placeholder="false">
          <draw:text-box>
            <text:list text:style-name="a454">
              <text:list-item>
                <text:p text:style-name="a453" text:class-names="" text:cond-style-name=""><text:span text:style-name="a452" text:class-names=""/></text:p>
              </text:list-item>
            </text:list>
          </draw:text-box>
          <svg:title/>
          <svg:desc/>
        </draw:frame>
      </presentation:notes>
    </style:master-page>
    <style:master-page style:name="Master1-Layout26-cust-Text-&amp;-Image-Slide_opt1" style:page-layout-name="pageLayout1" draw:style-name="a457">
      <draw:custom-shape svg:x="5.71546in" svg:y="0in" svg:width="0.1355in" svg:height="5.62468in" draw:id="id127" draw:style-name="a460" draw:name="Google Shape;157;p64">
        <svg:title/>
        <svg:desc/>
        <text:p text:style-name="a459" text:class-names="" text:cond-style-name=""><text:span text:style-name="a458" text:class-names=""/></text:p>
        <draw:enhanced-geometry xmlns:dr3d="urn:oasis:names:tc:opendocument:xmlns:dr3d:1.0" draw:type="non-primitive" svg:viewBox="0 0 272415 11308715" draw:enhanced-path="M 272243 0 L 0 0 0 11308556 272243 11308556 27224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28" presentation:style-name="a464" draw:name="Google Shape;158;p64" svg:x="0.46454in" svg:y="2.80224in" svg:width="4.80078in" svg:height="2.32409in" presentation:class="outline" presentation:placeholder="false">
        <draw:text-box>
          <text:list text:style-name="a463">
            <text:list-item>
              <text:p text:style-name="a462" text:class-names="" text:cond-style-name=""><text:span text:style-name="a461" text:class-names=""/></text:p>
            </text:list-item>
          </text:list>
        </draw:text-box>
        <svg:title/>
        <svg:desc/>
      </draw:frame>
      <draw:frame draw:id="id129" presentation:style-name="a467" draw:name="Google Shape;159;p64" svg:x="0.42664in" svg:y="1.42317in" svg:width="4.42175in" svg:height="1.01033in" presentation:class="title" presentation:placeholder="false">
        <draw:text-box>
          <text:p text:style-name="a466" text:class-names="" text:cond-style-name=""><text:span text:style-name="a465" text:class-names=""/></text:p>
        </draw:text-box>
        <svg:title/>
        <svg:desc/>
      </draw:frame>
      <draw:frame draw:id="id130" draw:style-name="a468" draw:name="Google Shape;160;p64"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131" presentation:style-name="a469" draw:name="Google Shape;161;p64" svg:x="5.84852in" svg:y="0.00143in" svg:width="4.15148in" svg:height="5.625in" presentation:class="graphic" presentation:placeholder="false">
        <svg:title/>
        <svg:desc/>
      </draw:frame>
      <presentation:notes style:page-layout-name="pageLayout2" draw:style-name="a475">
        <draw:page-thumbnail svg:x="3.66508in" svg:y="0.9276in" svg:width="14.65814in" svg:height="4.63801in" presentation:class="page" draw:id="id1" presentation:style-name="a470" draw:name="Google Shape;3;n">
          <svg:title/>
          <svg:desc/>
        </draw:page-thumbnail>
        <draw:frame draw:id="id2" presentation:style-name="a474" draw:name="Google Shape;4;n" svg:x="2.1986in" svg:y="5.87481in" svg:width="17.58888in" svg:height="5.56562in" presentation:class="notes" presentation:placeholder="false">
          <draw:text-box>
            <text:list text:style-name="a473">
              <text:list-item>
                <text:p text:style-name="a472" text:class-names="" text:cond-style-name=""><text:span text:style-name="a471" text:class-names=""/></text:p>
              </text:list-item>
            </text:list>
          </draw:text-box>
          <svg:title/>
          <svg:desc/>
        </draw:frame>
      </presentation:notes>
    </style:master-page>
    <style:master-page style:name="Master1-Layout27-cust-Text-&amp;-Image-Slide_opt2" style:page-layout-name="pageLayout1" draw:style-name="a476">
      <draw:custom-shape svg:x="4.14707in" svg:y="0in" svg:width="0.1355in" svg:height="5.62468in" draw:id="id132" draw:style-name="a479" draw:name="Google Shape;163;p65">
        <svg:title/>
        <svg:desc/>
        <text:p text:style-name="a478" text:class-names="" text:cond-style-name=""><text:span text:style-name="a477" text:class-names=""/></text:p>
        <draw:enhanced-geometry xmlns:dr3d="urn:oasis:names:tc:opendocument:xmlns:dr3d:1.0" draw:type="non-primitive" svg:viewBox="0 0 272415 11308715" draw:enhanced-path="M 272232 0 L 0 0 0 11308556 272232 11308556 2722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33" presentation:style-name="a483" draw:name="Google Shape;164;p65" svg:x="4.75731in" svg:y="1.8648in" svg:width="4.80078in" svg:height="2.32409in" presentation:class="outline" presentation:placeholder="false">
        <draw:text-box>
          <text:list text:style-name="a482">
            <text:list-item>
              <text:p text:style-name="a481" text:class-names="" text:cond-style-name=""><text:span text:style-name="a480" text:class-names=""/></text:p>
            </text:list-item>
          </text:list>
        </draw:text-box>
        <svg:title/>
        <svg:desc/>
      </draw:frame>
      <draw:frame draw:id="id134" presentation:style-name="a486" draw:name="Google Shape;165;p65" svg:x="4.7573in" svg:y="0.46086in" svg:width="4.63294in" svg:height="1.01033in" presentation:class="title" presentation:placeholder="false">
        <draw:text-box>
          <text:p text:style-name="a485" text:class-names="" text:cond-style-name=""><text:span text:style-name="a484" text:class-names=""/></text:p>
        </draw:text-box>
        <svg:title/>
        <svg:desc/>
      </draw:frame>
      <draw:frame draw:id="id135" draw:style-name="a487" draw:name="Google Shape;166;p65" svg:x="7.90122in" svg:y="4.34262in" svg:width="1.79672in" svg:height="1.18252in" style:rel-width="scale" style:rel-height="scale">
        <draw:image xlink:href="media/image5.png" xlink:type="simple" xlink:show="embed" xlink:actuate="onLoad"/>
        <svg:title/>
        <svg:desc>Logo

Description automatically generated with medium confidence</svg:desc>
      </draw:frame>
      <draw:frame draw:id="id136" presentation:style-name="a488" draw:name="Google Shape;167;p65" svg:x="0in" svg:y="0.00235in" svg:width="4.15148in" svg:height="5.625in" presentation:class="graphic" presentation:placeholder="false">
        <svg:title/>
        <svg:desc/>
      </draw:frame>
      <presentation:notes style:page-layout-name="pageLayout2" draw:style-name="a494">
        <draw:page-thumbnail svg:x="3.66508in" svg:y="0.9276in" svg:width="14.65814in" svg:height="4.63801in" presentation:class="page" draw:id="id1" presentation:style-name="a489" draw:name="Google Shape;3;n">
          <svg:title/>
          <svg:desc/>
        </draw:page-thumbnail>
        <draw:frame draw:id="id2" presentation:style-name="a493" draw:name="Google Shape;4;n" svg:x="2.1986in" svg:y="5.87481in" svg:width="17.58888in" svg:height="5.56562in" presentation:class="notes" presentation:placeholder="false">
          <draw:text-box>
            <text:list text:style-name="a492">
              <text:list-item>
                <text:p text:style-name="a491" text:class-names="" text:cond-style-name=""><text:span text:style-name="a490" text:class-names=""/></text:p>
              </text:list-item>
            </text:list>
          </draw:text-box>
          <svg:title/>
          <svg:desc/>
        </draw:frame>
      </presentation:notes>
    </style:master-page>
    <style:master-page style:name="Master1-Layout28-cust-Image-Only-Slide" style:page-layout-name="pageLayout1" draw:style-name="a495">
      <draw:frame draw:id="id137" presentation:style-name="a496" draw:name="Google Shape;169;p66" svg:x="0in" svg:y="0.00235in" svg:width="10in" svg:height="5.625in" presentation:class="graphic" presentation:placeholder="false">
        <svg:title/>
        <svg:desc/>
      </draw:frame>
      <presentation:notes style:page-layout-name="pageLayout2" draw:style-name="a502">
        <draw:page-thumbnail svg:x="3.66508in" svg:y="0.9276in" svg:width="14.65814in" svg:height="4.63801in" presentation:class="page" draw:id="id1" presentation:style-name="a497" draw:name="Google Shape;3;n">
          <svg:title/>
          <svg:desc/>
        </draw:page-thumbnail>
        <draw:frame draw:id="id2" presentation:style-name="a501" draw:name="Google Shape;4;n" svg:x="2.1986in" svg:y="5.87481in" svg:width="17.58888in" svg:height="5.56562in" presentation:class="notes" presentation:placeholder="false">
          <draw:text-box>
            <text:list text:style-name="a500">
              <text:list-item>
                <text:p text:style-name="a499" text:class-names="" text:cond-style-name=""><text:span text:style-name="a498" text:class-names=""/></text:p>
              </text:list-item>
            </text:list>
          </draw:text-box>
          <svg:title/>
          <svg:desc/>
        </draw:frame>
      </presentation:notes>
    </style:master-page>
    <style:master-page style:name="Master1-Layout29-cust-Multiple-Image-Slide_opt1" style:page-layout-name="pageLayout1" draw:style-name="a503">
      <draw:custom-shape svg:x="9.8645in" svg:y="0in" svg:width="0.1355in" svg:height="5.62468in" draw:id="id138" draw:style-name="a506" draw:name="Google Shape;171;p67">
        <svg:title/>
        <svg:desc/>
        <text:p text:style-name="a505" text:class-names="" text:cond-style-name=""><text:span text:style-name="a504" text:class-names=""/></text:p>
        <draw:enhanced-geometry xmlns:dr3d="urn:oasis:names:tc:opendocument:xmlns:dr3d:1.0" draw:type="non-primitive" svg:viewBox="0 0 272415 11308715" draw:enhanced-path="M 272232 0 L 0 0 0 11308556 272232 11308556 2722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39" draw:style-name="a507" draw:name="Google Shape;172;p67"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frame draw:id="id140" presentation:style-name="a508" draw:name="Google Shape;173;p67" svg:x="0.4789in" svg:y="1.3473in" svg:width="2.39121in" svg:height="2.18986in" presentation:class="graphic" presentation:placeholder="false">
        <svg:title/>
        <svg:desc/>
      </draw:frame>
      <draw:frame draw:id="id141" presentation:style-name="a509" draw:name="Google Shape;174;p67" svg:x="3.63234in" svg:y="1.3473in" svg:width="2.39121in" svg:height="2.18986in" presentation:class="graphic" presentation:placeholder="false">
        <svg:title/>
        <svg:desc/>
      </draw:frame>
      <draw:frame draw:id="id142" presentation:style-name="a510" draw:name="Google Shape;175;p67" svg:x="6.76328in" svg:y="1.3473in" svg:width="2.39121in" svg:height="2.18986in" presentation:class="graphic" presentation:placeholder="false">
        <svg:title/>
        <svg:desc/>
      </draw:frame>
      <presentation:notes style:page-layout-name="pageLayout2" draw:style-name="a516">
        <draw:page-thumbnail svg:x="3.66508in" svg:y="0.9276in" svg:width="14.65814in" svg:height="4.63801in" presentation:class="page" draw:id="id1" presentation:style-name="a511" draw:name="Google Shape;3;n">
          <svg:title/>
          <svg:desc/>
        </draw:page-thumbnail>
        <draw:frame draw:id="id2" presentation:style-name="a515" draw:name="Google Shape;4;n" svg:x="2.1986in" svg:y="5.87481in" svg:width="17.58888in" svg:height="5.56562in" presentation:class="notes" presentation:placeholder="false">
          <draw:text-box>
            <text:list text:style-name="a514">
              <text:list-item>
                <text:p text:style-name="a513" text:class-names="" text:cond-style-name=""><text:span text:style-name="a512" text:class-names=""/></text:p>
              </text:list-item>
            </text:list>
          </draw:text-box>
          <svg:title/>
          <svg:desc/>
        </draw:frame>
      </presentation:notes>
    </style:master-page>
    <style:master-page style:name="Master1-Layout30-cust-Multiple-Image-Slide_opt2" style:page-layout-name="pageLayout1" draw:style-name="a517">
      <draw:frame draw:id="id143" draw:style-name="a518" draw:name="Google Shape;177;p68"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custom-shape svg:x="9.8645in" svg:y="0in" svg:width="0.1355in" svg:height="5.62468in" draw:id="id144" draw:style-name="a521" draw:name="Google Shape;178;p68">
        <svg:title/>
        <svg:desc/>
        <text:p text:style-name="a520" text:class-names="" text:cond-style-name=""><text:span text:style-name="a519" text:class-names=""/></text:p>
        <draw:enhanced-geometry xmlns:dr3d="urn:oasis:names:tc:opendocument:xmlns:dr3d:1.0" draw:type="non-primitive" svg:viewBox="0 0 272415 11308715" draw:enhanced-path="M 272232 0 L 0 0 0 11308556 272232 11308556 2722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45" presentation:style-name="a522" draw:name="Google Shape;179;p68" svg:x="0.19533in" svg:y="1.45874in" svg:width="3.03388in" svg:height="4.0542in" presentation:class="graphic" presentation:placeholder="false">
        <svg:title/>
        <svg:desc/>
      </draw:frame>
      <draw:frame draw:id="id146" presentation:style-name="a523" draw:name="Google Shape;180;p68" svg:x="3.34877in" svg:y="1.45874in" svg:width="3.03388in" svg:height="4.0542in" presentation:class="graphic" presentation:placeholder="false">
        <svg:title/>
        <svg:desc/>
      </draw:frame>
      <draw:frame draw:id="id147" presentation:style-name="a524" draw:name="Google Shape;181;p68" svg:x="6.47971in" svg:y="1.45874in" svg:width="3.03388in" svg:height="4.0542in" presentation:class="graphic" presentation:placeholder="false">
        <svg:title/>
        <svg:desc/>
      </draw:frame>
      <presentation:notes style:page-layout-name="pageLayout2" draw:style-name="a530">
        <draw:page-thumbnail svg:x="3.66508in" svg:y="0.9276in" svg:width="14.65814in" svg:height="4.63801in" presentation:class="page" draw:id="id1" presentation:style-name="a525" draw:name="Google Shape;3;n">
          <svg:title/>
          <svg:desc/>
        </draw:page-thumbnail>
        <draw:frame draw:id="id2" presentation:style-name="a529" draw:name="Google Shape;4;n" svg:x="2.1986in" svg:y="5.87481in" svg:width="17.58888in" svg:height="5.56562in" presentation:class="notes" presentation:placeholder="false">
          <draw:text-box>
            <text:list text:style-name="a528">
              <text:list-item>
                <text:p text:style-name="a527" text:class-names="" text:cond-style-name=""><text:span text:style-name="a526" text:class-names=""/></text:p>
              </text:list-item>
            </text:list>
          </draw:text-box>
          <svg:title/>
          <svg:desc/>
        </draw:frame>
      </presentation:notes>
    </style:master-page>
    <style:master-page style:name="Master1-Layout31-cust-Multiple-Image-Slide_opt3" style:page-layout-name="pageLayout1" draw:style-name="a531">
      <draw:frame draw:id="id148" draw:style-name="a532" draw:name="Google Shape;183;p69"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draw:custom-shape svg:x="9.8645in" svg:y="0in" svg:width="0.1355in" svg:height="5.62468in" draw:id="id149" draw:style-name="a535" draw:name="Google Shape;184;p69">
        <svg:title/>
        <svg:desc/>
        <text:p text:style-name="a534" text:class-names="" text:cond-style-name=""><text:span text:style-name="a533" text:class-names=""/></text:p>
        <draw:enhanced-geometry xmlns:dr3d="urn:oasis:names:tc:opendocument:xmlns:dr3d:1.0" draw:type="non-primitive" svg:viewBox="0 0 272415 11308715" draw:enhanced-path="M 272232 0 L 0 0 0 11308556 272232 11308556 2722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415"/>
          <draw:equation draw:name="f7" draw:formula="?f4 / 11308715"/>
          <draw:equation draw:name="f8" draw:formula="?f0 / ?f6"/>
          <draw:equation draw:name="f9" draw:formula="?f1 / ?f6"/>
          <draw:equation draw:name="f10" draw:formula="?f2 / ?f7"/>
          <draw:equation draw:name="f11" draw:formula="?f3 / ?f7"/>
        </draw:enhanced-geometry>
      </draw:custom-shape>
      <draw:frame draw:id="id150" presentation:style-name="a538" draw:name="Google Shape;185;p69" svg:x="0.42664in" svg:y="1.42317in" svg:width="4.42175in" svg:height="1.01033in" presentation:class="title" presentation:placeholder="false">
        <draw:text-box>
          <text:p text:style-name="a537" text:class-names="" text:cond-style-name=""><text:span text:style-name="a536" text:class-names=""/></text:p>
        </draw:text-box>
        <svg:title/>
        <svg:desc/>
      </draw:frame>
      <draw:frame draw:id="id151" presentation:style-name="a539" draw:name="Google Shape;186;p69" svg:x="0.13995in" svg:y="3.17065in" svg:width="3.03388in" svg:height="2.3423in" presentation:class="graphic" presentation:placeholder="false">
        <svg:title/>
        <svg:desc/>
      </draw:frame>
      <draw:frame draw:id="id152" presentation:style-name="a540" draw:name="Google Shape;187;p69" svg:x="3.29338in" svg:y="3.17065in" svg:width="3.03388in" svg:height="2.3423in" presentation:class="graphic" presentation:placeholder="false">
        <svg:title/>
        <svg:desc/>
      </draw:frame>
      <draw:frame draw:id="id153" presentation:style-name="a541" draw:name="Google Shape;188;p69" svg:x="6.42432in" svg:y="3.17065in" svg:width="3.03388in" svg:height="2.3423in" presentation:class="graphic" presentation:placeholder="false">
        <svg:title/>
        <svg:desc/>
      </draw:frame>
      <presentation:notes style:page-layout-name="pageLayout2" draw:style-name="a547">
        <draw:page-thumbnail svg:x="3.66508in" svg:y="0.9276in" svg:width="14.65814in" svg:height="4.63801in" presentation:class="page" draw:id="id1" presentation:style-name="a542" draw:name="Google Shape;3;n">
          <svg:title/>
          <svg:desc/>
        </draw:page-thumbnail>
        <draw:frame draw:id="id2" presentation:style-name="a546" draw:name="Google Shape;4;n" svg:x="2.1986in" svg:y="5.87481in" svg:width="17.58888in" svg:height="5.56562in" presentation:class="notes" presentation:placeholder="false">
          <draw:text-box>
            <text:list text:style-name="a545">
              <text:list-item>
                <text:p text:style-name="a544" text:class-names="" text:cond-style-name=""><text:span text:style-name="a543" text:class-names=""/></text:p>
              </text:list-item>
            </text:list>
          </draw:text-box>
          <svg:title/>
          <svg:desc/>
        </draw:frame>
      </presentation:notes>
    </style:master-page>
    <style:master-page style:name="Master1-Layout32-cust-Text-&amp;-Image-Slide_opt4" style:page-layout-name="pageLayout1" draw:style-name="a548">
      <draw:frame draw:id="id154" presentation:style-name="a552" draw:name="Google Shape;190;p70" svg:x="0.46454in" svg:y="2.80224in" svg:width="4.80078in" svg:height="2.32409in" presentation:class="outline" presentation:placeholder="false">
        <draw:text-box>
          <text:list text:style-name="a551">
            <text:list-item>
              <text:p text:style-name="a550" text:class-names="" text:cond-style-name=""><text:span text:style-name="a549" text:class-names=""/></text:p>
            </text:list-item>
          </text:list>
        </draw:text-box>
        <svg:title/>
        <svg:desc/>
      </draw:frame>
      <draw:frame draw:id="id155" presentation:style-name="a555" draw:name="Google Shape;191;p70" svg:x="0.42664in" svg:y="1.42317in" svg:width="4.42175in" svg:height="1.01033in" presentation:class="title" presentation:placeholder="false">
        <draw:text-box>
          <text:p text:style-name="a554" text:class-names="" text:cond-style-name=""><text:span text:style-name="a553" text:class-names=""/></text:p>
        </draw:text-box>
        <svg:title/>
        <svg:desc/>
      </draw:frame>
      <draw:frame draw:id="id156" draw:style-name="a556" draw:name="Google Shape;192;p70" svg:x="0.3339in" svg:y="0.11205in" svg:width="1.79672in" svg:height="1.18252in" style:rel-width="scale" style:rel-height="scale">
        <draw:image xlink:href="media/image5.png" xlink:type="simple" xlink:show="embed" xlink:actuate="onLoad"/>
        <svg:title/>
        <svg:desc>Logo

Description automatically generated with medium confidence</svg:desc>
      </draw:frame>
      <presentation:notes style:page-layout-name="pageLayout2" draw:style-name="a562">
        <draw:page-thumbnail svg:x="3.66508in" svg:y="0.9276in" svg:width="14.65814in" svg:height="4.63801in" presentation:class="page" draw:id="id1" presentation:style-name="a557" draw:name="Google Shape;3;n">
          <svg:title/>
          <svg:desc/>
        </draw:page-thumbnail>
        <draw:frame draw:id="id2" presentation:style-name="a561" draw:name="Google Shape;4;n" svg:x="2.1986in" svg:y="5.87481in" svg:width="17.58888in" svg:height="5.56562in" presentation:class="notes" presentation:placeholder="false">
          <draw:text-box>
            <text:list text:style-name="a560">
              <text:list-item>
                <text:p text:style-name="a559" text:class-names="" text:cond-style-name=""><text:span text:style-name="a558" text:class-names=""/></text:p>
              </text:list-item>
            </text:list>
          </draw:text-box>
          <svg:title/>
          <svg:desc/>
        </draw:frame>
      </presentation:notes>
    </style:master-page>
    <style:master-page style:name="Master1-Layout33-cust-Closing-Slide_opt3" style:page-layout-name="pageLayout1" draw:style-name="a563">
      <draw:frame draw:id="id157" draw:style-name="a564" draw:name="Google Shape;194;p71" svg:x="0.3339in" svg:y="0.11205in" svg:width="3.12356in" svg:height="2.05578in" style:rel-width="scale" style:rel-height="scale">
        <draw:image xlink:href="media/image25.png" xlink:type="simple" xlink:show="embed" xlink:actuate="onLoad"/>
        <svg:title/>
        <svg:desc>Logo

Description automatically generated with medium confidence</svg:desc>
      </draw:frame>
      <draw:frame draw:id="id158" presentation:style-name="a567" draw:name="Google Shape;195;p71" svg:x="0.42664in" svg:y="4.56744in" svg:width="4.42175in" svg:height="0.53723in" presentation:class="title" presentation:placeholder="false">
        <draw:text-box>
          <text:p text:style-name="a566" text:class-names="" text:cond-style-name=""><text:span text:style-name="a565" text:class-names=""/></text:p>
        </draw:text-box>
        <svg:title/>
        <svg:desc/>
      </draw:frame>
      <presentation:notes style:page-layout-name="pageLayout2" draw:style-name="a573">
        <draw:page-thumbnail svg:x="3.66508in" svg:y="0.9276in" svg:width="14.65814in" svg:height="4.63801in" presentation:class="page" draw:id="id1" presentation:style-name="a568" draw:name="Google Shape;3;n">
          <svg:title/>
          <svg:desc/>
        </draw:page-thumbnail>
        <draw:frame draw:id="id2" presentation:style-name="a572" draw:name="Google Shape;4;n" svg:x="2.1986in" svg:y="5.87481in" svg:width="17.58888in" svg:height="5.56562in" presentation:class="notes" presentation:placeholder="false">
          <draw:text-box>
            <text:list text:style-name="a571">
              <text:list-item>
                <text:p text:style-name="a570" text:class-names="" text:cond-style-name=""><text:span text:style-name="a569" text:class-names=""/></text:p>
              </text:list-item>
            </text:list>
          </draw:text-box>
          <svg:title/>
          <svg:desc/>
        </draw:frame>
      </presentation:notes>
    </style:master-page>
    <style:master-page style:name="Master1-Layout34-cust-Closing-Slide_opt2" style:page-layout-name="pageLayout1" draw:style-name="a574">
      <draw:custom-shape svg:x="0in" svg:y="0in" svg:width="10in" svg:height="5.62468in" draw:id="id159" draw:style-name="a577" draw:name="Google Shape;197;p72">
        <svg:title/>
        <svg:desc/>
        <text:p text:style-name="a576" text:class-names="" text:cond-style-name=""><text:span text:style-name="a575" text:class-names=""/></text:p>
        <draw:enhanced-geometry xmlns:dr3d="urn:oasis:names:tc:opendocument:xmlns:dr3d:1.0" draw:type="non-primitive" svg:viewBox="0 0 19832320 11308715" draw:enhanced-path="M 19831856 0 L 0 0 0 11308556 19831856 11308556 1983185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32320"/>
          <draw:equation draw:name="f7" draw:formula="?f4 / 11308715"/>
          <draw:equation draw:name="f8" draw:formula="?f0 / ?f6"/>
          <draw:equation draw:name="f9" draw:formula="?f1 / ?f6"/>
          <draw:equation draw:name="f10" draw:formula="?f2 / ?f7"/>
          <draw:equation draw:name="f11" draw:formula="?f3 / ?f7"/>
        </draw:enhanced-geometry>
      </draw:custom-shape>
      <draw:frame draw:id="id160" presentation:style-name="a580" draw:name="Google Shape;198;p72" svg:x="0.42664in" svg:y="4.56744in" svg:width="4.42175in" svg:height="0.53723in" presentation:class="title" presentation:placeholder="false">
        <draw:text-box>
          <text:p text:style-name="a579" text:class-names="" text:cond-style-name=""><text:span text:style-name="a578" text:class-names=""/></text:p>
        </draw:text-box>
        <svg:title/>
        <svg:desc/>
      </draw:frame>
      <draw:frame draw:id="id161" draw:style-name="a581" draw:name="Google Shape;199;p72" svg:x="0.3339in" svg:y="0.11205in" svg:width="3.12356in" svg:height="2.05578in" style:rel-width="scale" style:rel-height="scale">
        <draw:image xlink:href="media/image26.png" xlink:type="simple" xlink:show="embed" xlink:actuate="onLoad"/>
        <svg:title/>
        <svg:desc>Logo

Description automatically generated</svg:desc>
      </draw:frame>
      <presentation:notes style:page-layout-name="pageLayout2" draw:style-name="a587">
        <draw:page-thumbnail svg:x="3.66508in" svg:y="0.9276in" svg:width="14.65814in" svg:height="4.63801in" presentation:class="page" draw:id="id1" presentation:style-name="a582" draw:name="Google Shape;3;n">
          <svg:title/>
          <svg:desc/>
        </draw:page-thumbnail>
        <draw:frame draw:id="id2" presentation:style-name="a586" draw:name="Google Shape;4;n" svg:x="2.1986in" svg:y="5.87481in" svg:width="17.58888in" svg:height="5.56562in" presentation:class="notes" presentation:placeholder="false">
          <draw:text-box>
            <text:list text:style-name="a585">
              <text:list-item>
                <text:p text:style-name="a584" text:class-names="" text:cond-style-name=""><text:span text:style-name="a583" text:class-names=""/></text:p>
              </text:list-item>
            </text:list>
          </draw:text-box>
          <svg:title/>
          <svg:desc/>
        </draw:frame>
      </presentation:notes>
    </style:master-page>
    <style:master-page style:name="Master1-Layout35-cust-Closing-Slide_opt1" style:page-layout-name="pageLayout1" draw:style-name="a588">
      <draw:custom-shape svg:x="0in" svg:y="0in" svg:width="10in" svg:height="5.62468in" draw:id="id162" draw:style-name="a591" draw:name="Google Shape;201;p73">
        <svg:title/>
        <svg:desc/>
        <text:p text:style-name="a590" text:class-names="" text:cond-style-name=""><text:span text:style-name="a589" text:class-names=""/></text:p>
        <draw:enhanced-geometry xmlns:dr3d="urn:oasis:names:tc:opendocument:xmlns:dr3d:1.0" draw:type="non-primitive" svg:viewBox="0 0 19832320 11308715" draw:enhanced-path="M 19831856 0 L 0 0 0 11308556 19831856 11308556 1983185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32320"/>
          <draw:equation draw:name="f7" draw:formula="?f4 / 11308715"/>
          <draw:equation draw:name="f8" draw:formula="?f0 / ?f6"/>
          <draw:equation draw:name="f9" draw:formula="?f1 / ?f6"/>
          <draw:equation draw:name="f10" draw:formula="?f2 / ?f7"/>
          <draw:equation draw:name="f11" draw:formula="?f3 / ?f7"/>
        </draw:enhanced-geometry>
      </draw:custom-shape>
      <draw:frame draw:id="id163" presentation:style-name="a594" draw:name="Google Shape;202;p73" svg:x="0.42664in" svg:y="4.56744in" svg:width="4.42175in" svg:height="0.53723in" presentation:class="title" presentation:placeholder="false">
        <draw:text-box>
          <text:p text:style-name="a593" text:class-names="" text:cond-style-name=""><text:span text:style-name="a592" text:class-names=""/></text:p>
        </draw:text-box>
        <svg:title/>
        <svg:desc/>
      </draw:frame>
      <draw:frame draw:id="id164" draw:style-name="a595" draw:name="Google Shape;203;p73" svg:x="0.3339in" svg:y="0.11205in" svg:width="3.12356in" svg:height="2.05578in" style:rel-width="scale" style:rel-height="scale">
        <draw:image xlink:href="media/image26.png" xlink:type="simple" xlink:show="embed" xlink:actuate="onLoad"/>
        <svg:title/>
        <svg:desc>Logo

Description automatically generated</svg:desc>
      </draw:frame>
      <presentation:notes style:page-layout-name="pageLayout2" draw:style-name="a601">
        <draw:page-thumbnail svg:x="3.66508in" svg:y="0.9276in" svg:width="14.65814in" svg:height="4.63801in" presentation:class="page" draw:id="id1" presentation:style-name="a596" draw:name="Google Shape;3;n">
          <svg:title/>
          <svg:desc/>
        </draw:page-thumbnail>
        <draw:frame draw:id="id2" presentation:style-name="a600" draw:name="Google Shape;4;n" svg:x="2.1986in" svg:y="5.87481in" svg:width="17.58888in" svg:height="5.56562in" presentation:class="notes" presentation:placeholder="false">
          <draw:text-box>
            <text:list text:style-name="a599">
              <text:list-item>
                <text:p text:style-name="a598" text:class-names="" text:cond-style-name=""><text:span text:style-name="a597" text:class-names=""/></text:p>
              </text:list-item>
            </text:list>
          </draw:text-box>
          <svg:title/>
          <svg:desc/>
        </draw:frame>
      </presentation:notes>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Coles, Andy</meta:initial-creator>
    <meta:creation-date>2022-09-29T15:54:17Z</meta:creation-date>
    <dc:date>2026-05-21T10:41:50Z</dc:date>
    <meta:editing-cycles>442</meta:editing-cycles>
    <meta:user-defined meta:name="Created" meta:value-type="date">2022-07-28T00:00:00Z</meta:user-defined>
    <meta:user-defined meta:name="Creator">Adobe InDesign 17.3 (Macintosh)</meta:user-defined>
    <meta:user-defined meta:name="LastSaved" meta:value-type="date">2022-07-28T00:00:00Z</meta:user-defined>
    <meta:user-defined meta:name="Producer">Adobe PDF Library 16.0.7</meta:user-defined>
    <meta:user-defined meta:name="ContentTypeId">0x010100305445A33AFAEC419A41B44D69E6129F</meta:user-defined>
    <meta:user-defined meta:name="MediaServiceImageTags"/>
  </office:meta>
</office:document-meta>
</file>